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26FDCC884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handas" svg:font-family="Chandas"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pitch="variable"/>
    <style:font-face style:name="Corbel1" svg:font-family="Corbel" style:font-family-generic="roman" style:font-pitch="variable"/>
    <style:font-face style:name="Corbel2"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1.3875in"/>
    </style:style>
    <style:style style:name="Table15.B" style:family="table-column">
      <style:table-column-properties style:column-width="5.1639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background-color="#d8d8d8" fo:padding-left="0.075in" fo:padding-right="0.075in" fo:padding-top="0in" fo:padding-bottom="0in" fo:border="none" style:writing-mode="lr-tb">
        <style:background-image/>
      </style:table-cell-properties>
    </style:style>
    <style:style style:name="Table15.B3" style:family="table-cell">
      <style:table-cell-properties fo:padding-left="0.075in" fo:padding-right="0.075in" fo:padding-top="0in" fo:padding-bottom="0in" fo:border="none" style:writing-mode="lr-tb"/>
    </style:style>
    <style:style style:name="Table15.B4"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may-break-between-rows="true" style:writing-mode="lr-tb" table:border-model="collapsing"/>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3" style:family="table-cell">
      <style:table-cell-properties fo:background-color="transparent" fo:padding-left="0.075in" fo:padding-right="0.075in" fo:padding-top="0in" fo:padding-bottom="0in" fo:border="none" style:writing-mode="lr-tb">
        <style:background-image/>
      </style:table-cell-properties>
    </style:style>
    <style:style style:name="Table16.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background-color="transparent" fo:padding-left="0.075in" fo:padding-right="0.075in" fo:padding-top="0in" fo:padding-bottom="0in" fo:border="none" style:writing-mode="lr-tb">
        <style:background-image/>
      </style:table-cell-properties>
    </style:style>
    <style:style style:name="Table17.5" style:family="table-row">
      <style:table-row-properties fo:background-color="transparent" fo:keep-together="auto">
        <style:background-image/>
      </style:table-row-properties>
    </style:style>
    <style:style style:name="Table17.6" style:family="table-row">
      <style:table-row-properties style:min-row-height="0.0924in" fo:background-color="transparent" fo:keep-together="auto">
        <style:background-image/>
      </style:table-row-properties>
    </style:style>
    <style:style style:name="Table17.B6"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may-break-between-rows="true" style:writing-mode="lr-tb" table:border-model="collapsing"/>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0.B2" style:family="table-cell">
      <style:table-cell-properties fo:background-color="#d8d8d8" fo:padding-left="0.075in" fo:padding-right="0.075in" fo:padding-top="0in" fo:padding-bottom="0in" fo:border="none" style:writing-mode="lr-tb">
        <style:background-image/>
      </style:table-cell-properties>
    </style:style>
    <style:style style:name="Table20.B3" style:family="table-cell">
      <style:table-cell-properties fo:background-color="transparent" fo:padding-left="0.075in" fo:padding-right="0.075in" fo:padding-top="0in" fo:padding-bottom="0in" fo:border="none" style:writing-mode="lr-tb">
        <style:background-image/>
      </style:table-cell-properties>
    </style:style>
    <style:style style:name="Table20.B5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24.A" style:family="table-column">
      <style:table-column-properties style:column-width="2.7236in"/>
    </style:style>
    <style:style style:name="Table24.B" style:family="table-column">
      <style:table-column-properties style:column-width="3.8278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6" style:family="table-row">
      <style:table-row-properties fo:background-color="transparent" fo:keep-together="auto">
        <style:background-image/>
      </style:table-row-properties>
    </style:style>
    <style:style style:name="Table24.B8"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41" style:family="table">
      <style:table-properties style:width="6.4014in" table:align="margins" style:may-break-between-rows="true" style:writing-mode="lr-tb" table:border-model="collapsing"/>
    </style:style>
    <style:style style:name="Table41.A" style:family="table-column">
      <style:table-column-properties style:column-width="2.134in" style:rel-column-width="21845*"/>
    </style:style>
    <style:style style:name="Table41.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41.2" style:family="table-row">
      <style:table-row-properties fo:keep-together="auto"/>
    </style:style>
    <style:style style:name="Table41.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41.B2" style:family="table-cell">
      <style:table-cell-properties fo:background-color="#d8d8d8" fo:padding-left="0.075in" fo:padding-right="0.075in" fo:padding-top="0in" fo:padding-bottom="0in" fo:border="none" style:writing-mode="lr-tb">
        <style:background-image/>
      </style:table-cell-properties>
    </style:style>
    <style:style style:name="Table41.B3" style:family="table-cell">
      <style:table-cell-properties fo:background-color="transparent" fo:padding-left="0.075in" fo:padding-right="0.075in" fo:padding-top="0in" fo:padding-bottom="0in" fo:border="none" style:writing-mode="lr-tb">
        <style:background-image/>
      </style:table-cell-properties>
    </style:style>
    <style:style style:name="Table41.B1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1.6007in" style:rel-column-width="16383*"/>
    </style:style>
    <style:style style:name="Table29.1" style:family="table-row">
      <style:table-row-properties fo:keep-together="auto"/>
    </style:style>
    <style:style style:name="Table29.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P1" style:family="paragraph" style:parent-style-name="Header">
      <style:paragraph-properties fo:text-align="end" style:justify-single-word="false" fo:orphans="0" fo:widows="0"/>
      <style:text-properties fo:text-transform="uppercase" fo:color="#ffffff" loext:opacity="100%" style:font-name="Arial" style:font-name-complex="Arial1"/>
    </style:style>
    <style:style style:name="P2" style:family="paragraph" style:parent-style-name="Header">
      <style:paragraph-properties fo:orphans="0" fo:widows="0"/>
      <style:text-properties fo:text-transform="uppercase" fo:color="#ffffff" loext:opacity="100%" style:font-name="Arial" style:font-name-complex="Arial1"/>
    </style:style>
    <style:style style:name="P3" style:family="paragraph" style:parent-style-name="Header">
      <style:paragraph-properties fo:text-align="end" style:justify-single-word="false" fo:orphans="0" fo:widows="0"/>
      <style:text-properties fo:color="#ffffff" loext:opacity="100%"/>
    </style:style>
    <style:style style:name="P4" style:family="paragraph" style:parent-style-name="Footer">
      <style:paragraph-properties fo:text-align="end" style:justify-single-word="false" fo:orphans="0" fo:widows="0"/>
      <style:text-properties fo:color="#ffffff" loext:opacity="100%"/>
    </style:style>
    <style:style style:name="P5" style:family="paragraph" style:parent-style-name="Header">
      <style:paragraph-properties fo:orphans="0" fo:widows="0"/>
      <style:text-properties fo:color="#ffffff" loext:opacity="100%"/>
    </style:style>
    <style:style style:name="P6" style:family="paragraph" style:parent-style-name="Footer">
      <style:paragraph-properties fo:orphans="0" fo:widows="0"/>
      <style:text-properties fo:color="#ffffff" loext:opacity="100%"/>
    </style:style>
    <style:style style:name="P7" style:family="paragraph" style:parent-style-name="Header">
      <style:paragraph-properties fo:text-align="end" style:justify-single-word="false" fo:orphans="0" fo:widows="0"/>
      <style:text-properties fo:color="#ffffff" loext:opacity="100%" officeooo:rsid="008894f9"/>
    </style:style>
    <style:style style:name="P8" style:family="paragraph" style:parent-style-name="Header">
      <style:paragraph-properties fo:orphans="0" fo:widows="0"/>
      <style:text-properties fo:color="#ffffff" loext:opacity="100%" officeooo:rsid="00875750"/>
    </style:style>
    <style:style style:name="P9"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11"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13"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fcf9" officeooo:paragraph-rsid="0037fcf9"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8f846f" officeooo:paragraph-rsid="008f846f"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920642" officeooo:paragraph-rsid="00920642"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191f" officeooo:paragraph-rsid="0037191f"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8" style:family="paragraph" style:parent-style-name="Standard">
      <style:paragraph-properties fo:text-align="start" style:justify-single-word="false" fo:keep-together="always"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9" style:family="paragraph" style:parent-style-name="Standard">
      <style:paragraph-properties fo:margin-top="0in" fo:margin-bottom="0.139in" style:contextual-spacing="fals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1"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officeooo:paragraph-rsid="00b08e41"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officeooo:rsid="00b08e41" officeooo:paragraph-rsid="00b08e41"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4" style:family="paragraph" style:parent-style-name="Standard">
      <style:paragraph-properties fo:margin-top="0in" fo:margin-bottom="0.139in" style:contextual-spacing="false" fo:text-align="start" style:justify-single-word="false"/>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style="normal" fo:font-weight="bold" style:letter-kerning="false" style:font-name-asian="Corbel2" style:font-size-asian="11pt" style:language-asian="en" style:country-asian="US" style:font-style-asian="normal" style:font-weight-asian="bold" style:font-name-complex="Times New Roman1"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1" style:family="paragraph" style:parent-style-name="Footer">
      <style:paragraph-properties fo:text-align="end" style:justify-single-word="false" fo:orphans="0" fo:widows="0"/>
    </style:style>
    <style:style style:name="P32" style:family="paragraph" style:parent-style-name="Footer">
      <style:paragraph-properties fo:orphans="0" fo:widows="0"/>
    </style:style>
    <style:style style:name="P33" style:family="paragraph" style:parent-style-name="Routine_20_heading_20_3">
      <style:paragraph-properties fo:margin-left="0in" fo:margin-right="0in" fo:text-indent="0in" style:auto-text-indent="false"/>
    </style:style>
    <style:style style:name="P34" style:family="paragraph" style:parent-style-name="Standard">
      <style:paragraph-properties fo:margin-left="1in" fo:margin-right="0in" fo:text-indent="0in" style:auto-text-indent="false"/>
    </style:style>
    <style:style style:name="P35" style:family="paragraph" style:parent-style-name="Code">
      <style:paragraph-properties fo:margin-top="0in" fo:margin-bottom="0in" style:contextual-spacing="false" fo:break-before="page"/>
    </style:style>
    <style:style style:name="P36" style:family="paragraph" style:parent-style-name="table_20_header1">
      <style:paragraph-properties fo:margin-top="0in" fo:margin-bottom="0in" style:contextual-spacing="false" fo:break-before="page"/>
    </style:style>
    <style:style style:name="P37" style:family="paragraph" style:parent-style-name="Standard">
      <style:paragraph-properties fo:margin-top="0in" fo:margin-bottom="0in" style:contextual-spacing="false"/>
    </style:style>
    <style:style style:name="P38" style:family="paragraph" style:parent-style-name="table_20_header1">
      <style:paragraph-properties fo:margin-top="0in" fo:margin-bottom="0in" style:contextual-spacing="false"/>
    </style:style>
    <style:style style:name="P39" style:family="paragraph" style:parent-style-name="Code">
      <style:paragraph-properties fo:margin-top="0in" fo:margin-bottom="0in" style:contextual-spacing="false"/>
    </style:style>
    <style:style style:name="P40" style:family="paragraph" style:parent-style-name="Standard">
      <style:paragraph-properties fo:margin-top="0in" fo:margin-bottom="0.0835in" style:contextual-spacing="false"/>
    </style:style>
    <style:style style:name="P41" style:family="paragraph" style:parent-style-name="Standard">
      <style:paragraph-properties fo:margin-top="0in" fo:margin-bottom="0in" style:contextual-spacing="false" fo:keep-together="always" fo:keep-with-next="always"/>
    </style:style>
    <style:style style:name="P42" style:family="paragraph" style:parent-style-name="Standard">
      <style:paragraph-properties fo:keep-together="always"/>
    </style:style>
    <style:style style:name="P43" style:family="paragraph" style:parent-style-name="Code" style:master-page-name="">
      <style:paragraph-properties fo:keep-together="always" style:page-number="auto" fo:keep-with-next="always"/>
    </style:style>
    <style:style style:name="P44" style:family="paragraph" style:parent-style-name="No_20_Spacing">
      <style:paragraph-properties fo:keep-with-next="always"/>
    </style:style>
    <style:style style:name="P45" style:family="paragraph" style:parent-style-name="No_20_Spacing">
      <style:paragraph-properties fo:margin-left="0in" fo:margin-right="0in" fo:text-indent="0.5in" style:auto-text-indent="false"/>
    </style:style>
    <style:style style:name="P46" style:family="paragraph" style:parent-style-name="Standard">
      <style:paragraph-properties fo:margin-left="0in" fo:margin-right="0in" fo:margin-top="0in" fo:margin-bottom="0in" style:contextual-spacing="false" fo:text-indent="0.5in" style:auto-text-indent="false"/>
    </style:style>
    <style:style style:name="P47" style:family="paragraph" style:parent-style-name="No_20_Spacing">
      <style:paragraph-properties fo:margin-left="0in" fo:margin-right="0in" fo:margin-top="0in" fo:margin-bottom="0in" style:contextual-spacing="false" fo:text-indent="0.5in" style:auto-text-indent="false"/>
    </style:style>
    <style:style style:name="P48" style:family="paragraph" style:parent-style-name="Standard">
      <style:paragraph-properties fo:line-height="115%"/>
    </style:style>
    <style:style style:name="P49" style:family="paragraph" style:parent-style-name="Standard">
      <style:paragraph-properties fo:margin-top="0in" fo:margin-bottom="0.139in" style:contextual-spacing="false" fo:line-height="115%" fo:break-before="page"/>
    </style:style>
    <style:style style:name="P50" style:family="paragraph" style:parent-style-name="Standard">
      <style:paragraph-properties fo:margin-top="0in" fo:margin-bottom="0.139in" style:contextual-spacing="false" fo:break-before="page"/>
    </style:style>
    <style:style style:name="P51" style:family="paragraph" style:parent-style-name="Standard">
      <style:paragraph-properties style:writing-mode="lr-tb"/>
    </style:style>
    <style:style style:name="P52" style:family="paragraph" style:parent-style-name="Standard">
      <style:paragraph-properties fo:margin-left="1.0626in" fo:margin-right="0in" fo:text-indent="-1.0626in" style:auto-text-indent="false"/>
    </style:style>
    <style:style style:name="P53" style:family="paragraph" style:parent-style-name="Standard">
      <style:paragraph-properties fo:margin-left="1in" fo:margin-right="0in" fo:text-indent="-1in" style:auto-text-indent="false"/>
    </style:style>
    <style:style style:name="P54" style:family="paragraph" style:parent-style-name="Standard">
      <style:paragraph-properties fo:margin-left="1.1252in" fo:margin-right="0in" fo:text-indent="-1.1252in" style:auto-text-indent="false"/>
    </style:style>
    <style:style style:name="P55" style:family="paragraph" style:parent-style-name="Standard">
      <style:paragraph-properties fo:margin-left="1.1252in" fo:margin-right="0in" fo:margin-top="0in" fo:margin-bottom="0in" style:contextual-spacing="false" fo:text-indent="-1.1252in" style:auto-text-indent="false"/>
    </style:style>
    <style:style style:name="P56" style:family="paragraph" style:parent-style-name="Code">
      <style:paragraph-properties fo:margin-top="0in" fo:margin-bottom="0in" style:contextual-spacing="false" fo:break-before="page"/>
      <style:text-properties fo:font-size="9pt" style:font-size-asian="9pt" style:font-size-complex="9pt"/>
    </style:style>
    <style:style style:name="P57" style:family="paragraph" style:parent-style-name="Code">
      <style:paragraph-properties fo:margin-top="0in" fo:margin-bottom="0in" style:contextual-spacing="false"/>
      <style:text-properties fo:font-size="9pt" style:font-size-asian="9pt" style:font-size-complex="9pt"/>
    </style:style>
    <style:style style:name="P58" style:family="paragraph" style:parent-style-name="Code">
      <style:text-properties fo:font-size="9pt" style:font-size-asian="9pt" style:font-size-complex="9pt"/>
    </style:style>
    <style:style style:name="P59"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60"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officeooo:paragraph-rsid="0067abcc" fo:background-color="#ffffff" style:font-size-asian="10.5pt" style:font-weight-asian="normal"/>
    </style:style>
    <style:style style:name="P61" style:family="paragraph" style:parent-style-name="No_20_Spacing">
      <style:text-properties fo:color="#000000" loext:opacity="100%"/>
    </style:style>
    <style:style style:name="P62" style:family="paragraph" style:parent-style-name="No_20_Spacing">
      <style:text-properties fo:color="#000000" loext:opacity="100%" officeooo:paragraph-rsid="00641343"/>
    </style:style>
    <style:style style:name="P63"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64" style:family="paragraph" style:parent-style-name="Standard">
      <style:text-properties fo:color="#000000" loext:opacity="100%" style:font-name="Consolas" fo:font-size="8pt" style:font-size-asian="8pt" style:font-name-complex="Consolas1" style:font-size-complex="8pt"/>
    </style:style>
    <style:style style:name="P65" style:family="paragraph" style:parent-style-name="Standard">
      <style:paragraph-properties fo:margin-top="0in" fo:margin-bottom="0.139in" style:contextual-spacing="false"/>
      <style:text-properties fo:color="#000000" loext:opacity="100%" style:font-name="Consolas" fo:font-size="8pt" style:font-size-asian="8pt" style:font-name-complex="Consolas1" style:font-size-complex="8pt"/>
    </style:style>
    <style:style style:name="P66"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67"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68"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style:paragraph-properties fo:margin-top="0in" fo:margin-bottom="0.139in" style:contextual-spacing="false" fo:text-align="start" style:justify-single-word="false"/>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70" style:family="paragraph" style:parent-style-name="Standard">
      <style:paragraph-properties fo:margin-top="0in" fo:margin-bottom="0in" style:contextual-spacing="false"/>
      <style:text-properties fo:color="#000000" loext:opacity="100%"/>
    </style:style>
    <style:style style:name="P71" style:family="paragraph" style:parent-style-name="Standard">
      <style:text-properties fo:color="#000000" loext:opacity="100%"/>
    </style:style>
    <style:style style:name="P72" style:family="paragraph" style:parent-style-name="Standard">
      <style:text-properties fo:color="#000000" loext:opacity="100%" officeooo:rsid="0065fb7b" officeooo:paragraph-rsid="0065fb7b"/>
    </style:style>
    <style:style style:name="P73" style:family="paragraph" style:parent-style-name="No_20_Spacing">
      <style:text-properties fo:color="#000000" loext:opacity="100%" officeooo:paragraph-rsid="00d1c77f"/>
    </style:style>
    <style:style style:name="P74"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text-align="start" style:justify-single-word="false" fo:keep-together="always"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2pt" style:font-style-complex="normal" style:font-weight-complex="bold" style:text-overline-style="none" style:text-overline-color="font-color"/>
    </style:style>
    <style:style style:name="P81"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3"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8f846f" officeooo:paragraph-rsid="008f846f"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4"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920642" officeooo:paragraph-rsid="00920642"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5"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233bac" officeooo:paragraph-rsid="00233bac"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1b0714" officeooo:paragraph-rsid="001b071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7" style:family="paragraph" style:parent-style-name="Standard">
      <style:paragraph-properties fo:margin-top="0in" fo:margin-bottom="0in" style:contextual-spacing="false" fo:text-align="start" style:justify-single-word="false" fo:orphans="0" fo:widows="0"/>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style:style>
    <style:style style:name="P8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style:paragraph-properties fo:margin-top="0in" fo:margin-bottom="0in" style:contextual-spacing="false" fo:text-align="start" style:justify-single-word="false" fo:orphans="0" fo:widows="0"/>
      <style:text-properties style:use-window-font-color="true" loext:opacity="0%" style:text-outline="false" style:text-line-through-style="none" style:text-line-through-type="none" fo:font-size="11pt" fo:language="en" fo:country="US" fo:font-style="normal" fo:text-shadow="none" style:text-underline-style="none" fo:font-weight="normal" officeooo:rsid="00b08e41" officeooo:paragraph-rsid="00b08e41"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style:style>
    <style:style style:name="P90" style:family="paragraph" style:parent-style-name="Standard">
      <style:paragraph-properties fo:break-before="page"/>
    </style:style>
    <style:style style:name="P91" style:family="paragraph" style:parent-style-name="Code">
      <style:paragraph-properties fo:break-before="page"/>
    </style:style>
    <style:style style:name="P92" style:family="paragraph" style:parent-style-name="table_20_header1">
      <style:paragraph-properties fo:break-before="page"/>
    </style:style>
    <style:style style:name="P93" style:family="paragraph" style:parent-style-name="Code">
      <style:text-properties fo:font-size="8pt" style:font-size-asian="8pt" style:font-size-complex="8pt"/>
    </style:style>
    <style:style style:name="P94" style:family="paragraph" style:parent-style-name="Standard">
      <style:text-properties officeooo:paragraph-rsid="001f90f0"/>
    </style:style>
    <style:style style:name="P95" style:family="paragraph" style:parent-style-name="Standard">
      <style:text-properties officeooo:rsid="00205883" officeooo:paragraph-rsid="00205883"/>
    </style:style>
    <style:style style:name="P96" style:family="paragraph" style:parent-style-name="Standard">
      <style:text-properties officeooo:rsid="002100cc" officeooo:paragraph-rsid="002100cc"/>
    </style:style>
    <style:style style:name="P97" style:family="paragraph" style:parent-style-name="Standard">
      <style:text-properties officeooo:rsid="00218927" officeooo:paragraph-rsid="00218927"/>
    </style:style>
    <style:style style:name="P98" style:family="paragraph" style:parent-style-name="Standard">
      <style:text-properties officeooo:rsid="00240789" officeooo:paragraph-rsid="00240789"/>
    </style:style>
    <style:style style:name="P99" style:family="paragraph" style:parent-style-name="Standard">
      <style:text-properties officeooo:rsid="002723c6" officeooo:paragraph-rsid="002723c6"/>
    </style:style>
    <style:style style:name="P100" style:family="paragraph" style:parent-style-name="Standard">
      <style:text-properties officeooo:rsid="002723c6" officeooo:paragraph-rsid="00ba45d2"/>
    </style:style>
    <style:style style:name="P101" style:family="paragraph" style:parent-style-name="Standard">
      <style:text-properties officeooo:rsid="00295d3c" officeooo:paragraph-rsid="00295d3c"/>
    </style:style>
    <style:style style:name="P102" style:family="paragraph" style:parent-style-name="Standard">
      <style:text-properties officeooo:rsid="00297239" officeooo:paragraph-rsid="00297239"/>
    </style:style>
    <style:style style:name="P103" style:family="paragraph" style:parent-style-name="Standard">
      <style:text-properties officeooo:rsid="002a8e34" officeooo:paragraph-rsid="002a8e34"/>
    </style:style>
    <style:style style:name="P104" style:family="paragraph" style:parent-style-name="Standard">
      <style:text-properties officeooo:rsid="002a8e34" officeooo:paragraph-rsid="00958025"/>
    </style:style>
    <style:style style:name="P105" style:family="paragraph" style:parent-style-name="Standard">
      <style:text-properties officeooo:rsid="002aff87" officeooo:paragraph-rsid="002aff87"/>
    </style:style>
    <style:style style:name="P106" style:family="paragraph" style:parent-style-name="Standard">
      <style:text-properties officeooo:rsid="002db03b" officeooo:paragraph-rsid="002db03b"/>
    </style:style>
    <style:style style:name="P107" style:family="paragraph" style:parent-style-name="Code">
      <style:text-properties fo:font-size="10pt" style:font-size-asian="10pt" style:font-size-complex="10pt"/>
    </style:style>
    <style:style style:name="P108" style:family="paragraph" style:parent-style-name="Standard">
      <style:text-properties fo:font-size="10pt" style:font-size-asian="10pt" style:font-size-complex="10pt"/>
    </style:style>
    <style:style style:name="P109"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110" style:family="paragraph" style:parent-style-name="Footnote">
      <style:text-properties officeooo:rsid="003610da" officeooo:paragraph-rsid="003610da"/>
    </style:style>
    <style:style style:name="P111" style:family="paragraph" style:parent-style-name="Standard">
      <style:text-properties officeooo:rsid="003610da" officeooo:paragraph-rsid="003610da"/>
    </style:style>
    <style:style style:name="P112" style:family="paragraph" style:parent-style-name="Standard">
      <style:text-properties officeooo:rsid="003638d9" officeooo:paragraph-rsid="003638d9"/>
    </style:style>
    <style:style style:name="P113" style:family="paragraph" style:parent-style-name="Standard">
      <style:text-properties officeooo:rsid="0036b7e2" officeooo:paragraph-rsid="0036b7e2"/>
    </style:style>
    <style:style style:name="P114" style:family="paragraph" style:parent-style-name="Standard">
      <style:text-properties officeooo:rsid="0037fcf9" officeooo:paragraph-rsid="0037fcf9"/>
    </style:style>
    <style:style style:name="P115" style:family="paragraph" style:parent-style-name="Standard">
      <style:text-properties officeooo:paragraph-rsid="003e5f69"/>
    </style:style>
    <style:style style:name="P116" style:family="paragraph" style:parent-style-name="Standard">
      <style:text-properties officeooo:rsid="003e5f69" officeooo:paragraph-rsid="003e5f69"/>
    </style:style>
    <style:style style:name="P117" style:family="paragraph" style:parent-style-name="Standard">
      <style:text-properties officeooo:rsid="003f2efd" officeooo:paragraph-rsid="003f2efd"/>
    </style:style>
    <style:style style:name="P118" style:family="paragraph" style:parent-style-name="Standard">
      <style:text-properties officeooo:rsid="004056e1" officeooo:paragraph-rsid="004056e1"/>
    </style:style>
    <style:style style:name="P119" style:family="paragraph" style:parent-style-name="Footnote">
      <style:text-properties officeooo:rsid="00443215" officeooo:paragraph-rsid="00443215"/>
    </style:style>
    <style:style style:name="P120" style:family="paragraph" style:parent-style-name="Standard">
      <style:text-properties officeooo:rsid="00443215" officeooo:paragraph-rsid="00443215"/>
    </style:style>
    <style:style style:name="P121" style:family="paragraph" style:parent-style-name="Standard">
      <style:text-properties officeooo:rsid="00418729" officeooo:paragraph-rsid="00418729"/>
    </style:style>
    <style:style style:name="P122" style:family="paragraph" style:parent-style-name="Standard">
      <style:paragraph-properties fo:margin-top="0in" fo:margin-bottom="0.139in" style:contextual-spacing="false"/>
      <style:text-properties officeooo:rsid="0045cd19" officeooo:paragraph-rsid="0045cd19"/>
    </style:style>
    <style:style style:name="P123" style:family="paragraph" style:parent-style-name="Standard">
      <style:paragraph-properties fo:margin-top="0in" fo:margin-bottom="0.139in" style:contextual-spacing="false"/>
      <style:text-properties officeooo:rsid="00488580" officeooo:paragraph-rsid="00488580"/>
    </style:style>
    <style:style style:name="P124" style:family="paragraph" style:parent-style-name="Standard">
      <style:text-properties officeooo:rsid="00488580" officeooo:paragraph-rsid="00488580"/>
    </style:style>
    <style:style style:name="P125" style:family="paragraph" style:parent-style-name="Standard">
      <style:text-properties officeooo:rsid="00489739" officeooo:paragraph-rsid="00489739"/>
    </style:style>
    <style:style style:name="P126" style:family="paragraph" style:parent-style-name="Standard">
      <style:text-properties officeooo:rsid="004a97d1" officeooo:paragraph-rsid="004a97d1"/>
    </style:style>
    <style:style style:name="P127" style:family="paragraph" style:parent-style-name="table_20_header1">
      <style:paragraph-properties fo:margin-top="0in" fo:margin-bottom="0in" style:contextual-spacing="false"/>
      <style:text-properties officeooo:paragraph-rsid="00641343"/>
    </style:style>
    <style:style style:name="P128" style:family="paragraph" style:parent-style-name="No_20_Spacing">
      <style:text-properties officeooo:paragraph-rsid="00641343"/>
    </style:style>
    <style:style style:name="P129" style:family="paragraph" style:parent-style-name="No_20_Spacing">
      <style:text-properties officeooo:paragraph-rsid="0064f246"/>
    </style:style>
    <style:style style:name="P130" style:family="paragraph" style:parent-style-name="table_20_header1">
      <style:text-properties officeooo:paragraph-rsid="0064f246"/>
    </style:style>
    <style:style style:name="P131" style:family="paragraph" style:parent-style-name="Standard">
      <style:text-properties officeooo:rsid="004ccd21" officeooo:paragraph-rsid="004ccd21"/>
    </style:style>
    <style:style style:name="P132" style:family="paragraph" style:parent-style-name="Standard">
      <style:paragraph-properties fo:margin-top="0in" fo:margin-bottom="0in" style:contextual-spacing="false"/>
      <style:text-properties officeooo:rsid="004ccd21" officeooo:paragraph-rsid="004ccd21"/>
    </style:style>
    <style:style style:name="P133" style:family="paragraph" style:parent-style-name="Standard">
      <style:text-properties officeooo:paragraph-rsid="004e1948"/>
    </style:style>
    <style:style style:name="P134" style:family="paragraph" style:parent-style-name="table_20_header1">
      <style:text-properties officeooo:paragraph-rsid="004e1948"/>
    </style:style>
    <style:style style:name="P135" style:family="paragraph" style:parent-style-name="Standard">
      <style:text-properties officeooo:rsid="0056fb2c" officeooo:paragraph-rsid="0056fb2c"/>
    </style:style>
    <style:style style:name="P136" style:family="paragraph" style:parent-style-name="Standard">
      <style:text-properties officeooo:rsid="0059dc84" officeooo:paragraph-rsid="0059dc84"/>
    </style:style>
    <style:style style:name="P137" style:family="paragraph" style:parent-style-name="Standard">
      <style:text-properties officeooo:rsid="005d5cbe" officeooo:paragraph-rsid="005d5cbe"/>
    </style:style>
    <style:style style:name="P138" style:family="paragraph" style:parent-style-name="Standard">
      <style:text-properties officeooo:paragraph-rsid="00612eb5"/>
    </style:style>
    <style:style style:name="P139" style:family="paragraph" style:parent-style-name="table_20_header1">
      <style:text-properties officeooo:paragraph-rsid="00612eb5"/>
    </style:style>
    <style:style style:name="P140" style:family="paragraph" style:parent-style-name="Standard">
      <style:text-properties officeooo:paragraph-rsid="00621e63"/>
    </style:style>
    <style:style style:name="P141" style:family="paragraph" style:parent-style-name="Standard">
      <style:text-properties officeooo:rsid="0065f641" officeooo:paragraph-rsid="0065f641"/>
    </style:style>
    <style:style style:name="P142" style:family="paragraph" style:parent-style-name="Standard">
      <style:text-properties officeooo:paragraph-rsid="0065fb7b"/>
    </style:style>
    <style:style style:name="P143" style:family="paragraph" style:parent-style-name="table_20_header1">
      <style:text-properties officeooo:paragraph-rsid="0065fb7b"/>
    </style:style>
    <style:style style:name="P144" style:family="paragraph" style:parent-style-name="Standard">
      <style:text-properties officeooo:rsid="006cedd5" officeooo:paragraph-rsid="006cedd5"/>
    </style:style>
    <style:style style:name="P145" style:family="paragraph" style:parent-style-name="Standard">
      <style:text-properties officeooo:paragraph-rsid="0095bbba"/>
    </style:style>
    <style:style style:name="P146" style:family="paragraph" style:parent-style-name="No_20_Spacing">
      <style:text-properties officeooo:rsid="0064f246" officeooo:paragraph-rsid="0064f246"/>
    </style:style>
    <style:style style:name="P14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8"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9"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5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351cd4" officeooo:paragraph-rsid="00351cd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51"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153"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154"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55"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156" style:family="paragraph" style:parent-style-name="Standard">
      <style:text-properties officeooo:rsid="002e9afc" officeooo:paragraph-rsid="002e9afc"/>
    </style:style>
    <style:style style:name="P157" style:family="paragraph" style:parent-style-name="Standard">
      <style:text-properties officeooo:rsid="0028a8b1" officeooo:paragraph-rsid="0028a8b1"/>
    </style:style>
    <style:style style:name="P158" style:family="paragraph" style:parent-style-name="Standard">
      <style:text-properties officeooo:rsid="0089d8c8" officeooo:paragraph-rsid="0089d8c8"/>
    </style:style>
    <style:style style:name="P159" style:family="paragraph" style:parent-style-name="Standard">
      <style:text-properties officeooo:paragraph-rsid="008f846f"/>
    </style:style>
    <style:style style:name="P160" style:family="paragraph" style:parent-style-name="Standard">
      <style:text-properties officeooo:rsid="008f846f" officeooo:paragraph-rsid="008f846f"/>
    </style:style>
    <style:style style:name="P161" style:family="paragraph" style:parent-style-name="Standard">
      <style:text-properties officeooo:rsid="00911ba6" officeooo:paragraph-rsid="00911ba6"/>
    </style:style>
    <style:style style:name="P162" style:family="paragraph" style:parent-style-name="Standard">
      <style:text-properties officeooo:rsid="009457da" officeooo:paragraph-rsid="009457da"/>
    </style:style>
    <style:style style:name="P163" style:family="paragraph" style:parent-style-name="Standard">
      <style:text-properties officeooo:rsid="0095bbba" officeooo:paragraph-rsid="0095bbba"/>
    </style:style>
    <style:style style:name="P164" style:family="paragraph" style:parent-style-name="Standard">
      <style:text-properties officeooo:rsid="0095e6ee" officeooo:paragraph-rsid="0095e6ee"/>
    </style:style>
    <style:style style:name="P165" style:family="paragraph" style:parent-style-name="No_20_Spacing">
      <style:text-properties fo:language="es" fo:country="CO"/>
    </style:style>
    <style:style style:name="P166" style:family="paragraph" style:parent-style-name="Standard">
      <style:paragraph-properties fo:text-align="center" style:justify-single-word="false"/>
      <style:text-properties style:font-name="Arial Black" fo:font-size="18pt" style:font-size-asian="18pt" style:font-size-complex="18pt"/>
    </style:style>
    <style:style style:name="P167" style:family="paragraph" style:parent-style-name="Standard">
      <style:paragraph-properties fo:text-align="center" style:justify-single-word="false"/>
      <style:text-properties style:font-name="Arial Black" fo:font-size="12pt" style:font-size-asian="12pt" style:font-size-complex="12pt"/>
    </style:style>
    <style:style style:name="P168"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169"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70"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171"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172" style:family="paragraph" style:parent-style-name="Standard">
      <style:text-properties style:font-name-complex="Times New Roman1"/>
    </style:style>
    <style:style style:name="P173" style:family="paragraph" style:parent-style-name="Code">
      <style:text-properties officeooo:rsid="009f62a9" officeooo:paragraph-rsid="009f62a9"/>
    </style:style>
    <style:style style:name="P174" style:family="paragraph" style:parent-style-name="Standard">
      <style:paragraph-properties fo:margin-top="0in" fo:margin-bottom="0.139in" style:contextual-spacing="false" fo:text-align="start" style:justify-single-word="false" fo:orphans="0" fo:widows="0"/>
      <style:text-properties fo:font-variant="normal" fo:text-transform="none" style:use-window-font-color="true" loext:opacity="0%" style:text-outline="false" style:text-line-through-style="none" style:text-line-through-type="none" style:font-name="Times New Roman" fo:font-size="11pt" fo:letter-spacing="normal"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2pt" style:language-complex="ar" style:country-complex="SA" style:font-style-complex="normal" style:font-weight-complex="normal" style:text-overline-style="none" style:text-overline-color="font-color"/>
    </style:style>
    <style:style style:name="P175" style:family="paragraph" style:parent-style-name="Standard">
      <style:paragraph-properties fo:margin-left="1.1252in" fo:margin-right="0in" fo:text-indent="-1.1252in" style:auto-text-indent="false"/>
      <style:text-properties style:text-underline-style="solid" style:text-underline-width="auto" style:text-underline-color="font-color"/>
    </style:style>
    <style:style style:name="P176" style:family="paragraph" style:parent-style-name="Code">
      <style:text-properties officeooo:rsid="00a87aaa" officeooo:paragraph-rsid="00a87aaa"/>
    </style:style>
    <style:style style:name="P177"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178"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179"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180"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181" style:family="paragraph" style:parent-style-name="Standard">
      <style:text-properties officeooo:rsid="00a7355e" officeooo:paragraph-rsid="00a7355e"/>
    </style:style>
    <style:style style:name="P182" style:family="paragraph" style:parent-style-name="Standard">
      <style:text-properties officeooo:rsid="00aaf10f" officeooo:paragraph-rsid="00aaf10f"/>
    </style:style>
    <style:style style:name="P183" style:family="paragraph" style:parent-style-name="Standard">
      <style:text-properties officeooo:paragraph-rsid="00aca690"/>
    </style:style>
    <style:style style:name="P184" style:family="paragraph" style:parent-style-name="Standard">
      <style:text-properties officeooo:rsid="00aca690" officeooo:paragraph-rsid="00aca690"/>
    </style:style>
    <style:style style:name="P185" style:family="paragraph" style:parent-style-name="Standard">
      <style:text-properties officeooo:rsid="00b08e41" officeooo:paragraph-rsid="00b08e41"/>
    </style:style>
    <style:style style:name="P186" style:family="paragraph" style:parent-style-name="Standard">
      <style:text-properties officeooo:rsid="00b25d99" officeooo:paragraph-rsid="00b08e41"/>
    </style:style>
    <style:style style:name="P187" style:family="paragraph" style:parent-style-name="Standard">
      <style:text-properties officeooo:paragraph-rsid="00b5ecdd"/>
    </style:style>
    <style:style style:name="P188" style:family="paragraph" style:parent-style-name="Standard">
      <style:text-properties officeooo:rsid="00b99e0c" officeooo:paragraph-rsid="00b99e0c"/>
    </style:style>
    <style:style style:name="P189" style:family="paragraph" style:parent-style-name="Routine_20_heading_20_3">
      <style:paragraph-properties fo:margin-left="0in" fo:margin-right="0in" fo:text-indent="0in" style:auto-text-indent="false"/>
      <style:text-properties officeooo:paragraph-rsid="00c0e189"/>
    </style:style>
    <style:style style:name="P190" style:family="paragraph" style:parent-style-name="Routine_20_heading_20_3">
      <style:paragraph-properties fo:margin-left="0in" fo:margin-right="0in" fo:text-indent="0in" style:auto-text-indent="false"/>
      <style:text-properties officeooo:paragraph-rsid="00c218ab"/>
    </style:style>
    <style:style style:name="P191" style:family="paragraph" style:parent-style-name="Code">
      <style:text-properties officeooo:rsid="00cbac2e" officeooo:paragraph-rsid="00cbac2e"/>
    </style:style>
    <style:style style:name="P192" style:family="paragraph" style:parent-style-name="Standard">
      <style:text-properties officeooo:rsid="00cbac2e" officeooo:paragraph-rsid="00cbac2e"/>
    </style:style>
    <style:style style:name="P193" style:family="paragraph" style:parent-style-name="Standard">
      <style:text-properties officeooo:rsid="00bbd7dd" officeooo:paragraph-rsid="00bbd7dd"/>
    </style:style>
    <style:style style:name="P194" style:family="paragraph" style:parent-style-name="Standard">
      <style:text-properties officeooo:rsid="00bf6991" officeooo:paragraph-rsid="00bf6991"/>
    </style:style>
    <style:style style:name="P195" style:family="paragraph" style:parent-style-name="Standard">
      <style:text-properties officeooo:rsid="00c22566" officeooo:paragraph-rsid="00c22566"/>
    </style:style>
    <style:style style:name="P196" style:family="paragraph" style:parent-style-name="Standard">
      <style:text-properties officeooo:paragraph-rsid="00c31517"/>
    </style:style>
    <style:style style:name="P197" style:family="paragraph" style:parent-style-name="Standard">
      <style:text-properties officeooo:paragraph-rsid="00c32655"/>
    </style:style>
    <style:style style:name="P198" style:family="paragraph" style:parent-style-name="Standard">
      <style:text-properties officeooo:rsid="00c32655" officeooo:paragraph-rsid="00c32655"/>
    </style:style>
    <style:style style:name="P199" style:family="paragraph" style:parent-style-name="Standard">
      <style:text-properties officeooo:rsid="00c5961f" officeooo:paragraph-rsid="00c5961f"/>
    </style:style>
    <style:style style:name="P200" style:family="paragraph" style:parent-style-name="Standard">
      <style:text-properties officeooo:rsid="00ca8e7d" officeooo:paragraph-rsid="00ca8e7d"/>
    </style:style>
    <style:style style:name="P201" style:family="paragraph" style:parent-style-name="Standard" style:master-page-name="">
      <loext:graphic-properties draw:fill="none"/>
      <style:paragraph-properties fo:margin-left="1.1252in" fo:margin-right="0in" fo:margin-top="0in" fo:margin-bottom="0.139in" style:contextual-spacing="false" fo:line-height="100%" fo:text-align="start" style:justify-single-word="false" fo:orphans="2" fo:widows="2" fo:hyphenation-ladder-count="no-limit" fo:text-indent="-1.1252in" style:auto-text-indent="false" style:page-number="auto" fo:background-color="transparent" style:writing-mode="lr-tb"/>
      <style:text-properties officeooo:rsid="00ca8e7d" officeooo:paragraph-rsid="00ca8e7d" fo:hyphenate="false" fo:hyphenation-remain-char-count="2" fo:hyphenation-push-char-count="2" loext:hyphenation-no-caps="false" loext:hyphenation-no-last-word="false" loext:hyphenation-word-char-count="no-limit" loext:hyphenation-zone="no-limit"/>
    </style:style>
    <style:style style:name="P202" style:family="paragraph" style:parent-style-name="Standard">
      <loext:graphic-properties draw:fill="none"/>
      <style:paragraph-properties fo:margin-left="1.1252in" fo:margin-right="0in" fo:margin-top="0in" fo:margin-bottom="0.139in" style:contextual-spacing="false" fo:line-height="100%" fo:text-align="start" style:justify-single-word="false" fo:orphans="2" fo:widows="2" fo:hyphenation-ladder-count="no-limit" fo:text-indent="-1.1252in" style:auto-text-indent="false" fo:background-color="transparent" style:writing-mode="lr-tb"/>
      <style:text-properties officeooo:rsid="00ca8e7d" officeooo:paragraph-rsid="00ca8e7d" fo:hyphenate="false" fo:hyphenation-remain-char-count="2" fo:hyphenation-push-char-count="2" loext:hyphenation-no-caps="false" loext:hyphenation-no-last-word="false" loext:hyphenation-word-char-count="no-limit" loext:hyphenation-zone="no-limit"/>
    </style:style>
    <style:style style:name="P203" style:family="paragraph" style:parent-style-name="table_20_header1">
      <style:text-properties officeooo:paragraph-rsid="00d1c77f"/>
    </style:style>
    <style:style style:name="P204"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205" style:family="paragraph" style:parent-style-name="Heading_20_1">
      <style:paragraph-properties fo:margin-top="0in" fo:margin-bottom="0.0835in" style:contextual-spacing="false" fo:break-before="page"/>
    </style:style>
    <style:style style:name="P206" style:family="paragraph" style:parent-style-name="Heading_20_1">
      <style:paragraph-properties fo:margin-top="0in" fo:margin-bottom="0.0835in" style:contextual-spacing="false" fo:break-before="page"/>
      <style:text-properties officeooo:rsid="00a3b66c" officeooo:paragraph-rsid="00a3b66c"/>
    </style:style>
    <style:style style:name="P207" style:family="paragraph" style:parent-style-name="Heading_20_1" style:list-style-name="">
      <style:paragraph-properties fo:line-height="100%" fo:text-align="start" style:justify-single-word="false" fo:keep-together="always" fo:orphans="2" fo:widows="2"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208" style:family="paragraph" style:parent-style-name="Heading_20_1">
      <style:paragraph-properties fo:break-before="page"/>
    </style:style>
    <style:style style:name="P209" style:family="paragraph" style:parent-style-name="Heading_20_1">
      <style:paragraph-properties fo:break-before="page"/>
      <style:text-properties officeooo:rsid="00489739" officeooo:paragraph-rsid="00489739"/>
    </style:style>
    <style:style style:name="P210" style:family="paragraph" style:parent-style-name="Heading_20_1">
      <style:paragraph-properties fo:break-before="page"/>
      <style:text-properties officeooo:paragraph-rsid="00489739"/>
    </style:style>
    <style:style style:name="P211" style:family="paragraph" style:parent-style-name="Heading_20_2">
      <style:text-properties officeooo:rsid="003610da" officeooo:paragraph-rsid="003610da"/>
    </style:style>
    <style:style style:name="P212" style:family="paragraph" style:parent-style-name="Heading_20_2">
      <style:paragraph-properties fo:margin-top="0in" fo:margin-bottom="0.0835in" style:contextual-spacing="false" fo:break-before="page"/>
    </style:style>
    <style:style style:name="P213" style:family="paragraph" style:parent-style-name="Heading_20_2">
      <style:text-properties officeooo:paragraph-rsid="0095bbba"/>
    </style:style>
    <style:style style:name="P214" style:family="paragraph" style:parent-style-name="Heading_20_3">
      <style:paragraph-properties fo:margin-top="0in" fo:margin-bottom="0.0835in" style:contextual-spacing="false" fo:break-before="page"/>
    </style:style>
    <style:style style:name="P215" style:family="paragraph" style:parent-style-name="List_20_Paragraph" style:list-style-name="WWNum11"/>
    <style:style style:name="P216" style:family="paragraph" style:parent-style-name="List_20_Paragraph" style:list-style-name="WWNum12"/>
    <style:style style:name="P217" style:family="paragraph" style:parent-style-name="List_20_Paragraph" style:list-style-name="WWNum4"/>
    <style:style style:name="P218" style:family="paragraph" style:parent-style-name="List_20_Paragraph" style:list-style-name="WWNum14"/>
    <style:style style:name="P219"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20" style:family="paragraph" style:parent-style-name="List_20_Paragraph" style:list-style-name="WWNum17"/>
    <style:style style:name="P221" style:family="paragraph" style:parent-style-name="List_20_Paragraph" style:list-style-name="WWNum18"/>
    <style:style style:name="P222" style:family="paragraph" style:parent-style-name="List_20_Paragraph" style:list-style-name="WWNum15"/>
    <style:style style:name="P223" style:family="paragraph" style:parent-style-name="List_20_Paragraph" style:list-style-name="WWNum9"/>
    <style:style style:name="P224" style:family="paragraph" style:parent-style-name="List_20_Paragraph" style:list-style-name="WWNum3"/>
    <style:style style:name="P225" style:family="paragraph" style:parent-style-name="List_20_Paragraph" style:list-style-name="WWNum7">
      <style:paragraph-properties fo:keep-with-next="always"/>
    </style:style>
    <style:style style:name="P226" style:family="paragraph" style:parent-style-name="List_20_Paragraph" style:list-style-name="WWNum7">
      <style:paragraph-properties fo:keep-together="always"/>
    </style:style>
    <style:style style:name="P227" style:family="paragraph" style:parent-style-name="List_20_Paragraph" style:list-style-name="WWNum8"/>
    <style:style style:name="P228" style:family="paragraph" style:parent-style-name="List_20_Paragraph" style:list-style-name="WWNum6"/>
    <style:style style:name="P229" style:family="paragraph" style:parent-style-name="No_20_Spacing">
      <style:text-properties fo:color="#000000" loext:opacity="100%" officeooo:rsid="00d1c77f" officeooo:paragraph-rsid="00d1c77f"/>
    </style:style>
    <style:style style:name="P230" style:family="paragraph" style:parent-style-name="No_20_Spacing">
      <style:text-properties fo:color="#000000" loext:opacity="100%"/>
    </style:style>
    <style:style style:name="P231"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232" style:family="paragraph" style:parent-style-name="Standard" style:list-style-name="L1">
      <style:text-properties officeooo:rsid="00c5961f" officeooo:paragraph-rsid="00c5961f"/>
    </style:style>
    <style:style style:name="P233" style:family="paragraph" style:parent-style-name="Standard" style:list-style-name="L1">
      <style:text-properties officeooo:rsid="00c708ba" officeooo:paragraph-rsid="00c708ba"/>
    </style:style>
    <style:style style:name="P234" style:family="paragraph" style:parent-style-name="Standard" style:list-style-name="L2">
      <style:text-properties officeooo:rsid="00443215" officeooo:paragraph-rsid="00443215"/>
    </style:style>
    <style:style style:name="P235" style:family="paragraph" style:parent-style-name="Standard" style:list-style-name="WWNum19"/>
    <style:style style:name="P236" style:family="paragraph" style:parent-style-name="Standard" style:list-style-name="L3">
      <style:text-properties officeooo:rsid="0048dfbf" officeooo:paragraph-rsid="0048dfbf"/>
    </style:style>
    <style:style style:name="P237" style:family="paragraph" style:parent-style-name="Standard" style:list-style-name="L3">
      <style:text-properties officeooo:rsid="0049d212" officeooo:paragraph-rsid="0049d212"/>
    </style:style>
    <style:style style:name="P238" style:family="paragraph" style:parent-style-name="Standard" style:list-style-name="L4">
      <style:paragraph-properties fo:margin-top="0in" fo:margin-bottom="0.139in" style:contextual-spacing="false"/>
      <style:text-properties officeooo:rsid="0045cd19" officeooo:paragraph-rsid="0045cd19"/>
    </style:style>
    <style:style style:name="P239" style:family="paragraph" style:parent-style-name="Standard" style:list-style-name="L4">
      <style:paragraph-properties fo:margin-top="0in" fo:margin-bottom="0.139in" style:contextual-spacing="false"/>
      <style:text-properties officeooo:rsid="00488580" officeooo:paragraph-rsid="00488580"/>
    </style:style>
    <style:style style:name="P240" style:family="paragraph">
      <style:paragraph-properties fo:text-align="center"/>
    </style:style>
    <style:style style:name="P241"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242" style:family="paragraph">
      <loext:graphic-properties draw:fill="none" draw:fill-color="#ffffff"/>
    </style:style>
    <style:style style:name="P243"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244" style:family="paragraph">
      <loext:graphic-properties draw:fill-color="#ffffff"/>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245" style:family="paragraph">
      <loext:graphic-properties draw:fill="none" draw:fill-color="#ffffff"/>
      <style:text-properties style:font-name="Loma" fo:font-size="20pt" fo:font-weight="bold" style:font-size-asian="20pt" style:font-weight-asian="bold" style:font-size-complex="20pt" style:font-weight-complex="bold"/>
    </style:style>
    <style:style style:name="P246" style:family="paragraph">
      <loext:graphic-properties draw:fill-color="#f10d0c"/>
      <style:paragraph-properties fo:text-align="center"/>
    </style:style>
    <style:style style:name="P247" style:family="paragraph">
      <loext:graphic-properties draw:fill-color="#ffffff"/>
      <style:paragraph-properties fo:text-align="center" style:writing-mode="lr-tb"/>
    </style:style>
    <style:style style:name="P248" style:family="paragraph">
      <style:paragraph-properties fo:text-align="center" style:writing-mode="lr-tb"/>
    </style:style>
    <style:style style:name="P24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style:style>
    <style:style style:name="T1" style:family="text">
      <style:text-properties style:text-position="super 58%"/>
    </style:style>
    <style:style style:name="T2" style:family="text">
      <style:text-properties fo:font-size="12pt" style:font-size-asian="12pt" style:font-size-complex="12pt"/>
    </style:style>
    <style:style style:name="T3" style:family="text">
      <style:text-properties fo:font-size="12pt" officeooo:rsid="0055034c"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variant="normal" fo:text-transform="none" fo:color="#212529" loext:opacity="100%" style:font-name="Nunito" fo:letter-spacing="normal"/>
    </style:style>
    <style:style style:name="T6" style:family="text">
      <style:text-properties fo:font-variant="normal" fo:text-transform="none" fo:letter-spacing="normal" fo:language="en" fo:country="US" style:letter-kerning="false" style:font-name-asian="Corbel2" style:language-asian="en" style:country-asian="US" style:font-size-complex="12pt" style:language-complex="ar" style:country-complex="SA"/>
    </style:style>
    <style:style style:name="T7" style:family="text">
      <style:text-properties fo:font-variant="normal" fo:text-transform="none" fo:letter-spacing="normal" fo:language="en" fo:country="US" officeooo:rsid="0055034c" style:letter-kerning="false" style:font-name-asian="Corbel2" style:language-asian="en" style:country-asian="US" style:font-size-complex="12pt" style:language-complex="ar" style:country-complex="SA"/>
    </style:style>
    <style:style style:name="T8" style:family="text">
      <style:text-properties style:font-size-complex="12pt"/>
    </style:style>
    <style:style style:name="T9" style:family="text">
      <style:text-properties style:font-size-complex="12pt" style:font-weight-complex="bold"/>
    </style:style>
    <style:style style:name="T10" style:family="text">
      <style:text-properties officeooo:rsid="0055034c" style:font-size-complex="12pt" style:font-weight-complex="bold"/>
    </style:style>
    <style:style style:name="T11" style:family="text">
      <style:text-properties fo:color="#000000" loext:opacity="100%"/>
    </style:style>
    <style:style style:name="T12" style:family="text">
      <style:text-properties fo:color="#000000" loext:opacity="100%" style:font-name="Consolas" fo:font-size="8pt" style:font-size-asian="8pt" style:font-name-complex="Consolas1" style:font-size-complex="8pt"/>
    </style:style>
    <style:style style:name="T13" style:family="text">
      <style:text-properties fo:color="#000000" loext:opacity="100%" fo:language="es" fo:country="CO"/>
    </style:style>
    <style:style style:name="T14" style:family="text">
      <style:text-properties fo:color="#000000" loext:opacity="100%" fo:language="en" fo:country="US" style:letter-kerning="false" style:font-name-asian="Corbel2" style:language-asian="en" style:country-asian="US" style:language-complex="ar" style:country-complex="SA"/>
    </style:style>
    <style:style style:name="T15" style:family="text">
      <style:text-properties fo:color="#000000" loext:opacity="100%" fo:language="en" fo:country="US" officeooo:rsid="0037fcf9" style:letter-kerning="false" style:font-name-asian="Corbel2" style:language-asian="en" style:country-asian="US" style:language-complex="ar" style:country-complex="SA"/>
    </style:style>
    <style:style style:name="T16" style:family="text">
      <style:text-properties fo:color="#000000" loext:opacity="100%" officeooo:rsid="004eec38"/>
    </style:style>
    <style:style style:name="T17" style:family="text">
      <style:text-properties fo:color="#000000" loext:opacity="100%" officeooo:rsid="005034e3"/>
    </style:style>
    <style:style style:name="T18" style:family="text">
      <style:text-properties fo:color="#000000" loext:opacity="100%" officeooo:rsid="00641343"/>
    </style:style>
    <style:style style:name="T19" style:family="text">
      <style:text-properties fo:color="#000000" loext:opacity="100%" officeooo:rsid="0064f246"/>
    </style:style>
    <style:style style:name="T20" style:family="text">
      <style:text-properties fo:color="#000000" loext:opacity="100%" officeooo:rsid="0095bbba"/>
    </style:style>
    <style:style style:name="T21" style:family="text">
      <style:text-properties fo:language="en" fo:country="US" style:letter-kerning="false" style:font-name-asian="Corbel2" style:language-asian="en" style:country-asian="US" style:language-complex="ar" style:country-complex="SA"/>
    </style:style>
    <style:style style:name="T22" style:family="text">
      <style:text-properties fo:language="en" fo:country="US" officeooo:rsid="0013a650" style:letter-kerning="false" style:font-name-asian="Corbel2" style:language-asian="en" style:country-asian="US" style:language-complex="ar" style:country-complex="SA"/>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style:font-name="Consolas" fo:font-size="8pt" style:font-size-asian="8pt" style:font-name-complex="Consolas1" style:font-size-complex="8pt"/>
    </style:style>
    <style:style style:name="T26" style:family="text">
      <style:text-properties fo:font-weight="bold" style:font-weight-asian="bold" style:font-weight-complex="bold"/>
    </style:style>
    <style:style style:name="T27" style:family="text">
      <style:text-properties fo:font-weight="bold" officeooo:rsid="00a87aaa" style:font-weight-asian="bold" style:font-weight-complex="bold"/>
    </style:style>
    <style:style style:name="T28" style:family="text">
      <style:text-properties fo:font-size="10pt" style:font-size-asian="10pt" style:font-size-complex="10pt"/>
    </style:style>
    <style:style style:name="T29" style:family="text">
      <style:text-properties fo:language="es" fo:country="CO"/>
    </style:style>
    <style:style style:name="T30" style:family="text">
      <style:text-properties style:font-name="Arial"/>
    </style:style>
    <style:style style:name="T31" style:family="text">
      <style:text-properties style:font-name-complex="Times New Roman1"/>
    </style:style>
    <style:style style:name="T32"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33" style:family="text">
      <style:text-properties fo:color="#2a00ff" loext:opacity="100%" style:font-name="Consolas" fo:font-size="8pt" style:font-size-asian="8pt" style:font-name-complex="Consolas1" style:font-size-complex="8pt"/>
    </style:style>
    <style:style style:name="T34" style:family="text">
      <style:text-properties officeooo:rsid="0013a650"/>
    </style:style>
    <style:style style:name="T35" style:family="text">
      <style:text-properties officeooo:rsid="001b0714"/>
    </style:style>
    <style:style style:name="T36" style:family="text">
      <style:text-properties officeooo:rsid="001ca0be"/>
    </style:style>
    <style:style style:name="T37" style:family="text">
      <style:text-properties officeooo:rsid="001f90f0"/>
    </style:style>
    <style:style style:name="T38" style:family="text">
      <style:text-properties officeooo:rsid="00205883"/>
    </style:style>
    <style:style style:name="T39" style:family="text">
      <style:text-properties officeooo:rsid="002100cc"/>
    </style:style>
    <style:style style:name="T40" style:family="text">
      <style:text-properties officeooo:rsid="00218927"/>
    </style:style>
    <style:style style:name="T41" style:family="text">
      <style:text-properties officeooo:rsid="00233bac"/>
    </style:style>
    <style:style style:name="T42" style:family="text">
      <style:text-properties officeooo:rsid="0028a8b1"/>
    </style:style>
    <style:style style:name="T43" style:family="text">
      <style:text-properties officeooo:rsid="00293c53"/>
    </style:style>
    <style:style style:name="T44" style:family="text">
      <style:text-properties officeooo:rsid="00297239"/>
    </style:style>
    <style:style style:name="T45" style:family="text">
      <style:text-properties officeooo:rsid="002a8e34"/>
    </style:style>
    <style:style style:name="T46" style:family="text">
      <style:text-properties fo:font-size="8pt" style:font-size-asian="8pt" style:font-size-complex="8pt"/>
    </style:style>
    <style:style style:name="T47" style:family="text">
      <style:text-properties officeooo:rsid="002ced7b"/>
    </style:style>
    <style:style style:name="T48" style:family="text">
      <style:text-properties officeooo:rsid="003180da"/>
    </style:style>
    <style:style style:name="T49" style:family="text">
      <style:text-properties officeooo:rsid="00324b21"/>
    </style:style>
    <style:style style:name="T50" style:family="text">
      <style:text-properties officeooo:rsid="003638d9"/>
    </style:style>
    <style:style style:name="T51" style:family="text">
      <style:text-properties officeooo:rsid="0038b2dc"/>
    </style:style>
    <style:style style:name="T52" style:family="text">
      <style:text-properties officeooo:rsid="003bf0a0"/>
    </style:style>
    <style:style style:name="T53" style:family="text">
      <style:text-properties officeooo:rsid="003e5f69"/>
    </style:style>
    <style:style style:name="T54" style:family="text">
      <style:text-properties officeooo:rsid="003f2efd"/>
    </style:style>
    <style:style style:name="T55" style:family="text">
      <style:text-properties officeooo:rsid="00418729"/>
    </style:style>
    <style:style style:name="T56" style:family="text">
      <style:text-properties officeooo:rsid="0042dac8"/>
    </style:style>
    <style:style style:name="T57" style:family="text">
      <style:text-properties officeooo:rsid="00443215"/>
    </style:style>
    <style:style style:name="T58" style:family="text">
      <style:text-properties officeooo:rsid="0046e89d"/>
    </style:style>
    <style:style style:name="T59" style:family="text">
      <style:text-properties officeooo:rsid="00488580"/>
    </style:style>
    <style:style style:name="T60" style:family="text">
      <style:text-properties style:font-name="Loma" fo:font-size="14pt" fo:font-weight="bold" style:font-size-asian="14pt" style:font-weight-asian="bold" style:font-size-complex="14pt" style:font-weight-complex="bold"/>
    </style:style>
    <style:style style:name="T61" style:family="text">
      <style:text-properties officeooo:rsid="0049d212"/>
    </style:style>
    <style:style style:name="T62" style:family="text">
      <style:text-properties officeooo:rsid="004a97d1"/>
    </style:style>
    <style:style style:name="T63" style:family="text">
      <style:text-properties officeooo:rsid="004bd34e"/>
    </style:style>
    <style:style style:name="T64" style:family="text">
      <style:text-properties officeooo:rsid="004ccd21"/>
    </style:style>
    <style:style style:name="T65" style:family="text">
      <style:text-properties officeooo:rsid="004e1948"/>
    </style:style>
    <style:style style:name="T66" style:family="text">
      <style:text-properties officeooo:rsid="004e8d79"/>
    </style:style>
    <style:style style:name="T67" style:family="text">
      <style:text-properties officeooo:rsid="004eec38"/>
    </style:style>
    <style:style style:name="T68" style:family="text">
      <style:text-properties officeooo:rsid="005034e3"/>
    </style:style>
    <style:style style:name="T69" style:family="text">
      <style:text-properties officeooo:rsid="0051fbfc"/>
    </style:style>
    <style:style style:name="T70" style:family="text">
      <style:text-properties officeooo:rsid="005341da"/>
    </style:style>
    <style:style style:name="T71" style:family="text">
      <style:text-properties officeooo:rsid="0055034c"/>
    </style:style>
    <style:style style:name="T72" style:family="text">
      <style:text-properties officeooo:rsid="0056f75f"/>
    </style:style>
    <style:style style:name="T73" style:family="text">
      <style:text-properties officeooo:rsid="00580052"/>
    </style:style>
    <style:style style:name="T74" style:family="text">
      <style:text-properties officeooo:rsid="005f587c"/>
    </style:style>
    <style:style style:name="T75" style:family="text">
      <style:text-properties officeooo:rsid="00612eb5"/>
    </style:style>
    <style:style style:name="T76" style:family="text">
      <style:text-properties officeooo:rsid="00621e63"/>
    </style:style>
    <style:style style:name="T77" style:family="text">
      <style:text-properties officeooo:rsid="0064f246"/>
    </style:style>
    <style:style style:name="T78" style:family="text">
      <style:text-properties officeooo:rsid="0065fb7b"/>
    </style:style>
    <style:style style:name="T79" style:family="text">
      <style:text-properties officeooo:rsid="0067ef9b"/>
    </style:style>
    <style:style style:name="T80" style:family="text">
      <style:text-properties officeooo:rsid="0068e067"/>
    </style:style>
    <style:style style:name="T81" style:family="text">
      <style:text-properties officeooo:rsid="006a0b3e"/>
    </style:style>
    <style:style style:name="T82" style:family="text">
      <style:text-properties officeooo:rsid="006ba6c0"/>
    </style:style>
    <style:style style:name="T83" style:family="text">
      <style:text-properties officeooo:rsid="006be127"/>
    </style:style>
    <style:style style:name="T84" style:family="text">
      <style:text-properties officeooo:rsid="006cedd5"/>
    </style:style>
    <style:style style:name="T85" style:family="text">
      <style:text-properties officeooo:rsid="006e0a73"/>
    </style:style>
    <style:style style:name="T86" style:family="text">
      <style:text-properties officeooo:rsid="008894f9"/>
    </style:style>
    <style:style style:name="T87" style:family="text">
      <style:text-properties officeooo:rsid="0089d00e"/>
    </style:style>
    <style:style style:name="T88" style:family="text">
      <style:text-properties officeooo:rsid="008b79b3"/>
    </style:style>
    <style:style style:name="T89" style:family="text">
      <style:text-properties officeooo:rsid="008f846f"/>
    </style:style>
    <style:style style:name="T90" style:family="text">
      <style:text-properties officeooo:rsid="0090e212"/>
    </style:style>
    <style:style style:name="T91" style:family="text">
      <style:text-properties officeooo:rsid="00911ba6"/>
    </style:style>
    <style:style style:name="T92" style:family="text">
      <style:text-properties officeooo:rsid="00920642"/>
    </style:style>
    <style:style style:name="T93" style:family="text">
      <style:text-properties officeooo:rsid="00958025"/>
    </style:style>
    <style:style style:name="T94" style:family="text">
      <style:text-properties officeooo:rsid="0095bbba"/>
    </style:style>
    <style:style style:name="T95" style:family="text">
      <style:text-properties officeooo:rsid="0095e6ee"/>
    </style:style>
    <style:style style:name="T96" style:family="text">
      <style:text-properties officeooo:rsid="00970722"/>
    </style:style>
    <style:style style:name="T97" style:family="text">
      <style:text-properties officeooo:rsid="0098dd52"/>
    </style:style>
    <style:style style:name="T98" style:family="text">
      <style:text-properties officeooo:rsid="009d72df"/>
    </style:style>
    <style:style style:name="T99" style:family="text">
      <style:text-properties officeooo:rsid="009f62a9"/>
    </style:style>
    <style:style style:name="T100" style:family="text">
      <style:text-properties officeooo:rsid="00a22ecf"/>
    </style:style>
    <style:style style:name="T101" style:family="text">
      <style:text-properties officeooo:rsid="00a2505c"/>
    </style:style>
    <style:style style:name="T102" style:family="text">
      <style:text-properties officeooo:rsid="00a7355e"/>
    </style:style>
    <style:style style:name="T103" style:family="text">
      <style:text-properties officeooo:rsid="00a87aaa"/>
    </style:style>
    <style:style style:name="T104" style:family="text">
      <style:text-properties officeooo:rsid="00aca690"/>
    </style:style>
    <style:style style:name="T105" style:family="text">
      <style:text-properties officeooo:rsid="00ae5085"/>
    </style:style>
    <style:style style:name="T106" style:family="text">
      <style:text-properties officeooo:rsid="00aeee6b"/>
    </style:style>
    <style:style style:name="T107" style:family="text">
      <style:text-properties officeooo:rsid="00b3ea00"/>
    </style:style>
    <style:style style:name="T108" style:family="text">
      <style:text-properties officeooo:rsid="00b5ecdd"/>
    </style:style>
    <style:style style:name="T109" style:family="text">
      <style:text-properties officeooo:rsid="00ba45d2"/>
    </style:style>
    <style:style style:name="T110" style:family="text">
      <style:text-properties style:font-name="Chandas" fo:font-weight="bold" officeooo:rsid="00aca690" style:font-weight-asian="bold" style:font-weight-complex="bold"/>
    </style:style>
    <style:style style:name="T111" style:family="text">
      <style:text-properties officeooo:rsid="00bf6991"/>
    </style:style>
    <style:style style:name="T112" style:family="text">
      <style:text-properties officeooo:rsid="00bff926"/>
    </style:style>
    <style:style style:name="T113" style:family="text">
      <style:text-properties officeooo:rsid="00c0b0fd"/>
    </style:style>
    <style:style style:name="T114" style:family="text">
      <style:text-properties officeooo:rsid="00c218ab"/>
    </style:style>
    <style:style style:name="T115" style:family="text">
      <style:text-properties officeooo:rsid="00c22566"/>
    </style:style>
    <style:style style:name="T116" style:family="text">
      <style:text-properties officeooo:rsid="00c31517"/>
    </style:style>
    <style:style style:name="T117" style:family="text">
      <style:text-properties officeooo:rsid="00c32655"/>
    </style:style>
    <style:style style:name="T118" style:family="text">
      <style:text-properties officeooo:rsid="00c5961f"/>
    </style:style>
    <style:style style:name="T119" style:family="text">
      <style:text-properties officeooo:rsid="00c708ba"/>
    </style:style>
    <style:style style:name="T120" style:family="text">
      <style:text-properties officeooo:rsid="00c8fdcb"/>
    </style:style>
    <style:style style:name="T121" style:family="text">
      <style:text-properties officeooo:rsid="00cbac2e"/>
    </style:style>
    <style:style style:name="T122" style:family="text">
      <style:text-properties officeooo:rsid="00cc348a"/>
    </style:style>
    <style:style style:name="T123" style:family="text">
      <style:text-properties officeooo:rsid="00ce2632"/>
    </style:style>
    <style:style style:name="T124" style:family="text">
      <style:text-properties officeooo:rsid="00d1c77f"/>
    </style:style>
    <style:style style:name="T125" style:family="text">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26" style:family="text">
      <style:text-properties style:font-name="Loma" fo:font-size="20pt" fo:font-weight="bold" style:font-size-asian="20pt" style:font-weight-asian="bold" style:font-size-complex="20pt"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598in" fo:border="0.06pt solid #0000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fo:padding="0.0598in" fo:border="0.06pt solid #0000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draw:textarea-vertical-align="middle" fo:min-height="0.53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ffff" draw:textarea-horizontal-align="justify" draw:textarea-vertical-align="middle" draw:auto-grow-height="false" fo:min-height="0.7319in" fo:min-width="1.756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draw:textarea-vertical-align="middle" fo:min-height="0.63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835in" svg:stroke-color="#f10d0c" draw:marker-start-width="0.2638in" draw:marker-end-width="0.2638in" draw:fill-color="#f10d0c" draw:textarea-horizontal-align="center" draw:textarea-vertical-align="middle" fo:padding-top="0.0417in" fo:padding-bottom="0.0417in" fo:padding-left="0.0417in" fo:padding-right="0.04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835in" svg:stroke-color="#f10d0c" draw:marker-start-width="0.2638in" draw:marker-end-width="0.2638in" draw:fill-color="#ffffff" draw:textarea-horizontal-align="justify" draw:textarea-vertical-align="middle" draw:auto-grow-height="false" fo:min-height="1.0016in" fo:min-width="0.9661in" fo:padding-top="0.0417in" fo:padding-bottom="0.0417in" fo:padding-left="0.0417in" fo:padding-right="0.0417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fill-color="#ffffff" draw:textarea-horizontal-align="justify" draw:textarea-vertical-align="middle" draw:auto-grow-height="false" fo:min-height="0.2764in" fo:min-width="0.5528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draw:textarea-vertical-align="middle" fo:min-height="0.39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35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11in" svg:stroke-color="#55308d" draw:marker-start-width="0.1555in" draw:marker-end-width="0.1555in" draw:fill="none" draw:fill-color="#ffffff" draw:textarea-vertical-align="top" fo:min-height="3.452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11in" svg:stroke-color="#55308d" draw:marker-start-width="0.1555in" draw:marker-end-width="0.1555in" draw:fill="none" draw:fill-color="#ffffff" draw:textarea-vertical-align="top" fo:min-height="2.5744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11in" svg:stroke-color="#55308d" draw:marker-start-width="0.1555in" draw:marker-end-width="0.1555in" draw:fill="none" draw:fill-color="#ffffff" draw:textarea-vertical-align="middle" fo:min-height="1.3063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
      <text:p text:style-name="P166"/>
      <text:p text:style-name="P166"/>
      <text:p text:style-name="P166"/>
      <text:p text:style-name="P166"/>
      <text:p text:style-name="P166">Pascal implementation</text:p>
      <text:p text:style-name="P166">The Pascal-P6 Compiler</text:p>
      <text:p text:style-name="P167">Scott A. Franco</text:p>
      <text:p text:style-name="P48"/>
      <text:p text:style-name="P48"><draw:frame draw:style-name="fr3" draw:name="Frame3" text:anchor-type="char" svg:width="2.1929in" draw:z-index="19"><draw:text-box fo:min-height="2.602in"><text:p text:style-name="Frame_20_contents"><draw:custom-shape text:anchor-type="paragraph" draw:z-index="20" draw:name="Shape 4" draw:style-name="gr7" draw:text-style-name="P247" svg:width="1.3661in" svg:height="1.4157in" svg:x="0.3453in" svg:y="0.49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2" draw:name="Text Frame 6" draw:style-name="gr5" draw:text-style-name="P245" svg:width="1.2197in" svg:height="0.6343in" svg:x="0.389in" svg:y="0.8819in"><draw:text-box><text:p text:style-name="P241"><text:span text:style-name="T126">Segfault</text:span></text:p></draw:text-box></draw:frame><draw:line text:anchor-type="paragraph" draw:z-index="21" draw:name="Line 1" draw:style-name="gr6" draw:text-style-name="P246" svg:x1="0.4866in" svg:y1="1.6622in" svg:x2="1.511in" svg:y2="0.6866in"><text:p/></draw:line></text:p></draw:text-box></draw:frame></text:p>
      <text:p text:style-name="P49"/>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4"><text:a xlink:type="simple" xlink:href="#__RefHeading___Toc15532_2478585429" text:style-name="Index_20_Link" text:visited-style-name="Index_20_Link">1<text:tab/>Introduction to Pascal-P6<text:tab/>11</text:a></text:p>
          <text:p text:style-name="P178"><text:a xlink:type="simple" xlink:href="#__RefHeading___Toc15538_2478585429" text:style-name="Index_20_Link" text:visited-style-name="Index_20_Link">1.1<text:tab/>History of Pascal-P6<text:tab/>13</text:a></text:p>
          <text:p text:style-name="P178"><text:a xlink:type="simple" xlink:href="#__RefHeading___Toc15544_2478585429" text:style-name="Index_20_Link" text:visited-style-name="Index_20_Link">1.2<text:tab/>Pascal-P6 as a strict ISO 7185 compiler<text:tab/>14</text:a></text:p>
          <text:p text:style-name="P178"><text:a xlink:type="simple" xlink:href="#__RefHeading___Toc15546_2478585429" text:style-name="Index_20_Link" text:visited-style-name="Index_20_Link">1.3<text:tab/>Pascal-P6 vs. FPC (Free pascal), Borland, or other dialects<text:tab/>15</text:a></text:p>
          <text:p text:style-name="P177"><text:a xlink:type="simple" xlink:href="#__RefHeading___Toc15548_2478585429" text:style-name="Index_20_Link" text:visited-style-name="Index_20_Link">2<text:tab/>The Pascal-P6 source language<text:tab/>17</text:a></text:p>
          <text:p text:style-name="P178"><text:a xlink:type="simple" xlink:href="#__RefHeading___Toc15550_2478585429" text:style-name="Index_20_Link" text:visited-style-name="Index_20_Link">2.1<text:tab/>Features of Pascaline NOT implemented in Pascal-P6<text:tab/>17</text:a></text:p>
          <text:p text:style-name="P178"><text:a xlink:type="simple" xlink:href="#__RefHeading___Toc15552_2478585429" text:style-name="Index_20_Link" text:visited-style-name="Index_20_Link">2.2<text:tab/>Pascal-P6 implementation details<text:tab/>18</text:a></text:p>
          <text:p text:style-name="P179"><text:a xlink:type="simple" xlink:href="#__RefHeading___Toc15554_2478585429" text:style-name="Index_20_Link" text:visited-style-name="Index_20_Link">2.2.1<text:tab/>Header files<text:tab/>18</text:a></text:p>
          <text:p text:style-name="P179"><text:a xlink:type="simple" xlink:href="#__RefHeading___Toc15556_2478585429" text:style-name="Index_20_Link" text:visited-style-name="Index_20_Link">2.2.2<text:tab/>Alternative header value input<text:tab/>19</text:a></text:p>
          <text:p text:style-name="P179"><text:a xlink:type="simple" xlink:href="#__RefHeading___Toc15558_2478585429" text:style-name="Index_20_Link" text:visited-style-name="Index_20_Link">2.2.3<text:tab/>Character escapes<text:tab/>19</text:a></text:p>
          <text:p text:style-name="P179"><text:a xlink:type="simple" xlink:href="#__RefHeading___Toc15560_2478585429" text:style-name="Index_20_Link" text:visited-style-name="Index_20_Link">2.2.4<text:tab/>Character sets<text:tab/>19</text:a></text:p>
          <text:p text:style-name="P179"><text:a xlink:type="simple" xlink:href="#__RefHeading___Toc15562_2478585429" text:style-name="Index_20_Link" text:visited-style-name="Index_20_Link">2.2.5<text:tab/>Modular structure<text:tab/>19</text:a></text:p>
          <text:p text:style-name="P179"><text:a xlink:type="simple" xlink:href="#__RefHeading___Toc15564_2478585429" text:style-name="Index_20_Link" text:visited-style-name="Index_20_Link">2.2.6<text:tab/>Implementation of Annexes G-O<text:tab/>19</text:a></text:p>
          <text:p text:style-name="P180"><text:a xlink:type="simple" xlink:href="#__RefHeading___Toc15568_2478585429" text:style-name="Index_20_Link" text:visited-style-name="Index_20_Link">2.2.6.1<text:tab/>Using externals<text:tab/>20</text:a></text:p>
          <text:p text:style-name="P177"><text:a xlink:type="simple" xlink:href="#__RefHeading___Toc15570_2478585429" text:style-name="Index_20_Link" text:visited-style-name="Index_20_Link">3<text:tab/>Using Pascal-P6<text:tab/>22</text:a></text:p>
          <text:p text:style-name="P178"><text:a xlink:type="simple" xlink:href="#__RefHeading___Toc15536_2478585429" text:style-name="Index_20_Link" text:visited-style-name="Index_20_Link">3.1<text:tab/>Getting Pascal-P6: Repositories for Pascal-P6<text:tab/>22</text:a></text:p>
          <text:p text:style-name="P178"><text:a xlink:type="simple" xlink:href="#__RefHeading___Toc15572_2478585429" text:style-name="Index_20_Link" text:visited-style-name="Index_20_Link">3.2<text:tab/>Configuring Pascal-P6<text:tab/>22</text:a></text:p>
          <text:p text:style-name="P178"><text:a xlink:type="simple" xlink:href="#__RefHeading___Toc15574_2478585429" text:style-name="Index_20_Link" text:visited-style-name="Index_20_Link">3.3<text:tab/>Compiling and running Pascal programs with Pascal-P6<text:tab/>23</text:a></text:p>
          <text:p text:style-name="P179"><text:a xlink:type="simple" xlink:href="#__RefHeading___Toc15578_2478585429" text:style-name="Index_20_Link" text:visited-style-name="Index_20_Link">3.3.1<text:tab/>Compiling on different run configurations<text:tab/>23</text:a></text:p>
          <text:p text:style-name="P178"><text:a xlink:type="simple" xlink:href="#__RefHeading___Toc30934_3822401252" text:style-name="Index_20_Link" text:visited-style-name="Index_20_Link">3.4<text:tab/>The basic programs<text:tab/>24</text:a></text:p>
          <text:p text:style-name="P179"><text:a xlink:type="simple" xlink:href="#__RefHeading___Toc21209_4012244740" text:style-name="Index_20_Link" text:visited-style-name="Index_20_Link"><text:tab/>pcom &lt;source file&gt; [&lt;intermediate file&gt;] [&lt;options&gt;]<text:tab/>24</text:a></text:p>
          <text:p text:style-name="P179"><text:a xlink:type="simple" xlink:href="#__RefHeading___Toc21211_4012244740" text:style-name="Index_20_Link" text:visited-style-name="Index_20_Link"><text:tab/>pint[t|g] &lt;intermediate file&gt; &lt;output file&gt; [&lt;options&gt;]<text:tab/>24</text:a></text:p>
          <text:p text:style-name="P179"><text:a xlink:type="simple" xlink:href="#__RefHeading___Toc21213_4012244740" text:style-name="Index_20_Link" text:visited-style-name="Index_20_Link"><text:tab/>pmach[t|g] &lt;binary deck&gt; &lt;output file&gt; [&lt;options&gt;]<text:tab/>24</text:a></text:p>
          <text:p text:style-name="P179"><text:a xlink:type="simple" xlink:href="#__RefHeading___Toc21215_4012244740" text:style-name="Index_20_Link" text:visited-style-name="Index_20_Link"><text:tab/>cmach[t|g] &lt;binary deck&gt; [&lt;options&gt;]<text:tab/>24</text:a></text:p>
          <text:p text:style-name="P179"><text:a xlink:type="simple" xlink:href="#__RefHeading___Toc21217_4012244740" text:style-name="Index_20_Link" text:visited-style-name="Index_20_Link"><text:tab/>pgen &lt;intermediate code&gt; &lt;assembly file&gt; [&lt;options&gt;]<text:tab/>24</text:a></text:p>
          <text:p text:style-name="P178"><text:a xlink:type="simple" xlink:href="#__RefHeading___Toc1840015_3010434754" text:style-name="Index_20_Link" text:visited-style-name="Index_20_Link">3.5<text:tab/>Compiler options<text:tab/>24</text:a></text:p>
          <text:p text:style-name="P179"><text:a xlink:type="simple" xlink:href="#__RefHeading___Toc15580_2478585429" text:style-name="Index_20_Link" text:visited-style-name="Index_20_Link">3.5.1<text:tab/>Option descriptions<text:tab/>26</text:a></text:p>
          <text:p text:style-name="P179"><text:a xlink:type="simple" xlink:href="#__RefHeading___Toc18874_1027172818" text:style-name="Index_20_Link" text:visited-style-name="Index_20_Link"><text:tab/>t+/- prttables+/- Print/don't print internal tables after each routine is compiled.<text:tab/>26</text:a></text:p>
          <text:p text:style-name="P179"><text:a xlink:type="simple" xlink:href="#__RefHeading___Toc18876_1027172818" text:style-name="Index_20_Link" text:visited-style-name="Index_20_Link"><text:tab/>l+/- list+/- List/don't list the source program during compilation.<text:tab/>27</text:a></text:p>
          <text:p text:style-name="P179"><text:a xlink:type="simple" xlink:href="#__RefHeading___Toc18878_1027172818" text:style-name="Index_20_Link" text:visited-style-name="Index_20_Link"><text:tab/>d+/- chk+/- Add extra code to check array bounds, subranges, etc.<text:tab/>27</text:a></text:p>
          <text:p text:style-name="P179"><text:a xlink:type="simple" xlink:href="#__RefHeading___Toc18880_1027172818" text:style-name="Index_20_Link" text:visited-style-name="Index_20_Link"><text:tab/>c+/- lstcod+/- Output/don't output intermediate code.<text:tab/>27</text:a></text:p>
          <text:p text:style-name="P179"><text:a xlink:type="simple" xlink:href="#__RefHeading___Toc18882_1027172818" text:style-name="Index_20_Link" text:visited-style-name="Index_20_Link"><text:tab/>v+/- chkvar+/- Check variant records.<text:tab/>27</text:a></text:p>
          <text:p text:style-name="P179"><text:a xlink:type="simple" xlink:href="#__RefHeading___Toc18884_1027172818" text:style-name="Index_20_Link" text:visited-style-name="Index_20_Link"><text:tab/>r+/+ reference+/- Perform reference checking.<text:tab/>27</text:a></text:p>
          <text:p text:style-name="P179"><text:a xlink:type="simple" xlink:href="#__RefHeading___Toc18886_1027172818" text:style-name="Index_20_Link" text:visited-style-name="Index_20_Link"><text:tab/>u+/- undestag+/- Perform Undiscriminated variant checking.<text:tab/>27</text:a></text:p>
          <text:p text:style-name="P179"><text:a xlink:type="simple" xlink:href="#__RefHeading___Toc18888_1027172818" text:style-name="Index_20_Link" text:visited-style-name="Index_20_Link"><text:tab/>s+/- iso7185+/- Restrict input language to ISO 7185 Pascal.<text:tab/>27</text:a></text:p>
          <text:p text:style-name="P179"><text:a xlink:type="simple" xlink:href="#__RefHeading___Toc18890_1027172818" text:style-name="Index_20_Link" text:visited-style-name="Index_20_Link"><text:tab/>x+/- prtlex+/- Dump lexical information during the run.<text:tab/>27</text:a></text:p>
          <text:p text:style-name="P179"><text:a xlink:type="simple" xlink:href="#__RefHeading___Toc18892_1027172818" text:style-name="Index_20_Link" text:visited-style-name="Index_20_Link"><text:tab/>b+/- prtlab+/- Print goto labels used at the end of the compile.<text:tab/>27</text:a></text:p>
          <text:p text:style-name="P179"><text:a xlink:type="simple" xlink:href="#__RefHeading___Toc18894_1027172818" text:style-name="Index_20_Link" text:visited-style-name="Index_20_Link"><text:tab/>y+/- prtdisplay+/- Dump display information at the end of the compile (symbols).<text:tab/>27</text:a></text:p>
          <text:p text:style-name="P179"><text:a xlink:type="simple" xlink:href="#__RefHeading___Toc18896_1027172818" text:style-name="Index_20_Link" text:visited-style-name="Index_20_Link"><text:tab/>i+/- varblk+/- Check VAR block violations.<text:tab/>27</text:a></text:p>
          <text:p text:style-name="P179"><text:a xlink:type="simple" xlink:href="#__RefHeading___Toc18898_1027172818" text:style-name="Index_20_Link" text:visited-style-name="Index_20_Link"><text:tab/>g+/- prtlabdef+/- Dump goto and other location labels at intermediate assembly time.<text:tab/>28</text:a></text:p>
          <text:p text:style-name="P179"><text:a xlink:type="simple" xlink:href="#__RefHeading___Toc18900_1027172818" text:style-name="Index_20_Link" text:visited-style-name="Index_20_Link"><text:tab/>h+/- sourceset+/- Add source line sets to code.<text:tab/>28</text:a></text:p>
          <text:p text:style-name="P179"><text:a xlink:type="simple" xlink:href="#__RefHeading___Toc18902_1027172818" text:style-name="Index_20_Link" text:visited-style-name="Index_20_Link"><text:tab/>n+/- recycle+/- Obey heap recycle requests. If false, no space is recycled.<text:tab/>28</text:a></text:p>
          <text:p text:style-name="P179"><text:a xlink:type="simple" xlink:href="#__RefHeading___Toc18904_1027172818" text:style-name="Index_20_Link" text:visited-style-name="Index_20_Link"><text:tab/>o+/- chkoverflo+/- Check for arithmetic overflow.<text:tab/>28</text:a></text:p>
          <text:p text:style-name="P179"><text:a xlink:type="simple" xlink:href="#__RefHeading___Toc18906_1027172818" text:style-name="Index_20_Link" text:visited-style-name="Index_20_Link"><text:tab/>p+/- chkreuse+/- Check for reuse of freed entry in heap space.<text:tab/>28</text:a></text:p>
          <text:p text:style-name="P179"><text:a xlink:type="simple" xlink:href="#__RefHeading___Toc18908_1027172818" text:style-name="Index_20_Link" text:visited-style-name="Index_20_Link"><text:tab/>m+/- breakheap+/- Modifies the p flag to flag the remaining space as occupied.<text:tab/>28</text:a></text:p>
          <text:p text:style-name="P179"><text:a xlink:type="simple" xlink:href="#__RefHeading___Toc18910_1027172818" text:style-name="Index_20_Link" text:visited-style-name="Index_20_Link"><text:soft-page-break/><text:tab/>q+/- chkundef+/- Check accesses to undefined memory.<text:tab/>28</text:a></text:p>
          <text:p text:style-name="P179"><text:a xlink:type="simple" xlink:href="#__RefHeading___Toc18912_1027172818" text:style-name="Index_20_Link" text:visited-style-name="Index_20_Link"><text:tab/>w+/- debug+/- Enter debug mode (pint only).<text:tab/>28</text:a></text:p>
          <text:p text:style-name="P179"><text:a xlink:type="simple" xlink:href="#__RefHeading___Toc18914_1027172818" text:style-name="Index_20_Link" text:visited-style-name="Index_20_Link"><text:tab/>a+/- debugflt+/- Enter debugger on fault<text:tab/>28</text:a></text:p>
          <text:p text:style-name="P179"><text:a xlink:type="simple" xlink:href="#__RefHeading___Toc18916_1027172818" text:style-name="Index_20_Link" text:visited-style-name="Index_20_Link"><text:tab/>f+/- debugsrc+/- Perform source level debugging.<text:tab/>28</text:a></text:p>
          <text:p text:style-name="P179"><text:a xlink:type="simple" xlink:href="#__RefHeading___Toc18918_1027172818" text:style-name="Index_20_Link" text:visited-style-name="Index_20_Link"><text:tab/>e+/- machdeck+/- Output binary deck from pint instead of running the assembled results.<text:tab/>29</text:a></text:p>
          <text:p text:style-name="P178"><text:a xlink:type="simple" xlink:href="#__RefHeading___Toc16093_623728502" text:style-name="Index_20_Link" text:visited-style-name="Index_20_Link">3.6<text:tab/>Errors<text:tab/>29</text:a></text:p>
          <text:p text:style-name="P179"><text:a xlink:type="simple" xlink:href="#__RefHeading___Toc16095_623728502" text:style-name="Index_20_Link" text:visited-style-name="Index_20_Link">3.6.1<text:tab/>Source errors<text:tab/>29</text:a></text:p>
          <text:p text:style-name="P179"><text:a xlink:type="simple" xlink:href="#__RefHeading___Toc16097_623728502" text:style-name="Index_20_Link" text:visited-style-name="Index_20_Link">3.6.2<text:tab/>Interpreter errors<text:tab/>29</text:a></text:p>
          <text:p text:style-name="P178"><text:a xlink:type="simple" xlink:href="#__RefHeading___Toc15582_2478585429%20Copy%201" text:style-name="Index_20_Link" text:visited-style-name="Index_20_Link">3.7<text:tab/>Runtime errors<text:tab/>30</text:a></text:p>
          <text:p text:style-name="P178"><text:a xlink:type="simple" xlink:href="#__RefHeading___Toc15582_2478585429" text:style-name="Index_20_Link" text:visited-style-name="Index_20_Link">3.8<text:tab/>Other operations<text:tab/>30</text:a></text:p>
          <text:p text:style-name="P178"><text:a xlink:type="simple" xlink:href="#__RefHeading___Toc15584_2478585429" text:style-name="Index_20_Link" text:visited-style-name="Index_20_Link">3.9<text:tab/>Reliance on Unix commands in the Pascal-P6 toolset<text:tab/>31</text:a></text:p>
          <text:p text:style-name="P178"><text:a xlink:type="simple" xlink:href="#__RefHeading___Toc15586_2478585429" text:style-name="Index_20_Link" text:visited-style-name="Index_20_Link">3.10<text:tab/>The “flip” command and line endings<text:tab/>31</text:a></text:p>
          <text:p text:style-name="P177"><text:a xlink:type="simple" xlink:href="#__RefHeading___Toc21289_4012244740" text:style-name="Index_20_Link" text:visited-style-name="Index_20_Link">4<text:tab/>pc: The Pascal-P6 compiler integrator<text:tab/>33</text:a></text:p>
          <text:p text:style-name="P178"><text:a xlink:type="simple" xlink:href="#__RefHeading___Toc21291_4012244740" text:style-name="Index_20_Link" text:visited-style-name="Index_20_Link">4.1<text:tab/>Overview<text:tab/>33</text:a></text:p>
          <text:p text:style-name="P178"><text:a xlink:type="simple" xlink:href="#__RefHeading___Toc21293_4012244740" text:style-name="Index_20_Link" text:visited-style-name="Index_20_Link">4.2<text:tab/>Command format<text:tab/>33</text:a></text:p>
          <text:p text:style-name="P178"><text:a xlink:type="simple" xlink:href="#__RefHeading___Toc21295_4012244740" text:style-name="Index_20_Link" text:visited-style-name="Index_20_Link">4.3<text:tab/>Operation<text:tab/>33</text:a></text:p>
          <text:p text:style-name="P178"><text:a xlink:type="simple" xlink:href="#__RefHeading___Toc21297_4012244740" text:style-name="Index_20_Link" text:visited-style-name="Index_20_Link">4.4<text:tab/>pc options<text:tab/>34</text:a></text:p>
          <text:p text:style-name="P179"><text:a xlink:type="simple" xlink:href="#__RefHeading___Toc21299_4012244740" text:style-name="Index_20_Link" text:visited-style-name="Index_20_Link">4.4.1<text:tab/>Option descriptions<text:tab/>34</text:a></text:p>
          <text:p text:style-name="P179"><text:a xlink:type="simple" xlink:href="#__RefHeading___Toc21301_4012244740" text:style-name="Index_20_Link" text:visited-style-name="Index_20_Link"><text:tab/>v+/- [n]verbose+/- Enable/disable verbose output.<text:tab/>34</text:a></text:p>
          <text:p text:style-name="P179"><text:a xlink:type="simple" xlink:href="#__RefHeading___Toc21303_4012244740" text:style-name="Index_20_Link" text:visited-style-name="Index_20_Link"><text:tab/>t+/- [n]tree+/- List/don't list the dependency tree.<text:tab/>34</text:a></text:p>
          <text:p text:style-name="P179"><text:a xlink:type="simple" xlink:href="#__RefHeading___Toc21305_4012244740" text:style-name="Index_20_Link" text:visited-style-name="Index_20_Link"><text:tab/>a+/- [n]action+/- List/don't list the actions being performed.<text:tab/>34</text:a></text:p>
          <text:p text:style-name="P179"><text:a xlink:type="simple" xlink:href="#__RefHeading___Toc21307_4012244740" text:style-name="Index_20_Link" text:visited-style-name="Index_20_Link"><text:tab/>d+/- [n]dry+/- Enable/disable dry run mode.<text:tab/>34</text:a></text:p>
          <text:p text:style-name="P179"><text:a xlink:type="simple" xlink:href="#__RefHeading___Toc21309_4012244740" text:style-name="Index_20_Link" text:visited-style-name="Index_20_Link"><text:tab/>r+/- [n]rebuild+/- Force/don't force rebuild of all files.<text:tab/>34</text:a></text:p>
          <text:p text:style-name="P178"><text:a xlink:type="simple" xlink:href="#__RefHeading___Toc21311_4012244740" text:style-name="Index_20_Link" text:visited-style-name="Index_20_Link">4.5<text:tab/>Run configuration options<text:tab/>34</text:a></text:p>
          <text:p text:style-name="P179"><text:a xlink:type="simple" xlink:href="#__RefHeading___Toc21313_4012244740" text:style-name="Index_20_Link" text:visited-style-name="Index_20_Link"><text:tab/> [n]pgen+/- Compile for native executable (default).<text:tab/>34</text:a></text:p>
          <text:p text:style-name="P179"><text:a xlink:type="simple" xlink:href="#__RefHeading___Toc21315_4012244740" text:style-name="Index_20_Link" text:visited-style-name="Index_20_Link"><text:tab/> [n]pint+/- Compile for the pint interpreter.<text:tab/>34</text:a></text:p>
          <text:p text:style-name="P179"><text:a xlink:type="simple" xlink:href="#__RefHeading___Toc21317_4012244740" text:style-name="Index_20_Link" text:visited-style-name="Index_20_Link"><text:tab/> [n]pmach+/- Compile for the pmach interpreter.<text:tab/>35</text:a></text:p>
          <text:p text:style-name="P179"><text:a xlink:type="simple" xlink:href="#__RefHeading___Toc21319_4012244740" text:style-name="Index_20_Link" text:visited-style-name="Index_20_Link"><text:tab/> [n]cmach+/- Compile for the cmach interpreter.<text:tab/>35</text:a></text:p>
          <text:p text:style-name="P179"><text:a xlink:type="simple" xlink:href="#__RefHeading___Toc21321_4012244740" text:style-name="Index_20_Link" text:visited-style-name="Index_20_Link"><text:tab/> [n]package+/- Compile for package mode.<text:tab/>35</text:a></text:p>
          <text:p text:style-name="P178"><text:a xlink:type="simple" xlink:href="#__RefHeading___Toc21323_4012244740" text:style-name="Index_20_Link" text:visited-style-name="Index_20_Link">4.6<text:tab/>Graphical and symbol options<text:tab/>35</text:a></text:p>
          <text:p text:style-name="P179"><text:a xlink:type="simple" xlink:href="#__RefHeading___Toc21325_4012244740" text:style-name="Index_20_Link" text:visited-style-name="Index_20_Link"><text:tab/>ktw+/- [n]keepterminalwindow+/- Keep/don't keep the terminal window open for graphical applications.<text:tab/>35</text:a></text:p>
          <text:p text:style-name="P179"><text:a xlink:type="simple" xlink:href="#__RefHeading___Toc21327_4012244740" text:style-name="Index_20_Link" text:visited-style-name="Index_20_Link"><text:tab/>dt+/- [n]defaultterminal+/- Default to terminal mode.<text:tab/>35</text:a></text:p>
          <text:p text:style-name="P179"><text:a xlink:type="simple" xlink:href="#__RefHeading___Toc21329_4012244740" text:style-name="Index_20_Link" text:visited-style-name="Index_20_Link"><text:tab/>dg+/- [n]defaultgraphical+/- Default to graphical mode.<text:tab/>35</text:a></text:p>
          <text:p text:style-name="P179"><text:a xlink:type="simple" xlink:href="#__RefHeading___Toc21331_4012244740" text:style-name="Index_20_Link" text:visited-style-name="Index_20_Link"><text:tab/>sc+/- [n]symcoff+/- Generate/don't generate COFF symbols in the binary.<text:tab/>35</text:a></text:p>
          <text:p text:style-name="P178"><text:a xlink:type="simple" xlink:href="#__RefHeading___Toc21333_4012244740" text:style-name="Index_20_Link" text:visited-style-name="Index_20_Link">4.7<text:tab/>Module path option<text:tab/>35</text:a></text:p>
          <text:p text:style-name="P179"><text:a xlink:type="simple" xlink:href="#__RefHeading___Toc21335_4012244740" text:style-name="Index_20_Link" text:visited-style-name="Index_20_Link"><text:tab/>mp=&lt;path&gt; modulepath=&lt;path&gt; Specify the module search path.<text:tab/>35</text:a></text:p>
          <text:p text:style-name="P178"><text:a xlink:type="simple" xlink:href="#__RefHeading___Toc21337_4012244740" text:style-name="Index_20_Link" text:visited-style-name="Index_20_Link">4.8<text:tab/>Compiler passthrough options<text:tab/>35</text:a></text:p>
          <text:p text:style-name="P179"><text:a xlink:type="simple" xlink:href="#__RefHeading___Toc21339_4012244740" text:style-name="Index_20_Link" text:visited-style-name="Index_20_Link"><text:tab/> [n]prtlab+/- See the compiler options.<text:tab/>36</text:a></text:p>
          <text:p text:style-name="P179"><text:a xlink:type="simple" xlink:href="#__RefHeading___Toc21341_4012244740" text:style-name="Index_20_Link" text:visited-style-name="Index_20_Link"><text:tab/> [n]lstcod+/- See the compiler options.<text:tab/>36</text:a></text:p>
          <text:p text:style-name="P179"><text:a xlink:type="simple" xlink:href="#__RefHeading___Toc21343_4012244740" text:style-name="Index_20_Link" text:visited-style-name="Index_20_Link"><text:tab/> [n]chk+/- See the compiler options.<text:tab/>36</text:a></text:p>
          <text:p text:style-name="P179"><text:a xlink:type="simple" xlink:href="#__RefHeading___Toc21345_4012244740" text:style-name="Index_20_Link" text:visited-style-name="Index_20_Link"><text:tab/> [n]prtlabdef+/- See the compiler options.<text:tab/>36</text:a></text:p>
          <text:p text:style-name="P179"><text:a xlink:type="simple" xlink:href="#__RefHeading___Toc21347_4012244740" text:style-name="Index_20_Link" text:visited-style-name="Index_20_Link"><text:tab/> [n]sourceset+/- See the compiler options.<text:tab/>36</text:a></text:p>
          <text:p text:style-name="P179"><text:a xlink:type="simple" xlink:href="#__RefHeading___Toc21349_4012244740" text:style-name="Index_20_Link" text:visited-style-name="Index_20_Link"><text:tab/> [n]varblk+/- See the compiler options.<text:tab/>36</text:a></text:p>
          <text:p text:style-name="P179"><text:a xlink:type="simple" xlink:href="#__RefHeading___Toc21351_4012244740" text:style-name="Index_20_Link" text:visited-style-name="Index_20_Link"><text:tab/> [n]experror+/- See the compiler options.<text:tab/>36</text:a></text:p>
          <text:p text:style-name="P179"><text:a xlink:type="simple" xlink:href="#__RefHeading___Toc21353_4012244740" text:style-name="Index_20_Link" text:visited-style-name="Index_20_Link"><text:tab/> [n]echoline+/- See the compiler options.<text:tab/>36</text:a></text:p>
          <text:p text:style-name="P179"><text:a xlink:type="simple" xlink:href="#__RefHeading___Toc21355_4012244740" text:style-name="Index_20_Link" text:visited-style-name="Index_20_Link"><text:tab/>l+/- [n]list+/- See the compiler options.<text:tab/>36</text:a></text:p>
          <text:p text:style-name="P179"><text:a xlink:type="simple" xlink:href="#__RefHeading___Toc21357_4012244740" text:style-name="Index_20_Link" text:visited-style-name="Index_20_Link"><text:tab/> [n]breakheap+/- See the compiler options.<text:tab/>36</text:a></text:p>
          <text:p text:style-name="P179"><text:a xlink:type="simple" xlink:href="#__RefHeading___Toc21359_4012244740" text:style-name="Index_20_Link" text:visited-style-name="Index_20_Link"><text:soft-page-break/><text:tab/> [n]recycle+/- See the compiler options.<text:tab/>36</text:a></text:p>
          <text:p text:style-name="P179"><text:a xlink:type="simple" xlink:href="#__RefHeading___Toc21361_4012244740" text:style-name="Index_20_Link" text:visited-style-name="Index_20_Link"><text:tab/>o+/- [n]chkoverflo+/- See the compiler options.<text:tab/>36</text:a></text:p>
          <text:p text:style-name="P179"><text:a xlink:type="simple" xlink:href="#__RefHeading___Toc21363_4012244740" text:style-name="Index_20_Link" text:visited-style-name="Index_20_Link"><text:tab/> [n]chkreuse+/- See the compiler options.<text:tab/>36</text:a></text:p>
          <text:p text:style-name="P179"><text:a xlink:type="simple" xlink:href="#__RefHeading___Toc21365_4012244740" text:style-name="Index_20_Link" text:visited-style-name="Index_20_Link"><text:tab/> [n]chkundef+/- See the compiler options.<text:tab/>36</text:a></text:p>
          <text:p text:style-name="P179"><text:a xlink:type="simple" xlink:href="#__RefHeading___Toc21367_4012244740" text:style-name="Index_20_Link" text:visited-style-name="Index_20_Link"><text:tab/> [n]reference+/- See the compiler options.<text:tab/>36</text:a></text:p>
          <text:p text:style-name="P179"><text:a xlink:type="simple" xlink:href="#__RefHeading___Toc21369_4012244740" text:style-name="Index_20_Link" text:visited-style-name="Index_20_Link"><text:tab/>s+/- [n]iso7185+/- See the compiler options.<text:tab/>36</text:a></text:p>
          <text:p text:style-name="P179"><text:a xlink:type="simple" xlink:href="#__RefHeading___Toc21371_4012244740" text:style-name="Index_20_Link" text:visited-style-name="Index_20_Link"><text:tab/> [n]prttables+/- See the compiler options.<text:tab/>36</text:a></text:p>
          <text:p text:style-name="P179"><text:a xlink:type="simple" xlink:href="#__RefHeading___Toc21373_4012244740" text:style-name="Index_20_Link" text:visited-style-name="Index_20_Link"><text:tab/> [n]undestag+/- See the compiler options.<text:tab/>36</text:a></text:p>
          <text:p text:style-name="P179"><text:a xlink:type="simple" xlink:href="#__RefHeading___Toc21375_4012244740" text:style-name="Index_20_Link" text:visited-style-name="Index_20_Link"><text:tab/> [n]chkvar+/- See the compiler options.<text:tab/>36</text:a></text:p>
          <text:p text:style-name="P179"><text:a xlink:type="simple" xlink:href="#__RefHeading___Toc21377_4012244740" text:style-name="Index_20_Link" text:visited-style-name="Index_20_Link"><text:tab/> [n]debug+/- See the compiler options.<text:tab/>36</text:a></text:p>
          <text:p text:style-name="P179"><text:a xlink:type="simple" xlink:href="#__RefHeading___Toc21379_4012244740" text:style-name="Index_20_Link" text:visited-style-name="Index_20_Link"><text:tab/> [n]debugflt+/- See the compiler options.<text:tab/>36</text:a></text:p>
          <text:p text:style-name="P179"><text:a xlink:type="simple" xlink:href="#__RefHeading___Toc21381_4012244740" text:style-name="Index_20_Link" text:visited-style-name="Index_20_Link"><text:tab/>f+/- [n]debugsrc+/- See the compiler options.<text:tab/>36</text:a></text:p>
          <text:p text:style-name="P179"><text:a xlink:type="simple" xlink:href="#__RefHeading___Toc21383_4012244740" text:style-name="Index_20_Link" text:visited-style-name="Index_20_Link"><text:tab/> [n]prtlex+/- See the compiler options.<text:tab/>36</text:a></text:p>
          <text:p text:style-name="P179"><text:a xlink:type="simple" xlink:href="#__RefHeading___Toc21385_4012244740" text:style-name="Index_20_Link" text:visited-style-name="Index_20_Link"><text:tab/> [n]prtdisplay+/- See the compiler options.<text:tab/>36</text:a></text:p>
          <text:p text:style-name="P179"><text:a xlink:type="simple" xlink:href="#__RefHeading___Toc21387_4012244740" text:style-name="Index_20_Link" text:visited-style-name="Index_20_Link"><text:tab/> [n]lineinfo+/- ` See the compiler options.<text:tab/>36</text:a></text:p>
          <text:p text:style-name="P179"><text:a xlink:type="simple" xlink:href="#__RefHeading___Toc21389_4012244740" text:style-name="Index_20_Link" text:visited-style-name="Index_20_Link"><text:tab/> [n]mrkasslin+/- See the compiler options.<text:tab/>36</text:a></text:p>
          <text:p text:style-name="P178"><text:a xlink:type="simple" xlink:href="#__RefHeading___Toc21391_4012244740" text:style-name="Index_20_Link" text:visited-style-name="Index_20_Link">4.9<text:tab/>Instruction files<text:tab/>36</text:a></text:p>
          <text:p text:style-name="P179"><text:a xlink:type="simple" xlink:href="#__RefHeading___Toc21393_4012244740" text:style-name="Index_20_Link" text:visited-style-name="Index_20_Link">4.9.1<text:tab/>Instruction file search order<text:tab/>36</text:a></text:p>
          <text:p text:style-name="P179"><text:a xlink:type="simple" xlink:href="#__RefHeading___Toc21395_4012244740" text:style-name="Index_20_Link" text:visited-style-name="Index_20_Link">4.9.2<text:tab/>Instruction file format<text:tab/>37</text:a></text:p>
          <text:p text:style-name="P179"><text:a xlink:type="simple" xlink:href="#__RefHeading___Toc21397_4012244740" text:style-name="Index_20_Link" text:visited-style-name="Index_20_Link">4.9.3<text:tab/>Instruction file commands<text:tab/>37</text:a></text:p>
          <text:p text:style-name="P179"><text:a xlink:type="simple" xlink:href="#__RefHeading___Toc21399_4012244740" text:style-name="Index_20_Link" text:visited-style-name="Index_20_Link"><text:tab/>modulepath &lt;path&gt; Set the module search path.<text:tab/>37</text:a></text:p>
          <text:p text:style-name="P179"><text:a xlink:type="simple" xlink:href="#__RefHeading___Toc21401_4012244740" text:style-name="Index_20_Link" text:visited-style-name="Index_20_Link"><text:tab/>exclude &lt;path&gt; [&lt;path&gt;]... Exclude paths from recompilation.<text:tab/>37</text:a></text:p>
          <text:p text:style-name="P179"><text:a xlink:type="simple" xlink:href="#__RefHeading___Toc21403_4012244740" text:style-name="Index_20_Link" text:visited-style-name="Index_20_Link"><text:tab/>package &lt;name&gt; = &lt;file&gt; [&lt;file&gt;]... Declare a packaged library.<text:tab/>37</text:a></text:p>
          <text:p text:style-name="P179"><text:a xlink:type="simple" xlink:href="#__RefHeading___Toc21405_4012244740" text:style-name="Index_20_Link" text:visited-style-name="Index_20_Link"><text:tab/>standard / nstandard Enable/disable ISO 7185 standard mode.<text:tab/>37</text:a></text:p>
          <text:p text:style-name="P179"><text:a xlink:type="simple" xlink:href="#__RefHeading___Toc21407_4012244740" text:style-name="Index_20_Link" text:visited-style-name="Index_20_Link"><text:tab/>overflow / noverflow Enable/disable overflow checking.<text:tab/>37</text:a></text:p>
          <text:p text:style-name="P179"><text:a xlink:type="simple" xlink:href="#__RefHeading___Toc21409_4012244740" text:style-name="Index_20_Link" text:visited-style-name="Index_20_Link"><text:tab/>refer / nrefer Enable/disable reference checking.<text:tab/>37</text:a></text:p>
          <text:p text:style-name="P179"><text:a xlink:type="simple" xlink:href="#__RefHeading___Toc21411_4012244740" text:style-name="Index_20_Link" text:visited-style-name="Index_20_Link"><text:tab/>keepterminalwindow / nkeepterminalwindow Keep/don't keep terminal window for graphical applications.<text:tab/>37</text:a></text:p>
          <text:p text:style-name="P179"><text:a xlink:type="simple" xlink:href="#__RefHeading___Toc21413_4012244740" text:style-name="Index_20_Link" text:visited-style-name="Index_20_Link"><text:tab/>symcoff / nosymcoff Generate/don't generate COFF symbols.<text:tab/>37</text:a></text:p>
          <text:p text:style-name="P179"><text:a xlink:type="simple" xlink:href="#__RefHeading___Toc21415_4012244740" text:style-name="Index_20_Link" text:visited-style-name="Index_20_Link">4.9.4<text:tab/>Example instruction file<text:tab/>38</text:a></text:p>
          <text:p text:style-name="P178"><text:a xlink:type="simple" xlink:href="#__RefHeading___Toc21417_4012244740" text:style-name="Index_20_Link" text:visited-style-name="Index_20_Link">4.10<text:tab/>File types<text:tab/>38</text:a></text:p>
          <text:p text:style-name="P178"><text:a xlink:type="simple" xlink:href="#__RefHeading___Toc21419_4012244740" text:style-name="Index_20_Link" text:visited-style-name="Index_20_Link">4.11<text:tab/>Examples<text:tab/>38</text:a></text:p>
          <text:p text:style-name="P177"><text:a xlink:type="simple" xlink:href="#__RefHeading___Toc90001_9999999999" text:style-name="Index_20_Link" text:visited-style-name="Index_20_Link">5<text:tab/>Using VSCode with Pascal-P6<text:tab/>40</text:a></text:p>
          <text:p text:style-name="P178"><text:a xlink:type="simple" xlink:href="#__RefHeading___Toc90002_9999999999" text:style-name="Index_20_Link" text:visited-style-name="Index_20_Link">5.1<text:tab/>Installing the Pascaline extension<text:tab/>40</text:a></text:p>
          <text:p text:style-name="P178"><text:a xlink:type="simple" xlink:href="#__RefHeading___Toc90003_9999999999" text:style-name="Index_20_Link" text:visited-style-name="Index_20_Link">5.2<text:tab/>Editing Pascal programs<text:tab/>40</text:a></text:p>
          <text:p text:style-name="P179"><text:a xlink:type="simple" xlink:href="#__RefHeading___Toc90004_9999999999" text:style-name="Index_20_Link" text:visited-style-name="Index_20_Link">5.2.1<text:tab/>Syntax highlighting<text:tab/>40</text:a></text:p>
          <text:p text:style-name="P179"><text:a xlink:type="simple" xlink:href="#__RefHeading___Toc90005_9999999999" text:style-name="Index_20_Link" text:visited-style-name="Index_20_Link">5.2.2<text:tab/>Code completion<text:tab/>40</text:a></text:p>
          <text:p text:style-name="P179"><text:a xlink:type="simple" xlink:href="#__RefHeading___Toc90006_9999999999" text:style-name="Index_20_Link" text:visited-style-name="Index_20_Link">5.2.3<text:tab/>Signature help<text:tab/>41</text:a></text:p>
          <text:p text:style-name="P179"><text:a xlink:type="simple" xlink:href="#__RefHeading___Toc90007_9999999999" text:style-name="Index_20_Link" text:visited-style-name="Index_20_Link">5.2.4<text:tab/>Hover information<text:tab/>41</text:a></text:p>
          <text:p text:style-name="P179"><text:a xlink:type="simple" xlink:href="#__RefHeading___Toc90008_9999999999" text:style-name="Index_20_Link" text:visited-style-name="Index_20_Link">5.2.5<text:tab/>Go-to-definition<text:tab/>41</text:a></text:p>
          <text:p text:style-name="P179"><text:a xlink:type="simple" xlink:href="#__RefHeading___Toc90009_9999999999" text:style-name="Index_20_Link" text:visited-style-name="Index_20_Link">5.2.6<text:tab/>Find all references<text:tab/>41</text:a></text:p>
          <text:p text:style-name="P179"><text:a xlink:type="simple" xlink:href="#__RefHeading___Toc90010_9999999999" text:style-name="Index_20_Link" text:visited-style-name="Index_20_Link">5.2.7<text:tab/>Document outline<text:tab/>41</text:a></text:p>
          <text:p text:style-name="P179"><text:a xlink:type="simple" xlink:href="#__RefHeading___Toc90011_9999999999" text:style-name="Index_20_Link" text:visited-style-name="Index_20_Link">5.2.8<text:tab/>Call hierarchy<text:tab/>41</text:a></text:p>
          <text:p text:style-name="P178"><text:a xlink:type="simple" xlink:href="#__RefHeading___Toc90012_9999999999" text:style-name="Index_20_Link" text:visited-style-name="Index_20_Link">5.3<text:tab/>Compiling Pascal programs<text:tab/>41</text:a></text:p>
          <text:p text:style-name="P179"><text:a xlink:type="simple" xlink:href="#__RefHeading___Toc90013_9999999999" text:style-name="Index_20_Link" text:visited-style-name="Index_20_Link">5.3.1<text:tab/>Diagnostics and error checking<text:tab/>42</text:a></text:p>
          <text:p text:style-name="P179"><text:a xlink:type="simple" xlink:href="#__RefHeading___Toc90014_9999999999" text:style-name="Index_20_Link" text:visited-style-name="Index_20_Link">5.3.2<text:tab/>Compiling from the integrated terminal<text:tab/>42</text:a></text:p>
          <text:p text:style-name="P178"><text:a xlink:type="simple" xlink:href="#__RefHeading___Toc90015_9999999999" text:style-name="Index_20_Link" text:visited-style-name="Index_20_Link">5.4<text:tab/>Debugging Pascal programs<text:tab/>42</text:a></text:p>
          <text:p text:style-name="P179"><text:a xlink:type="simple" xlink:href="#__RefHeading___Toc90016_9999999999" text:style-name="Index_20_Link" text:visited-style-name="Index_20_Link">5.4.1<text:tab/>Launch configuration<text:tab/>42</text:a></text:p>
          <text:p text:style-name="P179"><text:a xlink:type="simple" xlink:href="#__RefHeading___Toc90017_9999999999" text:style-name="Index_20_Link" text:visited-style-name="Index_20_Link">5.4.2<text:tab/>Setting breakpoints<text:tab/>43</text:a></text:p>
          <text:p text:style-name="P179"><text:a xlink:type="simple" xlink:href="#__RefHeading___Toc90018_9999999999" text:style-name="Index_20_Link" text:visited-style-name="Index_20_Link"><text:soft-page-break/>5.4.3<text:tab/>Stepping through code<text:tab/>43</text:a></text:p>
          <text:p text:style-name="P179"><text:a xlink:type="simple" xlink:href="#__RefHeading___Toc90019_9999999999" text:style-name="Index_20_Link" text:visited-style-name="Index_20_Link">5.4.4<text:tab/>Inspecting variables<text:tab/>43</text:a></text:p>
          <text:p text:style-name="P179"><text:a xlink:type="simple" xlink:href="#__RefHeading___Toc90020_9999999999" text:style-name="Index_20_Link" text:visited-style-name="Index_20_Link">5.4.5<text:tab/>Evaluating expressions<text:tab/>43</text:a></text:p>
          <text:p text:style-name="P179"><text:a xlink:type="simple" xlink:href="#__RefHeading___Toc90021_9999999999" text:style-name="Index_20_Link" text:visited-style-name="Index_20_Link">5.4.6<text:tab/>Call stack<text:tab/>44</text:a></text:p>
          <text:p text:style-name="P178"><text:a xlink:type="simple" xlink:href="#__RefHeading___Toc90022_9999999999" text:style-name="Index_20_Link" text:visited-style-name="Index_20_Link">5.5<text:tab/>Viewing documentation<text:tab/>44</text:a></text:p>
          <text:p text:style-name="P178"><text:a xlink:type="simple" xlink:href="#__RefHeading___Toc90023_9999999999" text:style-name="Index_20_Link" text:visited-style-name="Index_20_Link">5.6<text:tab/>Extension settings<text:tab/>44</text:a></text:p>
          <text:p text:style-name="P177"><text:a xlink:type="simple" xlink:href="#__RefHeading___Toc21219_4012244740" text:style-name="Index_20_Link" text:visited-style-name="Index_20_Link">6<text:tab/>p2c: The Pascal to C translator<text:tab/>45</text:a></text:p>
          <text:p text:style-name="P178"><text:a xlink:type="simple" xlink:href="#__RefHeading___Toc21221_4012244740" text:style-name="Index_20_Link" text:visited-style-name="Index_20_Link">6.1<text:tab/>Overview<text:tab/>45</text:a></text:p>
          <text:p text:style-name="P178"><text:a xlink:type="simple" xlink:href="#__RefHeading___Toc21223_4012244740" text:style-name="Index_20_Link" text:visited-style-name="Index_20_Link">6.2<text:tab/>Executing p2c<text:tab/>45</text:a></text:p>
          <text:p text:style-name="P179"><text:a xlink:type="simple" xlink:href="#__RefHeading___Toc21225_4012244740" text:style-name="Index_20_Link" text:visited-style-name="Index_20_Link">6.2.1<text:tab/>Command-line options<text:tab/>45</text:a></text:p>
          <text:p text:style-name="P179"><text:a xlink:type="simple" xlink:href="#__RefHeading___Toc21227_4012244740" text:style-name="Index_20_Link" text:visited-style-name="Index_20_Link">6.2.2<text:tab/>Building p2c from source<text:tab/>45</text:a></text:p>
          <text:p text:style-name="P179"><text:a xlink:type="simple" xlink:href="#__RefHeading___Toc21229_4012244740" text:style-name="Index_20_Link" text:visited-style-name="Index_20_Link">6.2.3<text:tab/>Running the regression tests<text:tab/>46</text:a></text:p>
          <text:p text:style-name="P178"><text:a xlink:type="simple" xlink:href="#__RefHeading___Toc21231_4012244740" text:style-name="Index_20_Link" text:visited-style-name="Index_20_Link">6.3<text:tab/>Generated file structure<text:tab/>46</text:a></text:p>
          <text:p text:style-name="P179"><text:a xlink:type="simple" xlink:href="#__RefHeading___Toc21233_4012244740" text:style-name="Index_20_Link" text:visited-style-name="Index_20_Link">6.3.1<text:tab/>The C source file (prog.c)<text:tab/>46</text:a></text:p>
          <text:p text:style-name="P179"><text:a xlink:type="simple" xlink:href="#__RefHeading___Toc21235_4012244740" text:style-name="Index_20_Link" text:visited-style-name="Index_20_Link">6.3.2<text:tab/>The C header file (prog.h)<text:tab/>46</text:a></text:p>
          <text:p text:style-name="P179"><text:a xlink:type="simple" xlink:href="#__RefHeading___Toc21237_4012244740" text:style-name="Index_20_Link" text:visited-style-name="Index_20_Link">6.3.3<text:tab/>The runtime support library (pas2csup.h / pas2csup.c)<text:tab/>47</text:a></text:p>
          <text:p text:style-name="P178"><text:a xlink:type="simple" xlink:href="#__RefHeading___Toc21239_4012244740" text:style-name="Index_20_Link" text:visited-style-name="Index_20_Link">6.4<text:tab/>Translation of Pascal constructs to C<text:tab/>47</text:a></text:p>
          <text:p text:style-name="P179"><text:a xlink:type="simple" xlink:href="#__RefHeading___Toc21241_4012244740" text:style-name="Index_20_Link" text:visited-style-name="Index_20_Link">6.4.1<text:tab/>Program structure<text:tab/>47</text:a></text:p>
          <text:p text:style-name="P179"><text:a xlink:type="simple" xlink:href="#__RefHeading___Toc21243_4012244740" text:style-name="Index_20_Link" text:visited-style-name="Index_20_Link">6.4.2<text:tab/>Scalar types<text:tab/>47</text:a></text:p>
          <text:p text:style-name="P179"><text:a xlink:type="simple" xlink:href="#__RefHeading___Toc21245_4012244740" text:style-name="Index_20_Link" text:visited-style-name="Index_20_Link">6.4.3<text:tab/>Subrange types<text:tab/>48</text:a></text:p>
          <text:p text:style-name="P179"><text:a xlink:type="simple" xlink:href="#__RefHeading___Toc21247_4012244740" text:style-name="Index_20_Link" text:visited-style-name="Index_20_Link">6.4.4<text:tab/>Enumerated types<text:tab/>48</text:a></text:p>
          <text:p text:style-name="P179"><text:a xlink:type="simple" xlink:href="#__RefHeading___Toc21249_4012244740" text:style-name="Index_20_Link" text:visited-style-name="Index_20_Link">6.4.5<text:tab/>Constants<text:tab/>48</text:a></text:p>
          <text:p text:style-name="P179"><text:a xlink:type="simple" xlink:href="#__RefHeading___Toc21251_4012244740" text:style-name="Index_20_Link" text:visited-style-name="Index_20_Link">6.4.6<text:tab/>Arrays<text:tab/>48</text:a></text:p>
          <text:p text:style-name="P179"><text:a xlink:type="simple" xlink:href="#__RefHeading___Toc21253_4012244740" text:style-name="Index_20_Link" text:visited-style-name="Index_20_Link">6.4.7<text:tab/>Strings (packed arrays of char)<text:tab/>49</text:a></text:p>
          <text:p text:style-name="P179"><text:a xlink:type="simple" xlink:href="#__RefHeading___Toc21255_4012244740" text:style-name="Index_20_Link" text:visited-style-name="Index_20_Link">6.4.8<text:tab/>Records<text:tab/>49</text:a></text:p>
          <text:p text:style-name="P179"><text:a xlink:type="simple" xlink:href="#__RefHeading___Toc21257_4012244740" text:style-name="Index_20_Link" text:visited-style-name="Index_20_Link">6.4.9<text:tab/>Sets<text:tab/>50</text:a></text:p>
          <text:p text:style-name="P179"><text:a xlink:type="simple" xlink:href="#__RefHeading___Toc21259_4012244740" text:style-name="Index_20_Link" text:visited-style-name="Index_20_Link">6.4.10<text:tab/>Pointers and dynamic allocation<text:tab/>50</text:a></text:p>
          <text:p text:style-name="P179"><text:a xlink:type="simple" xlink:href="#__RefHeading___Toc21261_4012244740" text:style-name="Index_20_Link" text:visited-style-name="Index_20_Link">6.4.11<text:tab/>Procedures and functions<text:tab/>50</text:a></text:p>
          <text:p text:style-name="P179"><text:a xlink:type="simple" xlink:href="#__RefHeading___Toc21263_4012244740" text:style-name="Index_20_Link" text:visited-style-name="Index_20_Link">6.4.12<text:tab/>Nested procedures (procedure flattening)<text:tab/>51</text:a></text:p>
          <text:p text:style-name="P179"><text:a xlink:type="simple" xlink:href="#__RefHeading___Toc21265_4012244740" text:style-name="Index_20_Link" text:visited-style-name="Index_20_Link">6.4.13<text:tab/>Control structures<text:tab/>52</text:a></text:p>
          <text:p text:style-name="P179"><text:a xlink:type="simple" xlink:href="#__RefHeading___Toc21267_4012244740" text:style-name="Index_20_Link" text:visited-style-name="Index_20_Link">6.4.14<text:tab/>With statements<text:tab/>53</text:a></text:p>
          <text:p text:style-name="P179"><text:a xlink:type="simple" xlink:href="#__RefHeading___Toc21269_4012244740" text:style-name="Index_20_Link" text:visited-style-name="Index_20_Link">6.4.15<text:tab/>Goto statements and labels<text:tab/>53</text:a></text:p>
          <text:p text:style-name="P179"><text:a xlink:type="simple" xlink:href="#__RefHeading___Toc21271_4012244740" text:style-name="Index_20_Link" text:visited-style-name="Index_20_Link">6.4.16<text:tab/>Write and writeln<text:tab/>54</text:a></text:p>
          <text:p text:style-name="P179"><text:a xlink:type="simple" xlink:href="#__RefHeading___Toc21273_4012244740" text:style-name="Index_20_Link" text:visited-style-name="Index_20_Link">6.4.17<text:tab/>Read and readln<text:tab/>54</text:a></text:p>
          <text:p text:style-name="P179"><text:a xlink:type="simple" xlink:href="#__RefHeading___Toc21275_4012244740" text:style-name="Index_20_Link" text:visited-style-name="Index_20_Link">6.4.18<text:tab/>File operations<text:tab/>54</text:a></text:p>
          <text:p text:style-name="P179"><text:a xlink:type="simple" xlink:href="#__RefHeading___Toc21277_4012244740" text:style-name="Index_20_Link" text:visited-style-name="Index_20_Link">6.4.19<text:tab/>Arithmetic operators<text:tab/>55</text:a></text:p>
          <text:p text:style-name="P179"><text:a xlink:type="simple" xlink:href="#__RefHeading___Toc21279_4012244740" text:style-name="Index_20_Link" text:visited-style-name="Index_20_Link">6.4.20<text:tab/>Relational and logical operators<text:tab/>55</text:a></text:p>
          <text:p text:style-name="P179"><text:a xlink:type="simple" xlink:href="#__RefHeading___Toc21281_4012244740" text:style-name="Index_20_Link" text:visited-style-name="Index_20_Link">6.4.21<text:tab/>Standard functions and procedures<text:tab/>55</text:a></text:p>
          <text:p text:style-name="P179"><text:a xlink:type="simple" xlink:href="#__RefHeading___Toc21283_4012244740" text:style-name="Index_20_Link" text:visited-style-name="Index_20_Link">6.4.22<text:tab/>Comments<text:tab/>55</text:a></text:p>
          <text:p text:style-name="P179"><text:a xlink:type="simple" xlink:href="#__RefHeading___Toc21285_4012244740" text:style-name="Index_20_Link" text:visited-style-name="Index_20_Link">6.4.23<text:tab/>Type definitions<text:tab/>56</text:a></text:p>
          <text:p text:style-name="P178"><text:a xlink:type="simple" xlink:href="#__RefHeading___Toc21287_4012244740" text:style-name="Index_20_Link" text:visited-style-name="Index_20_Link">6.5<text:tab/>Limitations and known issues<text:tab/>56</text:a></text:p>
          <text:p text:style-name="P177"><text:a xlink:type="simple" xlink:href="#__RefHeading___Toc19436_1849125053" text:style-name="Index_20_Link" text:visited-style-name="Index_20_Link">7<text:tab/>pasdoc: The Pascal-P6 documentation generator<text:tab/>57</text:a></text:p>
          <text:p text:style-name="P178"><text:a xlink:type="simple" xlink:href="#__RefHeading___Toc19438_1849125053" text:style-name="Index_20_Link" text:visited-style-name="Index_20_Link">7.1<text:tab/>Overview<text:tab/>57</text:a></text:p>
          <text:p text:style-name="P178"><text:a xlink:type="simple" xlink:href="#__RefHeading___Toc19440_1849125053" text:style-name="Index_20_Link" text:visited-style-name="Index_20_Link">7.2<text:tab/>Executing pasdoc<text:tab/>57</text:a></text:p>
          <text:p text:style-name="P179"><text:a xlink:type="simple" xlink:href="#__RefHeading___Toc19442_1849125053" text:style-name="Index_20_Link" text:visited-style-name="Index_20_Link">7.2.1<text:tab/>Command-line options<text:tab/>57</text:a></text:p>
          <text:p text:style-name="P178"><text:a xlink:type="simple" xlink:href="#__RefHeading___Toc19444_1849125053" text:style-name="Index_20_Link" text:visited-style-name="Index_20_Link">7.3<text:tab/>Output<text:tab/>57</text:a></text:p>
          <text:p text:style-name="P178"><text:a xlink:type="simple" xlink:href="#__RefHeading___Toc19446_1849125053" text:style-name="Index_20_Link" text:visited-style-name="Index_20_Link">7.4<text:tab/>Limitations and known issues<text:tab/>57</text:a></text:p>
          <text:p text:style-name="P177"><text:a xlink:type="simple" xlink:href="#__RefHeading___Toc19448_1849125053" text:style-name="Index_20_Link" text:visited-style-name="Index_20_Link"><text:soft-page-break/>8<text:tab/>pasfmt: The Pascal-P6 source formatter<text:tab/>58</text:a></text:p>
          <text:p text:style-name="P178"><text:a xlink:type="simple" xlink:href="#__RefHeading___Toc19450_1849125053" text:style-name="Index_20_Link" text:visited-style-name="Index_20_Link">8.1<text:tab/>Overview<text:tab/>58</text:a></text:p>
          <text:p text:style-name="P178"><text:a xlink:type="simple" xlink:href="#__RefHeading___Toc19452_1849125053" text:style-name="Index_20_Link" text:visited-style-name="Index_20_Link">8.2<text:tab/>Executing pasfmt<text:tab/>58</text:a></text:p>
          <text:p text:style-name="P179"><text:a xlink:type="simple" xlink:href="#__RefHeading___Toc19454_1849125053" text:style-name="Index_20_Link" text:visited-style-name="Index_20_Link">8.2.1<text:tab/>Command-line options<text:tab/>58</text:a></text:p>
          <text:p text:style-name="P179"><text:a xlink:type="simple" xlink:href="#__RefHeading___Toc19456_1849125053" text:style-name="Index_20_Link" text:visited-style-name="Index_20_Link">8.2.2<text:tab/>The instruction file<text:tab/>58</text:a></text:p>
          <text:p text:style-name="P178"><text:a xlink:type="simple" xlink:href="#__RefHeading___Toc19458_1849125053" text:style-name="Index_20_Link" text:visited-style-name="Index_20_Link">8.3<text:tab/>Limitations and known issues<text:tab/>59</text:a></text:p>
          <text:p text:style-name="P177"><text:a xlink:type="simple" xlink:href="#__RefHeading___Toc19460_1849125053" text:style-name="Index_20_Link" text:visited-style-name="Index_20_Link">9<text:tab/>passym: The Pascal-P6 symbol reporter<text:tab/>60</text:a></text:p>
          <text:p text:style-name="P178"><text:a xlink:type="simple" xlink:href="#__RefHeading___Toc19462_1849125053" text:style-name="Index_20_Link" text:visited-style-name="Index_20_Link">9.1<text:tab/>Overview<text:tab/>60</text:a></text:p>
          <text:p text:style-name="P178"><text:a xlink:type="simple" xlink:href="#__RefHeading___Toc19464_1849125053" text:style-name="Index_20_Link" text:visited-style-name="Index_20_Link">9.2<text:tab/>Executing passym<text:tab/>60</text:a></text:p>
          <text:p text:style-name="P178"><text:a xlink:type="simple" xlink:href="#__RefHeading___Toc19466_1849125053" text:style-name="Index_20_Link" text:visited-style-name="Index_20_Link">9.3<text:tab/>Output format<text:tab/>60</text:a></text:p>
          <text:p text:style-name="P178"><text:a xlink:type="simple" xlink:href="#__RefHeading___Toc19468_1849125053" text:style-name="Index_20_Link" text:visited-style-name="Index_20_Link">9.4<text:tab/>Limitations and known issues<text:tab/>60</text:a></text:p>
          <text:p text:style-name="P177"><text:a xlink:type="simple" xlink:href="#__RefHeading___Toc19470_1849125053" text:style-name="Index_20_Link" text:visited-style-name="Index_20_Link">10<text:tab/>spew: The compiler fault generator<text:tab/>61</text:a></text:p>
          <text:p text:style-name="P178"><text:a xlink:type="simple" xlink:href="#__RefHeading___Toc19472_1849125053" text:style-name="Index_20_Link" text:visited-style-name="Index_20_Link">10.1<text:tab/>Overview<text:tab/>61</text:a></text:p>
          <text:p text:style-name="P178"><text:a xlink:type="simple" xlink:href="#__RefHeading___Toc19474_1849125053" text:style-name="Index_20_Link" text:visited-style-name="Index_20_Link">10.2<text:tab/>Executing spew<text:tab/>61</text:a></text:p>
          <text:p text:style-name="P179"><text:a xlink:type="simple" xlink:href="#__RefHeading___Toc19476_1849125053" text:style-name="Index_20_Link" text:visited-style-name="Index_20_Link">10.2.1<text:tab/>Command-line options<text:tab/>61</text:a></text:p>
          <text:p text:style-name="P178"><text:a xlink:type="simple" xlink:href="#__RefHeading___Toc19478_1849125053" text:style-name="Index_20_Link" text:visited-style-name="Index_20_Link">10.3<text:tab/>Results<text:tab/>61</text:a></text:p>
          <text:p text:style-name="P178"><text:a xlink:type="simple" xlink:href="#__RefHeading___Toc19480_1849125053" text:style-name="Index_20_Link" text:visited-style-name="Index_20_Link">10.4<text:tab/>Limitations and known issues<text:tab/>61</text:a></text:p>
          <text:p text:style-name="P177"><text:a xlink:type="simple" xlink:href="#__RefHeading___Toc15588_2478585429" text:style-name="Index_20_Link" text:visited-style-name="Index_20_Link">11<text:tab/>Pascal-P6 debugger mode<text:tab/>63</text:a></text:p>
          <text:p text:style-name="P178"><text:a xlink:type="simple" xlink:href="#__RefHeading___Toc18920_1027172818" text:style-name="Index_20_Link" text:visited-style-name="Index_20_Link">11.1<text:tab/>Commands<text:tab/>64</text:a></text:p>
          <text:p text:style-name="P178"><text:a xlink:type="simple" xlink:href="#__RefHeading___Toc15590_2478585429" text:style-name="Index_20_Link" text:visited-style-name="Index_20_Link">11.2<text:tab/>Sample program for debug<text:tab/>66</text:a></text:p>
          <text:p text:style-name="P178"><text:a xlink:type="simple" xlink:href="#__RefHeading___Toc15592_2478585429" text:style-name="Index_20_Link" text:visited-style-name="Index_20_Link">11.3<text:tab/>Debug mode invocation<text:tab/>69</text:a></text:p>
          <text:p text:style-name="P178"><text:a xlink:type="simple" xlink:href="#__RefHeading___Toc15594_2478585429" text:style-name="Index_20_Link" text:visited-style-name="Index_20_Link">11.4<text:tab/>Debug mode expressions<text:tab/>71</text:a></text:p>
          <text:p text:style-name="P178"><text:a xlink:type="simple" xlink:href="#__RefHeading___Toc15596_2478585429" text:style-name="Index_20_Link" text:visited-style-name="Index_20_Link">11.5<text:tab/>Executing multiple commands<text:tab/>72</text:a></text:p>
          <text:p text:style-name="P178"><text:a xlink:type="simple" xlink:href="#__RefHeading___Toc15596_2478585429_Copy_" text:style-name="Index_20_Link" text:visited-style-name="Index_20_Link">11.6<text:tab/>Breaking runs<text:tab/>72</text:a></text:p>
          <text:p text:style-name="P178"><text:a xlink:type="simple" xlink:href="#__RefHeading___Toc15596_2478585429_Copy1" text:style-name="Index_20_Link" text:visited-style-name="Index_20_Link">11.7<text:tab/>Handling overloaded routines<text:tab/>73</text:a></text:p>
          <text:p text:style-name="P178"><text:a xlink:type="simple" xlink:href="#__RefHeading___Toc15598_2478585429" text:style-name="Index_20_Link" text:visited-style-name="Index_20_Link">11.8<text:tab/>Debug mode Command descriptions<text:tab/>74</text:a></text:p>
          <text:p text:style-name="P179"><text:a xlink:type="simple" xlink:href="#__RefHeading___Toc15600_2478585429" text:style-name="Index_20_Link" text:visited-style-name="Index_20_Link"><text:tab/>h or help Print help menu<text:tab/>74</text:a></text:p>
          <text:p text:style-name="P179"><text:a xlink:type="simple" xlink:href="#__RefHeading___Toc15602_2478585429" text:style-name="Index_20_Link" text:visited-style-name="Index_20_Link"><text:tab/>l [m] [s[ e|:l] List source lines<text:tab/>75</text:a></text:p>
          <text:p text:style-name="P179"><text:a xlink:type="simple" xlink:href="#__RefHeading___Toc15606_2478585429" text:style-name="Index_20_Link" text:visited-style-name="Index_20_Link"><text:tab/>lc [s[ e|:l] List source and machine lines coordinated<text:tab/>77</text:a></text:p>
          <text:p text:style-name="P179"><text:a xlink:type="simple" xlink:href="#__RefHeading___Toc15604_2478585429" text:style-name="Index_20_Link" text:visited-style-name="Index_20_Link"><text:tab/>li [s[ e|:l] List machine instructions<text:tab/>78</text:a></text:p>
          <text:p text:style-name="P179"><text:a xlink:type="simple" xlink:href="#__RefHeading___Toc15608_2478585429" text:style-name="Index_20_Link" text:visited-style-name="Index_20_Link"><text:tab/>p v Print expression<text:tab/>78</text:a></text:p>
          <text:p text:style-name="P179"><text:a xlink:type="simple" xlink:href="#__RefHeading___Toc15610_2478585429" text:style-name="Index_20_Link" text:visited-style-name="Index_20_Link"><text:tab/>d[b|l][8|16|32|64] [s[ e|:l] Dump memory<text:tab/>80</text:a></text:p>
          <text:p text:style-name="P179"><text:a xlink:type="simple" xlink:href="#__RefHeading___Toc15612_2478585429" text:style-name="Index_20_Link" text:visited-style-name="Index_20_Link"><text:tab/>e a v[ v]... Enter byte values to memory address<text:tab/>81</text:a></text:p>
          <text:p text:style-name="P179"><text:a xlink:type="simple" xlink:href="#__RefHeading___Toc15614_2478585429" text:style-name="Index_20_Link" text:visited-style-name="Index_20_Link"><text:tab/>st d v Set program variable<text:tab/>81</text:a></text:p>
          <text:p text:style-name="P179"><text:a xlink:type="simple" xlink:href="#__RefHeading___Toc15616_2478585429" text:style-name="Index_20_Link" text:visited-style-name="Index_20_Link"><text:tab/>pg Print all globals<text:tab/>82</text:a></text:p>
          <text:p text:style-name="P179"><text:a xlink:type="simple" xlink:href="#__RefHeading___Toc15618_2478585429" text:style-name="Index_20_Link" text:visited-style-name="Index_20_Link"><text:tab/>pl [n] print locals for current/number of enclosing blocks<text:tab/>82</text:a></text:p>
          <text:p text:style-name="P179"><text:a xlink:type="simple" xlink:href="#__RefHeading___Toc15620_2478585429" text:style-name="Index_20_Link" text:visited-style-name="Index_20_Link"><text:tab/>pp [n] print parameters for current/number of enclosing blocks<text:tab/>83</text:a></text:p>
          <text:p text:style-name="P179"><text:a xlink:type="simple" xlink:href="#__RefHeading___Toc15622_2478585429" text:style-name="Index_20_Link" text:visited-style-name="Index_20_Link"><text:tab/>ds Dump storage parameters<text:tab/>83</text:a></text:p>
          <text:p text:style-name="P179"><text:a xlink:type="simple" xlink:href="#__RefHeading___Toc15624_2478585429" text:style-name="Index_20_Link" text:visited-style-name="Index_20_Link"><text:tab/>dd [n] Dump display frames<text:tab/>84</text:a></text:p>
          <text:p text:style-name="P179"><text:a xlink:type="simple" xlink:href="#__RefHeading___Toc15626_2478585429" text:style-name="Index_20_Link" text:visited-style-name="Index_20_Link"><text:tab/>df [n] Dump frames formatted (call trace)<text:tab/>85</text:a></text:p>
          <text:p text:style-name="P179"><text:a xlink:type="simple" xlink:href="#__RefHeading___Toc15628_2478585429_Copy_" text:style-name="Index_20_Link" text:visited-style-name="Index_20_Link"><text:tab/>dst Dump stack words<text:tab/>85</text:a></text:p>
          <text:p text:style-name="P179"><text:a xlink:type="simple" xlink:href="#__RefHeading___Toc15628_2478585429" text:style-name="Index_20_Link" text:visited-style-name="Index_20_Link"><text:tab/>b [m] l|r Place breakpoint at source line number/routine<text:tab/>87</text:a></text:p>
          <text:p text:style-name="P179"><text:a xlink:type="simple" xlink:href="#__RefHeading___Toc15630_2478585429" text:style-name="Index_20_Link" text:visited-style-name="Index_20_Link"><text:tab/>tp [m] l|r Place tracepoint at source line number/routine<text:tab/>87</text:a></text:p>
          <text:p text:style-name="P179"><text:a xlink:type="simple" xlink:href="#__RefHeading___Toc15632_2478585429" text:style-name="Index_20_Link" text:visited-style-name="Index_20_Link"><text:tab/>bi a Place breakpoint at instruction<text:tab/>88</text:a></text:p>
          <text:p text:style-name="P179"><text:a xlink:type="simple" xlink:href="#__RefHeading___Toc15634_2478585429" text:style-name="Index_20_Link" text:visited-style-name="Index_20_Link"><text:soft-page-break/><text:tab/>tpi a Place tracepoint at instruction<text:tab/>89</text:a></text:p>
          <text:p text:style-name="P179"><text:a xlink:type="simple" xlink:href="#__RefHeading___Toc15636_2478585429" text:style-name="Index_20_Link" text:visited-style-name="Index_20_Link"><text:tab/>c [a] Clear breakpoint/all breakpoints<text:tab/>89</text:a></text:p>
          <text:p text:style-name="P179"><text:a xlink:type="simple" xlink:href="#__RefHeading___Toc15638_2478585429" text:style-name="Index_20_Link" text:visited-style-name="Index_20_Link"><text:tab/>lb List active breakpoints<text:tab/>89</text:a></text:p>
          <text:p text:style-name="P179"><text:a xlink:type="simple" xlink:href="#__RefHeading___Toc15640_2478585429" text:style-name="Index_20_Link" text:visited-style-name="Index_20_Link"><text:tab/>w a Watch variable<text:tab/>90</text:a></text:p>
          <text:p text:style-name="P179"><text:a xlink:type="simple" xlink:href="#__RefHeading___Toc15642_2478585429" text:style-name="Index_20_Link" text:visited-style-name="Index_20_Link"><text:tab/>lw List watch table<text:tab/>91</text:a></text:p>
          <text:p text:style-name="P179"><text:a xlink:type="simple" xlink:href="#__RefHeading___Toc15644_2478585429" text:style-name="Index_20_Link" text:visited-style-name="Index_20_Link"><text:tab/>cw [n] Clear watch table entry/all watch entries<text:tab/>91</text:a></text:p>
          <text:p text:style-name="P179"><text:a xlink:type="simple" xlink:href="#__RefHeading___Toc15646_2478585429" text:style-name="Index_20_Link" text:visited-style-name="Index_20_Link"><text:tab/>lia List instruction analyzer buffer<text:tab/>91</text:a></text:p>
          <text:p text:style-name="P179"><text:a xlink:type="simple" xlink:href="#__RefHeading___Toc15648_2478585429" text:style-name="Index_20_Link" text:visited-style-name="Index_20_Link"><text:tab/>lsa List source analyzer buffer<text:tab/>92</text:a></text:p>
          <text:p text:style-name="P179"><text:a xlink:type="simple" xlink:href="#__RefHeading___Toc15650_2478585429" text:style-name="Index_20_Link" text:visited-style-name="Index_20_Link"><text:tab/>s [n] Step next source line execution<text:tab/>92</text:a></text:p>
          <text:p text:style-name="P179"><text:a xlink:type="simple" xlink:href="#__RefHeading___Toc15652_2478585429" text:style-name="Index_20_Link" text:visited-style-name="Index_20_Link"><text:tab/>ss [n] Step next source line execution silently<text:tab/>94</text:a></text:p>
          <text:p text:style-name="P179"><text:a xlink:type="simple" xlink:href="#__RefHeading___Toc15654_2478585429" text:style-name="Index_20_Link" text:visited-style-name="Index_20_Link"><text:tab/>si [n] Step instructions<text:tab/>94</text:a></text:p>
          <text:p text:style-name="P179"><text:a xlink:type="simple" xlink:href="#__RefHeading___Toc15656_2478585429" text:style-name="Index_20_Link" text:visited-style-name="Index_20_Link"><text:tab/>sis [n] Step instructions silently<text:tab/>95</text:a></text:p>
          <text:p text:style-name="P179"><text:a xlink:type="simple" xlink:href="#__RefHeading___Toc15650_2478585429_Copy_" text:style-name="Index_20_Link" text:visited-style-name="Index_20_Link"><text:tab/>so [n] Step next source line execution over routines<text:tab/>95</text:a></text:p>
          <text:p text:style-name="P179"><text:a xlink:type="simple" xlink:href="#__RefHeading___Toc15650_2478585429_Copy1" text:style-name="Index_20_Link" text:visited-style-name="Index_20_Link"><text:tab/>sso [n] Step next source line execution over routines silently<text:tab/>96</text:a></text:p>
          <text:p text:style-name="P179"><text:a xlink:type="simple" xlink:href="#__RefHeading___Toc15654_2478585429_Copy_" text:style-name="Index_20_Link" text:visited-style-name="Index_20_Link"><text:tab/>sio [n] Step instructions over routines<text:tab/>96</text:a></text:p>
          <text:p text:style-name="P179"><text:a xlink:type="simple" xlink:href="#__RefHeading___Toc15656_2478585429_Copy_" text:style-name="Index_20_Link" text:visited-style-name="Index_20_Link"><text:tab/>siso [n] Step instructions silently over routines<text:tab/>97</text:a></text:p>
          <text:p text:style-name="P179"><text:a xlink:type="simple" xlink:href="#__RefHeading___Toc15658_2478585429_Copy_" text:style-name="Index_20_Link" text:visited-style-name="Index_20_Link"><text:tab/>ret Return from routine<text:tab/>97</text:a></text:p>
          <text:p text:style-name="P179"><text:a xlink:type="simple" xlink:href="#__RefHeading___Toc15658_2478585429" text:style-name="Index_20_Link" text:visited-style-name="Index_20_Link"><text:tab/>hs Report heap space<text:tab/>98</text:a></text:p>
          <text:p text:style-name="P179"><text:a xlink:type="simple" xlink:href="#__RefHeading___Toc15668_2478585429" text:style-name="Index_20_Link" text:visited-style-name="Index_20_Link"><text:tab/>ti Turn instruction tracing on<text:tab/>98</text:a></text:p>
          <text:p text:style-name="P179"><text:a xlink:type="simple" xlink:href="#__RefHeading___Toc15670_2478585429" text:style-name="Index_20_Link" text:visited-style-name="Index_20_Link"><text:tab/>nti Turn instruction tracing off<text:tab/>99</text:a></text:p>
          <text:p text:style-name="P179"><text:a xlink:type="simple" xlink:href="#__RefHeading___Toc15672_2478585429" text:style-name="Index_20_Link" text:visited-style-name="Index_20_Link"><text:tab/>tr Turn system routine tracing on<text:tab/>99</text:a></text:p>
          <text:p text:style-name="P179"><text:a xlink:type="simple" xlink:href="#__RefHeading___Toc15674_2478585429" text:style-name="Index_20_Link" text:visited-style-name="Index_20_Link"><text:tab/>ntr Turn system routine tracing off<text:tab/>100</text:a></text:p>
          <text:p text:style-name="P179"><text:a xlink:type="simple" xlink:href="#__RefHeading___Toc15676_2478585429" text:style-name="Index_20_Link" text:visited-style-name="Index_20_Link"><text:tab/>ts Turn source line tracing on<text:tab/>100</text:a></text:p>
          <text:p text:style-name="P179"><text:a xlink:type="simple" xlink:href="#__RefHeading___Toc15678_2478585429" text:style-name="Index_20_Link" text:visited-style-name="Index_20_Link"><text:tab/>nts Turn source line tracing off<text:tab/>101</text:a></text:p>
          <text:p text:style-name="P179"><text:a xlink:type="simple" xlink:href="#__RefHeading___Toc15680_2478585429" text:style-name="Index_20_Link" text:visited-style-name="Index_20_Link"><text:tab/>spf Turn on source level profiling<text:tab/>101</text:a></text:p>
          <text:p text:style-name="P179"><text:a xlink:type="simple" xlink:href="#__RefHeading___Toc15682_2478585429" text:style-name="Index_20_Link" text:visited-style-name="Index_20_Link"><text:tab/>nspf Turn off source level profiling<text:tab/>102</text:a></text:p>
          <text:p text:style-name="P179"><text:a xlink:type="simple" xlink:href="#__RefHeading___Toc15684_2478585429" text:style-name="Index_20_Link" text:visited-style-name="Index_20_Link"><text:tab/>an Turn on analyzer mode<text:tab/>102</text:a></text:p>
          <text:p text:style-name="P179"><text:a xlink:type="simple" xlink:href="#__RefHeading___Toc15686_2478585429" text:style-name="Index_20_Link" text:visited-style-name="Index_20_Link"><text:tab/>nan Turn off analyzer mode<text:tab/>102</text:a></text:p>
          <text:p text:style-name="P179"><text:a xlink:type="simple" xlink:href="#__RefHeading___Toc15688_2478585429" text:style-name="Index_20_Link" text:visited-style-name="Index_20_Link"><text:tab/>r Run program from current pc<text:tab/>102</text:a></text:p>
          <text:p text:style-name="P179"><text:a xlink:type="simple" xlink:href="#__RefHeading___Toc15690_2478585429" text:style-name="Index_20_Link" text:visited-style-name="Index_20_Link"><text:tab/>ps Print current registers and instruction<text:tab/>102</text:a></text:p>
          <text:p text:style-name="P179"><text:a xlink:type="simple" xlink:href="#__RefHeading___Toc15692_2478585429" text:style-name="Index_20_Link" text:visited-style-name="Index_20_Link"><text:tab/>q Quit interpreter<text:tab/>103</text:a></text:p>
          <text:p text:style-name="P177"><text:a xlink:type="simple" xlink:href="#__RefHeading___Toc15694_2478585429" text:style-name="Index_20_Link" text:visited-style-name="Index_20_Link">12<text:tab/>Different generation and run options: pint, pmach and cmach, and pgen<text:tab/>105</text:a></text:p>
          <text:p text:style-name="P178"><text:a xlink:type="simple" xlink:href="#__RefHeading___Toc15696_2478585429" text:style-name="Index_20_Link" text:visited-style-name="Index_20_Link">12.1<text:tab/>Running the different machines<text:tab/>106</text:a></text:p>
          <text:p text:style-name="P178"><text:a xlink:type="simple" xlink:href="#__RefHeading___Toc15698_2478585429" text:style-name="Index_20_Link" text:visited-style-name="Index_20_Link">12.2<text:tab/>Difference between different generation modes<text:tab/>107</text:a></text:p>
          <text:p text:style-name="P178"><text:a xlink:type="simple" xlink:href="#__RefHeading___Toc15700_2478585429" text:style-name="Index_20_Link" text:visited-style-name="Index_20_Link">12.3<text:tab/>Setting machine options on pmach and cmach<text:tab/>107</text:a></text:p>
          <text:p text:style-name="P178"><text:a xlink:type="simple" xlink:href="#__RefHeading___Toc15702_2478585429" text:style-name="Index_20_Link" text:visited-style-name="Index_20_Link">12.4<text:tab/>Packaged application mode<text:tab/>108</text:a></text:p>
          <text:p text:style-name="P178"><text:a xlink:type="simple" xlink:href="#__RefHeading___Toc15704_2478585429" text:style-name="Index_20_Link" text:visited-style-name="Index_20_Link">12.5<text:tab/>Using packaged mode to port to a machine not supported by a Pascal compiler<text:tab/>109</text:a></text:p>
          <text:p text:style-name="P177"><text:a xlink:type="simple" xlink:href="#__RefHeading___Toc26333_2374308661" text:style-name="Index_20_Link" text:visited-style-name="Index_20_Link">13<text:tab/>Output Decks<text:tab/>111</text:a></text:p>
          <text:p text:style-name="P178"><text:a xlink:type="simple" xlink:href="#__RefHeading___Toc15706_2478585429" text:style-name="Index_20_Link" text:visited-style-name="Index_20_Link">13.1<text:tab/>Portability of intermediate decks<text:tab/>111</text:a></text:p>
          <text:p text:style-name="P178"><text:a xlink:type="simple" xlink:href="#__RefHeading___Toc15708_2478585429" text:style-name="Index_20_Link" text:visited-style-name="Index_20_Link">13.2<text:tab/>Portability of hex/binary decks<text:tab/>111</text:a></text:p>
          <text:p text:style-name="P177"><text:a xlink:type="simple" xlink:href="#__RefHeading___Toc15742_2478585429" text:style-name="Index_20_Link" text:visited-style-name="Index_20_Link">14<text:tab/>Building the Pascal-P6 system<text:tab/>112</text:a></text:p>
          <text:p text:style-name="P178"><text:a xlink:type="simple" xlink:href="#__RefHeading___Toc15744_2478585429" text:style-name="Index_20_Link" text:visited-style-name="Index_20_Link">14.1<text:tab/>Compiling and running Pascal-P6<text:tab/>112</text:a></text:p>
          <text:p text:style-name="P177"><text:a xlink:type="simple" xlink:href="#__RefHeading___Toc15756_2478585429" text:style-name="Index_20_Link" text:visited-style-name="Index_20_Link">15<text:tab/>pgen – AMD64 code generator<text:tab/>114</text:a></text:p>
          <text:p text:style-name="P178"><text:a xlink:type="simple" xlink:href="#__RefHeading___Toc15788_2478585429" text:style-name="Index_20_Link" text:visited-style-name="Index_20_Link"><text:soft-page-break/>15.1<text:tab/>Calling convention<text:tab/>115</text:a></text:p>
          <text:p text:style-name="P178"><text:a xlink:type="simple" xlink:href="#__RefHeading___Toc15816_2478585429" text:style-name="Index_20_Link" text:visited-style-name="Index_20_Link">15.2<text:tab/>Calling C from Pascaline<text:tab/>116</text:a></text:p>
          <text:p text:style-name="P179"><text:a xlink:type="simple" xlink:href="#__RefHeading___Toc15860_2478585429" text:style-name="Index_20_Link" text:visited-style-name="Index_20_Link">15.2.1<text:tab/>No value parameters for structured parameters<text:tab/>117</text:a></text:p>
          <text:p text:style-name="P179"><text:a xlink:type="simple" xlink:href="#__RefHeading___Toc15878_2478585429" text:style-name="Index_20_Link" text:visited-style-name="Index_20_Link">15.2.2<text:tab/>Translation of strings<text:tab/>117</text:a></text:p>
          <text:p text:style-name="P179"><text:a xlink:type="simple" xlink:href="#__RefHeading___Toc15880_2478585429" text:style-name="Index_20_Link" text:visited-style-name="Index_20_Link">15.2.3<text:tab/>Pointers and VAR parameters<text:tab/>117</text:a></text:p>
          <text:p text:style-name="P179"><text:a xlink:type="simple" xlink:href="#__RefHeading___Toc16099_623728502" text:style-name="Index_20_Link" text:visited-style-name="Index_20_Link">15.2.4<text:tab/>Module name coining<text:tab/>117</text:a></text:p>
          <text:p text:style-name="P178"><text:a xlink:type="simple" xlink:href="#__RefHeading___Toc16101_623728502" text:style-name="Index_20_Link" text:visited-style-name="Index_20_Link">15.3<text:tab/>Calling Pascaline from C<text:tab/>118</text:a></text:p>
          <text:p text:style-name="P178"><text:a xlink:type="simple" xlink:href="#__RefHeading___Toc15882_2478585429" text:style-name="Index_20_Link" text:visited-style-name="Index_20_Link">15.4<text:tab/>Pascal-P6 module stacking sequence<text:tab/>118</text:a></text:p>
          <text:p text:style-name="P178"><text:a xlink:type="simple" xlink:href="#__RefHeading___Toc30938_3822401252" text:style-name="Index_20_Link" text:visited-style-name="Index_20_Link">15.5<text:tab/>Writing wrappers for C external calls<text:tab/>119</text:a></text:p>
          <text:p text:style-name="P178"><text:a xlink:type="simple" xlink:href="#__RefHeading___Toc30940_3822401252" text:style-name="Index_20_Link" text:visited-style-name="Index_20_Link">15.6<text:tab/>Debugging Pascaline assembly code<text:tab/>120</text:a></text:p>
          <text:p text:style-name="P178"><text:a xlink:type="simple" xlink:href="#__RefHeading___Toc30942_3822401252" text:style-name="Index_20_Link" text:visited-style-name="Index_20_Link">15.7<text:tab/>Overloads<text:tab/>120</text:a></text:p>
          <text:p text:style-name="P177"><text:a xlink:type="simple" xlink:href="#__RefHeading___Toc15910_2478585429" text:style-name="Index_20_Link" text:visited-style-name="Index_20_Link">16<text:tab/>The intermediate language<text:tab/>127</text:a></text:p>
          <text:p text:style-name="P178"><text:a xlink:type="simple" xlink:href="#__RefHeading___Toc15912_2478585429" text:style-name="Index_20_Link" text:visited-style-name="Index_20_Link">16.1<text:tab/>Format of intermediate<text:tab/>127</text:a></text:p>
          <text:p text:style-name="P178"><text:a xlink:type="simple" xlink:href="#__RefHeading___Toc16103_623728502" text:style-name="Index_20_Link" text:visited-style-name="Index_20_Link">16.2<text:tab/>Intermediate line format<text:tab/>127</text:a></text:p>
          <text:p text:style-name="P179"><text:a xlink:type="simple" xlink:href="#__RefHeading___Toc15914_2478585429" text:style-name="Index_20_Link" text:visited-style-name="Index_20_Link">16.2.1<text:tab/>Comments<text:tab/>128</text:a></text:p>
          <text:p text:style-name="P179"><text:a xlink:type="simple" xlink:href="#__RefHeading___Toc15918_2478585429" text:style-name="Index_20_Link" text:visited-style-name="Index_20_Link">16.2.2<text:tab/>Label<text:tab/>128</text:a></text:p>
          <text:p text:style-name="P179"><text:a xlink:type="simple" xlink:href="#__RefHeading___Toc16105_623728502" text:style-name="Index_20_Link" text:visited-style-name="Index_20_Link">16.2.3<text:tab/>End of section<text:tab/>129</text:a></text:p>
          <text:p text:style-name="P179"><text:a xlink:type="simple" xlink:href="#__RefHeading___Toc16107_623728502" text:style-name="Index_20_Link" text:visited-style-name="Index_20_Link">16.2.4<text:tab/>Intermediate code<text:tab/>129</text:a></text:p>
          <text:p text:style-name="P179"><text:a xlink:type="simple" xlink:href="#__RefHeading___Toc15916_2478585429" text:style-name="Index_20_Link" text:visited-style-name="Index_20_Link">16.2.5<text:tab/>Source lines<text:tab/>129</text:a></text:p>
          <text:p text:style-name="P179"><text:a xlink:type="simple" xlink:href="#__RefHeading___Toc15922_2478585429" text:style-name="Index_20_Link" text:visited-style-name="Index_20_Link">16.2.6<text:tab/>Options<text:tab/>129</text:a></text:p>
          <text:p text:style-name="P179"><text:a xlink:type="simple" xlink:href="#__RefHeading___Toc15924_2478585429" text:style-name="Index_20_Link" text:visited-style-name="Index_20_Link">16.2.7<text:tab/>Global space count<text:tab/>129</text:a></text:p>
          <text:p text:style-name="P179"><text:a xlink:type="simple" xlink:href="#__RefHeading___Toc15932_2478585429" text:style-name="Index_20_Link" text:visited-style-name="Index_20_Link">16.2.8<text:tab/>Logical variant table<text:tab/>129</text:a></text:p>
          <text:p text:style-name="P179"><text:a xlink:type="simple" xlink:href="#__RefHeading___Toc16109_623728502" text:style-name="Index_20_Link" text:visited-style-name="Index_20_Link">16.2.9<text:tab/>Source errors<text:tab/>130</text:a></text:p>
          <text:p text:style-name="P179"><text:a xlink:type="simple" xlink:href="#__RefHeading___Toc15926_2478585429" text:style-name="Index_20_Link" text:visited-style-name="Index_20_Link">16.2.10<text:tab/>Block start and end<text:tab/>130</text:a></text:p>
          <text:p text:style-name="P179"><text:a xlink:type="simple" xlink:href="#__RefHeading___Toc15928_2478585429" text:style-name="Index_20_Link" text:visited-style-name="Index_20_Link">16.2.11<text:tab/>Symbols<text:tab/>131</text:a></text:p>
          <text:p text:style-name="P179"><text:a xlink:type="simple" xlink:href="#__RefHeading___Toc15934_2478585429" text:style-name="Index_20_Link" text:visited-style-name="Index_20_Link">16.2.12<text:tab/>Template tables<text:tab/>133</text:a></text:p>
          <text:p text:style-name="P179"><text:a xlink:type="simple" xlink:href="#__RefHeading___Toc15936_2478585429" text:style-name="Index_20_Link" text:visited-style-name="Index_20_Link">16.2.13<text:tab/>Constant tables<text:tab/>133</text:a></text:p>
          <text:p text:style-name="P178"><text:a xlink:type="simple" xlink:href="#__RefHeading___Toc12854_1780621904" text:style-name="Index_20_Link" text:visited-style-name="Index_20_Link">16.3<text:tab/>Templates<text:tab/>135</text:a></text:p>
          <text:p text:style-name="P178"><text:a xlink:type="simple" xlink:href="#__RefHeading___Toc15938_2478585429" text:style-name="Index_20_Link" text:visited-style-name="Index_20_Link">16.4<text:tab/>Variant record tables<text:tab/>136</text:a></text:p>
          <text:p text:style-name="P178"><text:a xlink:type="simple" xlink:href="#__RefHeading___Toc15940_2478585429" text:style-name="Index_20_Link" text:visited-style-name="Index_20_Link">16.5<text:tab/>Undefined accesses<text:tab/>136</text:a></text:p>
          <text:p text:style-name="P178"><text:a xlink:type="simple" xlink:href="#__RefHeading___Toc15942_2478585429" text:style-name="Index_20_Link" text:visited-style-name="Index_20_Link">16.6<text:tab/>Code strips<text:tab/>137</text:a></text:p>
          <text:p text:style-name="P178"><text:a xlink:type="simple" xlink:href="#__RefHeading___Toc15944_2478585429" text:style-name="Index_20_Link" text:visited-style-name="Index_20_Link">16.7<text:tab/>Exception frames<text:tab/>137</text:a></text:p>
          <text:p text:style-name="P178"><text:a xlink:type="simple" xlink:href="#__RefHeading___Toc15946_2478585429" text:style-name="Index_20_Link" text:visited-style-name="Index_20_Link">16.8<text:tab/>Operator overload calling frames<text:tab/>137</text:a></text:p>
          <text:p text:style-name="P178"><text:a xlink:type="simple" xlink:href="#__RefHeading___Toc15946_2478585429_Copy_" text:style-name="Index_20_Link" text:visited-style-name="Index_20_Link">16.9<text:tab/>Calling frame format<text:tab/>137</text:a></text:p>
          <text:p text:style-name="P179"><text:a xlink:type="simple" xlink:href="#__RefHeading___Toc18930_1027172818" text:style-name="Index_20_Link" text:visited-style-name="Index_20_Link">16.9.1<text:tab/>Dummy function result<text:tab/>138</text:a></text:p>
          <text:p text:style-name="P179"><text:a xlink:type="simple" xlink:href="#__RefHeading___Toc18932_1027172818" text:style-name="Index_20_Link" text:visited-style-name="Index_20_Link">16.9.2<text:tab/>Parameters<text:tab/>138</text:a></text:p>
          <text:p text:style-name="P179"><text:a xlink:type="simple" xlink:href="#__RefHeading___Toc18934_1027172818" text:style-name="Index_20_Link" text:visited-style-name="Index_20_Link">16.9.3<text:tab/>Return address<text:tab/>138</text:a></text:p>
          <text:p text:style-name="P179"><text:a xlink:type="simple" xlink:href="#__RefHeading___Toc18936_1027172818" text:style-name="Index_20_Link" text:visited-style-name="Index_20_Link">16.9.4<text:tab/>Saved MP<text:tab/>138</text:a></text:p>
          <text:p text:style-name="P179"><text:a xlink:type="simple" xlink:href="#__RefHeading___Toc18938_1027172818" text:style-name="Index_20_Link" text:visited-style-name="Index_20_Link">16.9.5<text:tab/>Mark<text:tab/>138</text:a></text:p>
          <text:p text:style-name="P180"><text:a xlink:type="simple" xlink:href="#__RefHeading___Toc18940_1027172818" text:style-name="Index_20_Link" text:visited-style-name="Index_20_Link">16.9.5.1<text:tab/>Maximum frame size (ep)<text:tab/>138</text:a></text:p>
          <text:p text:style-name="P180"><text:a xlink:type="simple" xlink:href="#__RefHeading___Toc18942_1027172818" text:style-name="Index_20_Link" text:visited-style-name="Index_20_Link">16.9.5.2<text:tab/>Stack bottom<text:tab/>139</text:a></text:p>
          <text:p text:style-name="P180"><text:a xlink:type="simple" xlink:href="#__RefHeading___Toc18944_1027172818" text:style-name="Index_20_Link" text:visited-style-name="Index_20_Link">16.9.5.3<text:tab/>Current ep (et)<text:tab/>139</text:a></text:p>
          <text:p text:style-name="P179"><text:a xlink:type="simple" xlink:href="#__RefHeading___Toc18946_1027172818" text:style-name="Index_20_Link" text:visited-style-name="Index_20_Link">16.9.6<text:tab/>Display<text:tab/>139</text:a></text:p>
          <text:p text:style-name="P179"><text:a xlink:type="simple" xlink:href="#__RefHeading___Toc18948_1027172818" text:style-name="Index_20_Link" text:visited-style-name="Index_20_Link">16.9.7<text:tab/>Locals<text:tab/>140</text:a></text:p>
          <text:p text:style-name="P178"><text:a xlink:type="simple" xlink:href="#__RefHeading___Toc15948_2478585429" text:style-name="Index_20_Link" text:visited-style-name="Index_20_Link">16.10<text:tab/>Intermediate instruction set<text:tab/>141</text:a></text:p>
          <text:p text:style-name="P179"><text:a xlink:type="simple" xlink:href="#__RefHeading___Toc15950_2478585429_Copy_" text:style-name="Index_20_Link" text:visited-style-name="Index_20_Link">16.10.1<text:tab/>Instructions by number<text:tab/>167</text:a></text:p>
          <text:p text:style-name="P178"><text:a xlink:type="simple" xlink:href="#__RefHeading___Toc15950_2478585429" text:style-name="Index_20_Link" text:visited-style-name="Index_20_Link">16.11<text:tab/>System calls<text:tab/>174</text:a></text:p>
          <text:p text:style-name="P179"><text:a xlink:type="simple" xlink:href="#__RefHeading___Toc15952_2478585429_Copy_" text:style-name="Index_20_Link" text:visited-style-name="Index_20_Link">16.11.1<text:tab/>System calls by number<text:tab/>188</text:a></text:p>
          <text:p text:style-name="P177"><text:a xlink:type="simple" xlink:href="#__RefHeading___Toc15952_2478585429" text:style-name="Index_20_Link" text:visited-style-name="Index_20_Link"><text:soft-page-break/>17<text:tab/>Testing Pascal-P6<text:tab/>191</text:a></text:p>
          <text:p text:style-name="P178"><text:a xlink:type="simple" xlink:href="#__RefHeading___Toc15954_2478585429_Copy_" text:style-name="Index_20_Link" text:visited-style-name="Index_20_Link">17.1<text:tab/>Running a Full Regression Test<text:tab/>191</text:a></text:p>
          <text:p text:style-name="P178"><text:a xlink:type="simple" xlink:href="#__RefHeading___Toc15954_2478585429" text:style-name="Index_20_Link" text:visited-style-name="Index_20_Link">17.2<text:tab/>Running Individual tests<text:tab/>191</text:a></text:p>
          <text:p text:style-name="P179"><text:a xlink:type="simple" xlink:href="#__RefHeading___Toc15956_2478585429" text:style-name="Index_20_Link" text:visited-style-name="Index_20_Link">17.2.1<text:tab/>testprog<text:tab/>191</text:a></text:p>
          <text:p text:style-name="P179"><text:a xlink:type="simple" xlink:href="#__RefHeading___Toc15958_2478585429" text:style-name="Index_20_Link" text:visited-style-name="Index_20_Link">17.2.2<text:tab/>Other tests<text:tab/>193</text:a></text:p>
          <text:p text:style-name="P178"><text:a xlink:type="simple" xlink:href="#__RefHeading___Toc15962_2478585429" text:style-name="Index_20_Link" text:visited-style-name="Index_20_Link">17.3<text:tab/>Test types<text:tab/>193</text:a></text:p>
          <text:p text:style-name="P178"><text:a xlink:type="simple" xlink:href="#__RefHeading___Toc15964_2478585429" text:style-name="Index_20_Link" text:visited-style-name="Index_20_Link">17.4<text:tab/>The Pascal acceptance test<text:tab/>193</text:a></text:p>
          <text:p text:style-name="P178"><text:a xlink:type="simple" xlink:href="#__RefHeading___Toc15966_2478585429" text:style-name="Index_20_Link" text:visited-style-name="Index_20_Link">17.5<text:tab/>The Pascal rejection test<text:tab/>193</text:a></text:p>
          <text:p text:style-name="P179"><text:a xlink:type="simple" xlink:href="#__RefHeading___Toc15968_2478585429" text:style-name="Index_20_Link" text:visited-style-name="Index_20_Link">17.5.1<text:tab/>List of tests<text:tab/>194</text:a></text:p>
          <text:p text:style-name="P180"><text:a xlink:type="simple" xlink:href="#__RefHeading___Toc15970_2478585429" text:style-name="Index_20_Link" text:visited-style-name="Index_20_Link">17.5.1.1<text:tab/>Class 1: Syntatic errors<text:tab/>194</text:a></text:p>
          <text:p text:style-name="P180"><text:a xlink:type="simple" xlink:href="#__RefHeading___Toc15972_2478585429" text:style-name="Index_20_Link" text:visited-style-name="Index_20_Link">17.5.1.2<text:tab/>Class 2: Semantic errors<text:tab/>200</text:a></text:p>
          <text:p text:style-name="P180"><text:a xlink:type="simple" xlink:href="#__RefHeading___Toc15974_2478585429" text:style-name="Index_20_Link" text:visited-style-name="Index_20_Link">17.5.1.3<text:tab/>Class 3: Advanced error checking<text:tab/>203</text:a></text:p>
          <text:p text:style-name="P180"><text:a xlink:type="simple" xlink:href="#__RefHeading___Toc15976_2478585429" text:style-name="Index_20_Link" text:visited-style-name="Index_20_Link">17.5.1.4<text:tab/>Class 4: Field checks<text:tab/>204</text:a></text:p>
          <text:p text:style-name="P179"><text:a xlink:type="simple" xlink:href="#__RefHeading___Toc15978_2478585429" text:style-name="Index_20_Link" text:visited-style-name="Index_20_Link">17.5.2<text:tab/>Running the PRT and interpreting the results<text:tab/>204</text:a></text:p>
          <text:p text:style-name="P180"><text:a xlink:type="simple" xlink:href="#__RefHeading___Toc15980_2478585429" text:style-name="Index_20_Link" text:visited-style-name="Index_20_Link">17.5.2.1<text:tab/>List of tests with no compile or runtime error.<text:tab/>204</text:a></text:p>
          <text:p text:style-name="P180"><text:a xlink:type="simple" xlink:href="#__RefHeading___Toc15982_2478585429" text:style-name="Index_20_Link" text:visited-style-name="Index_20_Link">17.5.2.2<text:tab/>List of differences between compiler output and “gold” standard outputs.<text:tab/>204</text:a></text:p>
          <text:p text:style-name="P180"><text:a xlink:type="simple" xlink:href="#__RefHeading___Toc15984_2478585429" text:style-name="Index_20_Link" text:visited-style-name="Index_20_Link">17.5.2.3<text:tab/>List of differences between runtime output and “gold” standard outputs.<text:tab/>204</text:a></text:p>
          <text:p text:style-name="P180"><text:a xlink:type="simple" xlink:href="#__RefHeading___Toc15986_2478585429" text:style-name="Index_20_Link" text:visited-style-name="Index_20_Link">17.5.2.4<text:tab/>Collected compiler listings and runtime output of all tests.<text:tab/>205</text:a></text:p>
          <text:p text:style-name="P179"><text:a xlink:type="simple" xlink:href="#__RefHeading___Toc15988_2478585429" text:style-name="Index_20_Link" text:visited-style-name="Index_20_Link">17.5.3<text:tab/>Overall interpretation of PRT results<text:tab/>205</text:a></text:p>
          <text:p text:style-name="P178"><text:a xlink:type="simple" xlink:href="#__RefHeading___Toc15990_2478585429_Copy_" text:style-name="Index_20_Link" text:visited-style-name="Index_20_Link">17.6<text:tab/>The Pascaline Acceptance Test<text:tab/>205</text:a></text:p>
          <text:p text:style-name="P178"><text:a xlink:type="simple" xlink:href="#__RefHeading___Toc15990_2478585429_Copy1" text:style-name="Index_20_Link" text:visited-style-name="Index_20_Link">17.7<text:tab/>The Pascaline Rejection Test<text:tab/>205</text:a></text:p>
          <text:p text:style-name="P178"><text:a xlink:type="simple" xlink:href="#__RefHeading___Toc15990_2478585429" text:style-name="Index_20_Link" text:visited-style-name="Index_20_Link">17.8<text:tab/>Sample program tests<text:tab/>205</text:a></text:p>
          <text:p text:style-name="P178"><text:a xlink:type="simple" xlink:href="#__RefHeading___Toc15992_2478585429" text:style-name="Index_20_Link" text:visited-style-name="Index_20_Link">17.9<text:tab/>Previous Pascal-P versions test<text:tab/>206</text:a></text:p>
          <text:p text:style-name="P179"><text:a xlink:type="simple" xlink:href="#__RefHeading___Toc15994_2478585429" text:style-name="Index_20_Link" text:visited-style-name="Index_20_Link">17.9.1<text:tab/>Compile and run Pascal-P2<text:tab/>206</text:a></text:p>
          <text:p text:style-name="P179"><text:a xlink:type="simple" xlink:href="#__RefHeading___Toc15996_2478585429" text:style-name="Index_20_Link" text:visited-style-name="Index_20_Link">17.9.2<text:tab/>Compile and run Pascal-P4<text:tab/>207</text:a></text:p>
          <text:p text:style-name="P178"><text:a xlink:type="simple" xlink:href="#__RefHeading___Toc15998_2478585429_Copy_" text:style-name="Index_20_Link" text:visited-style-name="Index_20_Link">17.10<text:tab/>Compile and Run Pascal-P5<text:tab/>207</text:a></text:p>
          <text:p text:style-name="P178"><text:a xlink:type="simple" xlink:href="#__RefHeading___Toc15998_2478585429_Copy_%20Copy%201" text:style-name="Index_20_Link" text:visited-style-name="Index_20_Link">17.11<text:tab/>Compile and Run Pascal-P6<text:tab/>207</text:a></text:p>
          <text:p text:style-name="P178"><text:a xlink:type="simple" xlink:href="#__RefHeading___Toc15998_2478585429" text:style-name="Index_20_Link" text:visited-style-name="Index_20_Link">17.12<text:tab/>Self compile<text:tab/>207</text:a></text:p>
          <text:p text:style-name="P179"><text:a xlink:type="simple" xlink:href="#__RefHeading___Toc16000_2478585429" text:style-name="Index_20_Link" text:visited-style-name="Index_20_Link">17.12.1<text:tab/>pcom<text:tab/>208</text:a></text:p>
          <text:p text:style-name="P180"><text:a xlink:type="simple" xlink:href="#__RefHeading___Toc16002_2478585429" text:style-name="Index_20_Link" text:visited-style-name="Index_20_Link">17.12.1.1<text:tab/>Changes required<text:tab/>208</text:a></text:p>
          <text:p text:style-name="P179"><text:a xlink:type="simple" xlink:href="#__RefHeading___Toc16004_2478585429" text:style-name="Index_20_Link" text:visited-style-name="Index_20_Link">17.12.2<text:tab/>pint<text:tab/>208</text:a></text:p>
          <text:p text:style-name="P178"><text:a xlink:type="simple" xlink:href="#__RefHeading___Toc15990_2478585429_Copy2" text:style-name="Index_20_Link" text:visited-style-name="Index_20_Link">17.13<text:tab/>The Debug Mode Test<text:tab/>209</text:a></text:p>
          <text:p text:style-name="P177"><text:a xlink:type="simple" xlink:href="#__RefHeading___Toc30960_3822401252" text:style-name="Index_20_Link" text:visited-style-name="Index_20_Link">18<text:tab/>Preparing a Pascal-P6 release<text:tab/>211</text:a></text:p>
          <text:p text:style-name="P177"><text:a xlink:type="simple" xlink:href="#__RefHeading___Toc30962_3822401252" text:style-name="Index_20_Link" text:visited-style-name="Index_20_Link">19<text:tab/>Filing bugs against Pascal-P6<text:tab/>213</text:a></text:p>
          <text:p text:style-name="P177"><text:a xlink:type="simple" xlink:href="#__RefHeading___Toc15534_2478585429" text:style-name="Index_20_Link" text:visited-style-name="Index_20_Link">20<text:tab/>Licensing information<text:tab/>215</text:a></text:p>
          <text:p text:style-name="P177"><text:a xlink:type="simple" xlink:href="#__RefHeading___Toc26216_1866145677" text:style-name="Index_20_Link" text:visited-style-name="Index_20_Link">21<text:tab/>Using, copying, and obtaining and distributing this manual<text:tab/>217</text:a></text:p>
          <text:p text:style-name="P178"><text:a xlink:type="simple" xlink:href="#__RefHeading___Toc24067_634662700" text:style-name="Index_20_Link" text:visited-style-name="Index_20_Link">21.1<text:tab/>Obtaining a printed version<text:tab/>217</text:a></text:p>
        </text:index-body>
      </text:table-of-content>
      <text:p text:style-name="P48"/>
      <text:p text:style-name="P168"/>
      <text:h text:style-name="P205"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P137">Memory or type protected languages are a current fad, starting with Java, through C#, and now Rust <text:span text:style-name="T107">and Golang</text:span>. But type safe languages have been around since the beginning of computer languages.</text:p>
      <text:p text:style-name="P137">Pascal, a language popular since it’s beginning over 50 years ago, has a common form that is not type safe, often referred to as Pascal-C. Its Pascal stripped of it’s type safety and combined with C type constructs such as type casting.</text:p>
      <text:p text:style-name="P137"><text:span text:style-name="T96">O</text:span>riginal Pascal was a type and memory safe language, and has been since the beginning. The modern constructs of the Pascaline language extension bring the language up to the present day, giving you functionality equivalent to C, or even C++, but with complete type and memory safety.</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1">th</text:span> edition of that compiler. Pascal-P4 was a “subset” of the original Pascal language. Pascal-P5 supported the full ISO 7185 standard Pascal language. Pascal-P6 supports the original ISO 7185 Pascal language and a set of extens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9">Filename</text:p>
          </table:table-cell>
          <table:table-cell table:style-name="Table9.A1" office:value-type="string">
            <text:p text:style-name="P11">Contents</text:p>
          </table:table-cell>
        </table:table-row>
        <table:table-row table:style-name="Table9.1">
          <table:table-cell table:style-name="Table9.A2" office:value-type="string">
            <text:p text:style-name="P10">iso7185rules.html</text:p>
          </table:table-cell>
          <table:table-cell table:style-name="Table9.B2" office:value-type="string">
            <text:p text:style-name="P174">Covers the ISO 7185 Pascal language in conversational form.</text:p>
          </table:table-cell>
        </table:table-row>
        <table:table-row table:style-name="Table9.1">
          <table:table-cell table:style-name="Table9.A2" office:value-type="string">
            <text:p text:style-name="P10">iso7185.html</text:p>
          </table:table-cell>
          <table:table-cell table:style-name="Table9.B3" office:value-type="string">
            <text:p text:style-name="P79">Covers the technical details of the ISO 7185 standard.</text:p>
          </table:table-cell>
        </table:table-row>
        <table:table-row table:style-name="Table9.1">
          <table:table-cell table:style-name="Table9.A2" office:value-type="string">
            <text:p text:style-name="P10">The_programming_language_pascal_1973.pdf</text:p>
          </table:table-cell>
          <table:table-cell table:style-name="Table9.B2" office:value-type="string">
            <text:p text:style-name="P79">The original 1973 introduction to Pascal.</text:p>
          </table:table-cell>
        </table:table-row>
        <table:table-row table:style-name="Table9.1">
          <table:table-cell table:style-name="Table9.A2" office:value-type="string">
            <text:p text:style-name="P10"><text:span text:style-name="T96">p</text:span>ascaline.<text:span text:style-name="T48">pdf</text:span></text:p>
          </table:table-cell>
          <table:table-cell table:style-name="Table9.B5" office:value-type="string">
            <text:p text:style-name="P80">The technical details of Pascaline.</text:p>
          </table:table-cell>
        </table:table-row>
      </table:table>
      <text:p text:style-name="P169"/>
      <text:p text:style-name="Standard">For the original Pascal language, many good references exist:</text:p>
      <text:p text:style-name="Standard"/>
      <text:p text:style-name="P90"/>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9">Filename</text:p>
          </table:table-cell>
          <table:table-cell table:style-name="Table10.A1" office:value-type="string">
            <text:p text:style-name="P11">Contents</text:p>
          </table:table-cell>
          <table:table-cell table:style-name="Table10.A1" office:value-type="string">
            <text:p text:style-name="P11">Purchase at</text:p>
          </table:table-cell>
        </table:table-row>
        <table:table-row table:style-name="Table10.1">
          <table:table-cell table:style-name="Table10.A2" office:value-type="string">
            <text:p text:style-name="P12">Pascal User Manual and Report</text:p>
            <text:p text:style-name="P10">Kethleen Jensen &amp; Niklaus Wirth</text:p>
          </table:table-cell>
          <table:table-cell table:style-name="Table10.B2" office:value-type="string">
            <text:p text:style-name="P74"><text:span text:style-name="T6">The original reference manual for Pascal. </text:span><text:span text:style-name="T7">Seems to be out of print, and may be hard to find or expensive.</text:span></text:p>
          </table:table-cell>
          <table:table-cell table:style-name="Table10.B2" office:value-type="string">
            <text:p text:style-name="P74"><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12">Standard Pascal User Reference Manual</text:p>
            <text:p text:style-name="P10">Doug Cooper</text:p>
          </table:table-cell>
          <table:table-cell table:style-name="Table10.B3" office:value-type="string">
            <text:p text:style-name="P74"><text:span text:style-name="T8">Covers the details of the ISO 7185 standard.</text:span><text:span text:style-name="T2"> </text:span><text:span text:style-name="T3">Reasonably priced.</text:span></text:p>
          </table:table-cell>
          <table:table-cell table:style-name="Table10.B3" office:value-type="string">
            <text:p text:style-name="P79">https://www.amazon.com/Standard-Pascal-User-Reference-Manual/dp/0393301214/ref=sr_1_1?crid=2O6HPEQYWSJZP&amp;keywords=standard+pascal+user+reference+manual&amp;qid=1671226757&amp;sprefix=standard+pascal+user+reference+manual%2Caps%2C133&amp;sr=8-1</text:p>
          </table:table-cell>
        </table:table-row>
        <table:table-row table:style-name="Table10.1">
          <table:table-cell table:style-name="Table10.A2" office:value-type="string">
            <text:p text:style-name="P12">A Primer on Pascal</text:p>
            <text:p text:style-name="P10">Conway, Gries, Zimmerman</text:p>
          </table:table-cell>
          <table:table-cell table:style-name="Table10.B2" office:value-type="string">
            <text:p text:style-name="P74"><text:span text:style-name="T8">A good basic introduction to Pascal.</text:span><text:span text:style-name="T2"> </text:span><text:span text:style-name="T3">Appears to be out of print.</text:span></text:p>
          </table:table-cell>
          <table:table-cell table:style-name="Table10.B2" office:value-type="string">
            <text:p text:style-name="P79">https://www.amazon.com/Primer-PASCAL-Winthrop-computer-systems/dp/0876266944/ref=sr_1_1?Adv-Srch-Books-Submit.x=0&amp;Adv-Srch-Books-Submit.y=0&amp;qid=1671227001&amp;refinements=p_27%3Aconway+gries%2Cp_28%3Aa+primer+on+pascal&amp;s=books&amp;sr=1-1&amp;unfiltered=1</text:p>
          </table:table-cell>
        </table:table-row>
        <table:table-row table:style-name="Table10.1">
          <table:table-cell table:style-name="Table10.A2" office:value-type="string">
            <text:p text:style-name="P12">Oh! Pascal!</text:p>
            <text:p text:style-name="P10">Doug Cooper</text:p>
          </table:table-cell>
          <table:table-cell table:style-name="Table10.B5" office:value-type="string">
            <text:p text:style-name="P74"><text:span text:style-name="T9">An in-depth introduction to Pascal. </text:span><text:span text:style-name="T10">Appears to be out of print</text:span><text:span text:style-name="T9">.</text:span><text:span text:style-name="T4"> </text:span></text:p>
          </table:table-cell>
          <table:table-cell table:style-name="Table10.B5" office:value-type="string">
            <text:p text:style-name="P80">https://www.amazon.com/Oh-Pascal-Third-Doug-Cooper-dp-0393963985/dp/0393963985/ref=dp_ob_title_bk</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12</text:bookmark-ref>: <text:bookmark-ref text:reference-format="text" text:ref-name="__RefHeading___Toc15694_2478585429">Different generation and run options: pint, pmach and cmach, and pgen</text:bookmark-ref>”.</text:p>
      <text:h text:style-name="Heading_20_2" text:outline-level="2"><text:bookmark-start text:name="__RefHeading___Toc15538_2478585429"/><text:bookmark-start text:name="_Ref371924702"/><text:bookmark-start text:name="_Ref371924773"/><text:bookmark-start text:name="_Ref371924703"/><text:bookmark-start text:name="_Toc320481114"/><text:bookmark-start text:name="_Ref371924699"/>H<text:bookmark-start text:name="_Toc528309084"/><text:bookmark-end text:name="_Ref371924702"/><text:bookmark-end text:name="_Ref371924773"/><text:bookmark-end text:name="_Ref371924703"/><text:bookmark-end text:name="_Toc320481114"/><text:bookmark-end text:name="_Ref371924699"/>istory of Pascal-P6<text:bookmark-end text:name="__RefHeading___Toc15538_2478585429"/><text:bookmark-end text:name="_Toc528309084"/></text:h>
      <text:p text:style-name="Standard"><draw:frame draw:style-name="fr4" draw:name="Image1" text:anchor-type="char" svg:width="6.4016in" svg:height="3.8945in" draw:z-index="41"><draw:image xlink:href="Pictures/10000000000004000000026FDCC8849C.png" xlink:type="simple" xlink:show="embed" xlink:actuate="onLoad" draw:mime-type="image/png"/></draw:frame></text:p>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text:span text:style-name="T86">Niklaus </text:span>Wirth later issued a paper, together with Tony Hoare for the “Axiomatic definition of Pascal”, which was also aimed at exactly specifying the semantics of Pascal.</text:p>
      <text:p text:style-name="Standard"><text:soft-page-break/>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text:span text:style-name="T96">Niklaus </text:span>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n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text:span text:style-name="T98">Pascal-</text:span>P4 code to accept the full language Pascal as stated by the ISO 7185 language standard. The name of the result was obvious: Pascal-P5.</text:p>
      <text:p text:style-name="Standard">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text:span text:style-name="T86">24</text:span>).</text:p>
      <text:p text:style-name="Standard">I realize that introducing a set of new features to Pascal is going to be controversial. I wanted the extensions to be more than just a laundry list of features added by a compiler implementer (as has happened with Pascal so many times in the past). Thus I collected the features implemented by Pascal-P6 as a formal language in its own right, as the language “Pascaline”. There is a formal specification accompanying Pascal-P6 (“pascaline.<text:span text:style-name="T71">pdf</text:span>”) as well as a rationale (“Pascaline_rationale.<text:span text:style-name="T71">pdf</text:span>”), a discussion of both the language, its features, and its implementation.</text:p>
      <text:h text:style-name="Heading_20_2" text:outline-level="2"><text:bookmark-start text:name="__RefHeading___Toc15544_2478585429"/><text:bookmark-start text:name="_Toc528309087"/>Pascal-P6 as a strict ISO 7185 compiler<text:bookmark-end text:name="__RefHeading___Toc15544_2478585429"/><text:bookmark-end text:name="_Toc528309087"/></text:h>
      <text:p text:style-name="Standard">Pascal-P6 can easily be used as a strict ISO 7185 Pascal compiler. Using the s+/iso7185+ option, or “strict” flag, the source language for Pascal-P6 and <text:span text:style-name="T72">the ISO 7185 language are</text:span> identical. It is, however, important to understand the exact meaning of the s+/iso7185+ option.</text:p>
      <text:p text:style-name="Standard"><text:soft-page-break/>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text:style-name="WWNum11">
        <text:list-item>
          <text:p text:style-name="P215">All extended keywords from Pascaline are turned OFF, meaning they can be used as program identifiers.</text:p>
        </text:list-item>
        <text:list-item>
          <text:p text:style-name="P215">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o avoid using other ISO 7185 Pascal implementations’ keywords as well. You might want to examine the keyword list for FPC (Free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_RefHeading___Toc15546_2478585429"/><text:bookmark-start text:name="_Toc528309088"/>Pascal-P6 vs. FPC (Free pascal), Borland, or other dialects<text:bookmark-end text:name="__RefHeading___Toc15546_2478585429"/><text:bookmark-end text:name="_Toc528309088"/></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text:span text:style-name="T72">FPC</text:span>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See also then next section for comments on source language.</text:p>
      <text:p text:style-name="P90"/>
      <text:h text:style-name="P205" text:outline-level="1"><text:bookmark-start text:name="__RefHeading___Toc15548_2478585429"/><text:bookmark-start text:name="_Toc528309089"/>The Pascal-P6 source language<text:bookmark-end text:name="__RefHeading___Toc15548_2478585429"/><text:bookmark-end text:name="_Toc528309089"/></text:h>
      <text:p text:style-name="Standard">Pascal-P6 understands the Pascaline source language as documented in pascaline.<text:span text:style-name="T48">pdf</text:span>, available in the doc or documents directory of Pascal-P6 project. Pascaline is fully compatible with ISO 7185. There are, however, several things you will find only in this documentation and not the Pascaline specific documentation:</text:p>
      <text:list text:style-name="WWNum12">
        <text:list-item>
          <text:p text:style-name="P216">Features of Pascaline that are not (yet) implemented in Pascal-P6.</text:p>
        </text:list-item>
        <text:list-item>
          <text:p text:style-name="P216">Local extensions in Pascal-P6 that are not also in general Pascaline.</text:p>
        </text:list-item>
        <text:list-item>
          <text:p text:style-name="P216">Concrete details of features in Pascaline specific to Pascal-P6.</text:p>
        </text:list-item>
      </text:list>
      <text:p text:style-name="Standard">These will be detailed.</text:p>
      <text:p text:style-name="P135"><draw:frame draw:style-name="fr1" draw:name="Frame1" text:anchor-type="char" svg:width="5.3063in" draw:z-index="0"><draw:text-box fo:min-height="4.5366in"><text:p text:style-name="Frame_20_contents"><draw:frame text:anchor-type="paragraph" draw:z-index="1" draw:name="Text Frame 1" draw:style-name="gr13" draw:text-style-name="P249" svg:width="1.8051in" svg:height="1.3177in" svg:x="1.7465in" svg:y="1.6465in"><draw:text-box><text:p text:style-name="P241">Pascal</text:p></draw:text-box></draw:frame><draw:frame text:anchor-type="paragraph" draw:z-index="2" draw:name="Text Frame 2" draw:style-name="gr12" draw:text-style-name="P249" svg:width="2.5858in" svg:height="2.5858in" svg:x="1.3563in" svg:y="1.0126in"><draw:text-box><text:p text:style-name="P241">Pascaline</text:p></draw:text-box></draw:frame><draw:frame text:anchor-type="paragraph" draw:z-index="3" draw:name="Text Frame 3" draw:style-name="gr11" draw:text-style-name="P249" svg:width="3.3661in" svg:height="3.4634in" svg:x="1.0146in" svg:y="0.622in"><draw:text-box><text:p text:style-name="P241">Pascal-P6</text:p></draw:text-box></draw:frame><draw:frame text:anchor-type="paragraph" draw:z-index="4" draw:name="Text Frame 4" draw:style-name="gr10" draw:text-style-name="P242" svg:width="2.4394in" svg:height="0.3567in" svg:x="0.1654in" svg:y="0.1339in"><draw:text-box><text:p>Language supersets</text:p></draw:text-box></draw:frame></text:p></draw:text-box></draw:frame><text:s/></text:p>
      <text:p text:style-name="P135">Pascal is the base language for Pascal-P6. Pascaline is a superset of Pascal. Pascal-P6 accepts both, but adds a few features of its own.</text:p>
      <text:h text:style-name="Heading_20_2" text:outline-level="2"><text:bookmark-start text:name="__RefHeading___Toc15550_2478585429"/><text:bookmark-start text:name="_Toc528309090"/>Features of Pascaline NOT implemented in Pascal-P6<text:bookmark-end text:name="__RefHeading___Toc15550_2478585429"/><text:bookmark-end text:name="_Toc528309090"/></text:h>
      <text:p text:style-name="Standard">The following features of Pascaline are not yet implemented in Pascal-<text:span text:style-name="T86">P6</text:span>. The expectation is all of them will be implemented shortly. Also keep in mind that Pascal-P6 is still a project in development, and carries a version number &lt; 1.0.</text:p>
      <text:p text:style-name="Standard"/>
      <table:table table:name="Table12" table:style-name="Table12" table:template-name="mytable5">
        <table:table-column table:style-name="Table12.A" table:number-columns-repeated="2"/>
        <text:soft-page-break/>
        <table:table-row table:style-name="Table12.1">
          <table:table-cell table:style-name="Table12.A1" office:value-type="string">
            <text:p text:style-name="P11">Pascaline manual section</text:p>
          </table:table-cell>
          <table:table-cell table:style-name="Table12.A1" office:value-type="string">
            <text:p text:style-name="P11">Description</text:p>
          </table:table-cell>
        </table:table-row>
        <table:table-row table:style-name="Table12.1">
          <table:table-cell table:style-name="Table12.A2" office:value-type="string">
            <text:p text:style-name="P11">6.35</text:p>
          </table:table-cell>
          <table:table-cell table:style-name="Table12.B2" office:value-type="string">
            <text:p text:style-name="P81">Matrix mathematics</text:p>
          </table:table-cell>
        </table:table-row>
        <table:table-row table:style-name="Table12.1">
          <table:table-cell table:style-name="Table12.A2" office:value-type="string">
            <text:p text:style-name="P11">6.36</text:p>
          </table:table-cell>
          <table:table-cell table:style-name="Table12.B3" office:value-type="string">
            <text:p text:style-name="P81">Saturated math operators</text:p>
          </table:table-cell>
        </table:table-row>
        <table:table-row table:style-name="Table12.1">
          <table:table-cell table:style-name="Table12.A2" office:value-type="string">
            <text:p text:style-name="P11">6.37</text:p>
          </table:table-cell>
          <table:table-cell table:style-name="Table12.B2" office:value-type="string">
            <text:p text:style-name="P81">Properties</text:p>
          </table:table-cell>
        </table:table-row>
        <table:table-row table:style-name="Table12.1">
          <table:table-cell table:style-name="Table12.A2" office:value-type="string">
            <text:p text:style-name="P11">6.39.5</text:p>
          </table:table-cell>
          <table:table-cell table:style-name="Table12.B3" office:value-type="string">
            <text:p text:style-name="P81">Parallel modules</text:p>
          </table:table-cell>
        </table:table-row>
        <table:table-row table:style-name="Table12.1">
          <table:table-cell table:style-name="Table12.A2" office:value-type="string">
            <text:p text:style-name="P11">6.40</text:p>
          </table:table-cell>
          <table:table-cell table:style-name="Table12.B2" office:value-type="string">
            <text:p text:style-name="P81">Channels</text:p>
          </table:table-cell>
        </table:table-row>
        <table:table-row table:style-name="Table12.1">
          <table:table-cell table:style-name="Table12.A2" office:value-type="string">
            <text:p text:style-name="P11">6.41</text:p>
          </table:table-cell>
          <table:table-cell table:style-name="Table12.B7" office:value-type="string">
            <text:p text:style-name="P81">Classes</text:p>
          </table:table-cell>
        </table:table-row>
      </table:table>
      <text:p text:style-name="Standard"/>
      <text:p text:style-name="Standard">Please see “pascaline.<text:span text:style-name="T73">pdf</text:span>” in the doc file section for more details on the Pascaline language.</text:p>
      <text:h text:style-name="Heading_20_2" text:outline-level="2"><text:bookmark-start text:name="__RefHeading___Toc15552_2478585429"/><text:bookmark-start text:name="_Toc528309093"/>Pascal-P6 implementation details<text:bookmark-end text:name="__RefHeading___Toc15552_2478585429"/><text:bookmark-end text:name="_Toc528309093"/></text:h>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9">Type</text:p>
          </table:table-cell>
          <table:table-cell table:style-name="Table13.A1" office:value-type="string">
            <text:p text:style-name="P9">Size/limit 16 bits</text:p>
          </table:table-cell>
          <table:table-cell table:style-name="Table13.A1" office:value-type="string">
            <text:p text:style-name="P11">Size/limit 32 bits</text:p>
          </table:table-cell>
          <table:table-cell table:style-name="Table13.A1" office:value-type="string">
            <text:p text:style-name="P11">Size/limit 64 bits</text:p>
          </table:table-cell>
        </table:table-row>
        <table:table-row table:style-name="Table13.1">
          <table:table-cell table:style-name="Table13.A2" office:value-type="string">
            <text:p text:style-name="P9">integer</text:p>
          </table:table-cell>
          <table:table-cell table:style-name="Table13.B2" office:value-type="string">
            <text:p text:style-name="P76">Maxint = <text:span text:style-name="T34">32767</text:span></text:p>
          </table:table-cell>
          <table:table-cell table:style-name="Table13.B2" office:value-type="string">
            <text:p text:style-name="P76"><text:span text:style-name="T21">maxint =</text:span><text:span text:style-name="T22">2147483647</text:span></text:p>
          </table:table-cell>
          <table:table-cell table:style-name="Table13.B2" office:value-type="string">
            <text:p text:style-name="P76">maxint = <text:span text:style-name="T5">9223372036854775807</text:span></text:p>
          </table:table-cell>
        </table:table-row>
        <table:table-row table:style-name="Table13.1">
          <table:table-cell table:style-name="Table13.A2" office:value-type="string">
            <text:p text:style-name="P9">linteger</text:p>
          </table:table-cell>
          <table:table-cell table:style-name="Table13.B3" office:value-type="string">
            <text:p text:style-name="P76">Alias of integer</text:p>
          </table:table-cell>
          <table:table-cell table:style-name="Table13.B3" office:value-type="string">
            <text:p text:style-name="P82">Alias of integer</text:p>
          </table:table-cell>
          <table:table-cell table:style-name="Table13.B3" office:value-type="string">
            <text:p text:style-name="P76">Alias of integer</text:p>
          </table:table-cell>
        </table:table-row>
        <table:table-row table:style-name="Table13.1">
          <table:table-cell table:style-name="Table13.A2" office:value-type="string">
            <text:p text:style-name="P9">cardinal</text:p>
          </table:table-cell>
          <table:table-cell table:style-name="Table13.B2" office:value-type="string">
            <text:p text:style-name="P76">Alias of integer</text:p>
          </table:table-cell>
          <table:table-cell table:style-name="Table13.B2" office:value-type="string">
            <text:p text:style-name="P82">Alias of integer</text:p>
          </table:table-cell>
          <table:table-cell table:style-name="Table13.B2" office:value-type="string">
            <text:p text:style-name="P76">Alias of integer</text:p>
          </table:table-cell>
        </table:table-row>
        <table:table-row table:style-name="Table13.1">
          <table:table-cell table:style-name="Table13.A2" office:value-type="string">
            <text:p text:style-name="P9">lcardinal</text:p>
          </table:table-cell>
          <table:table-cell table:style-name="Table13.B3" office:value-type="string">
            <text:p text:style-name="P76">Alias of integer</text:p>
          </table:table-cell>
          <table:table-cell table:style-name="Table13.B3" office:value-type="string">
            <text:p text:style-name="P82">Alias of integer</text:p>
          </table:table-cell>
          <table:table-cell table:style-name="Table13.B3" office:value-type="string">
            <text:p text:style-name="P76">Alias of integer</text:p>
          </table:table-cell>
        </table:table-row>
        <table:table-row table:style-name="Table13.1">
          <table:table-cell table:style-name="Table13.A2" office:value-type="string">
            <text:p text:style-name="P9">set</text:p>
          </table:table-cell>
          <table:table-cell table:style-name="Table13.B2" office:value-type="string">
            <text:p text:style-name="P76">256 elements</text:p>
          </table:table-cell>
          <table:table-cell table:style-name="Table13.B2" office:value-type="string">
            <text:p text:style-name="P82">256 elements</text:p>
          </table:table-cell>
          <table:table-cell table:style-name="Table13.B2" office:value-type="string">
            <text:p text:style-name="P76">256 elements</text:p>
          </table:table-cell>
        </table:table-row>
        <table:table-row table:style-name="Table13.1">
          <table:table-cell table:style-name="Table13.A2" office:value-type="string">
            <text:p text:style-name="P9">real</text:p>
          </table:table-cell>
          <table:table-cell table:style-name="Table13.B3" office:value-type="string">
            <text:p text:style-name="P76">64 bit real</text:p>
          </table:table-cell>
          <table:table-cell table:style-name="Table13.B3" office:value-type="string">
            <text:p text:style-name="P82">64 bit real</text:p>
          </table:table-cell>
          <table:table-cell table:style-name="Table13.B3" office:value-type="string">
            <text:p text:style-name="P76">64 bit real</text:p>
          </table:table-cell>
        </table:table-row>
        <table:table-row table:style-name="Table13.1">
          <table:table-cell table:style-name="Table13.A2" office:value-type="string">
            <text:p text:style-name="P9">sreal</text:p>
          </table:table-cell>
          <table:table-cell table:style-name="Table13.B2" office:value-type="string">
            <text:p text:style-name="P76">Alias of real</text:p>
          </table:table-cell>
          <table:table-cell table:style-name="Table13.B2" office:value-type="string">
            <text:p text:style-name="P82">Alias of real</text:p>
          </table:table-cell>
          <table:table-cell table:style-name="Table13.B2" office:value-type="string">
            <text:p text:style-name="P76">Alias of real</text:p>
          </table:table-cell>
        </table:table-row>
        <table:table-row table:style-name="Table13.1">
          <table:table-cell table:style-name="Table13.A2" office:value-type="string">
            <text:p text:style-name="P11">lreal</text:p>
          </table:table-cell>
          <table:table-cell table:style-name="Table13.B9" office:value-type="string">
            <text:p text:style-name="P76">Alias of real</text:p>
          </table:table-cell>
          <table:table-cell table:style-name="Table13.B9" office:value-type="string">
            <text:p text:style-name="P81">Alias of real</text:p>
          </table:table-cell>
          <table:table-cell table:style-name="Table13.B9" office:value-type="string">
            <text:p text:style-name="P76">Alias of real</text:p>
          </table:table-cell>
        </table:table-row>
      </table:table>
      <text:p text:style-name="Standard"/>
      <text:p text:style-name="Standard">The maximum size of any input line, identifier, or string constant is 250 characters.</text:p>
      <text:p text:style-name="Standard">The base character set is ISO 8859-1, or 8 bit characters. The compiler has no reliance on any character in the range 128 to 255 and will accept any character in that range for input or output.</text:p>
      <text:p text:style-name="P181">The currently supported CPU for compilation is the AMD64 64 bit machine. This implementation can interpret P-code decks for any of the above 16, 32 and 64 bit models.</text:p>
      <text:h text:style-name="Heading_20_3" text:outline-level="3"><text:bookmark-start text:name="__RefHeading___Toc15554_2478585429"/><text:bookmark-start text:name="_Toc528309094"/>Header files<text:bookmark-end text:name="__RefHeading___Toc15554_2478585429"/><text:bookmark-end text:name="_Toc528309094"/></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executed with a command line of:</text:p>
      <text:p text:style-name="Standard"><text:soft-page-break/>print document.txt</text:p>
      <text:p text:style-name="Standard">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_RefHeading___Toc15556_2478585429"/><text:bookmark-start text:name="_Toc528309095"/>Alternative header value input<text:bookmark-end text:name="__RefHeading___Toc15556_2478585429"/><text:bookmark-end text:name="_Toc528309095"/></text:h>
      <text:p text:style-name="Standard">Pascal-P6 can have integer or real parameters in the header file, in addition to just files:</text:p>
      <text:p text:style-name="Code">program test(myint, myreal);</text:p>
      <text:p text:style-name="Code"/>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_RefHeading___Toc15558_2478585429"/><text:bookmark-start text:name="_Toc528309096"/>Character escapes<text:bookmark-end text:name="__RefHeading___Toc15558_2478585429"/><text:bookmark-end text:name="_Toc528309096"/></text:h>
      <text:p text:style-name="Standard">Pascal-P6 implements Pascaline Annex E: character escapes in total.</text:p>
      <text:h text:style-name="Heading_20_3" text:outline-level="3"><text:bookmark-start text:name="__RefHeading___Toc15560_2478585429"/><text:bookmark-start text:name="_Toc528309097"/>Character sets<text:bookmark-end text:name="__RefHeading___Toc15560_2478585429"/><text:bookmark-end text:name="_Toc528309097"/></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_RefHeading___Toc15562_2478585429"/><text:bookmark-start text:name="_Ref527945403"/><text:bookmark-start text:name="_Toc528309098"/>Modular structure<text:bookmark-end text:name="__RefHeading___Toc15562_2478585429"/><text:bookmark-end text:name="_Ref527945403"/><text:bookmark-end text:name="_Toc528309098"/></text:h>
      <text:p text:style-name="P187">Pascal-P6 implements modules by <text:span text:style-name="T108">stacking the binaries or P-code intermediates and creating the output file. Each of the modules calls the next module in sequence until the program module is reached.</text:span></text:p>
      <text:h text:style-name="Heading_20_3" text:outline-level="3"><text:bookmark-start text:name="__RefHeading___Toc15564_2478585429"/>Implementation of Annexes G-O<text:bookmark-end text:name="__RefHeading___Toc15564_2478585429"/></text:h>
      <text:p text:style-name="Standard"><text:span text:style-name="T87">Pascal-P6</text:span>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20">Name of module</text:p>
          </table:table-cell>
          <table:table-cell table:style-name="Table14.A1" office:value-type="string">
            <text:p text:style-name="P20">Function</text:p>
          </table:table-cell>
        </table:table-row>
        <table:table-row table:style-name="Table14.1">
          <table:table-cell table:style-name="Table14.A2" office:value-type="string">
            <text:p text:style-name="P20">services</text:p>
          </table:table-cell>
          <table:table-cell table:style-name="Table14.B2" office:value-type="string">
            <text:p text:style-name="P87">Provides basic operating system services, such as directory list, environment variables, etc.</text:p>
          </table:table-cell>
        </table:table-row>
        <table:table-row table:style-name="Table14.1">
          <table:table-cell table:style-name="Table14.A2" office:value-type="string">
            <text:p text:style-name="P20">strings</text:p>
          </table:table-cell>
          <table:table-cell table:style-name="Table14.B3" office:value-type="string">
            <text:p text:style-name="P87">Operations on strings (arrays of characters).</text:p>
          </table:table-cell>
        </table:table-row>
        <table:table-row table:style-name="Table14.1">
          <table:table-cell table:style-name="Table14.A2" office:value-type="string">
            <text:p text:style-name="P20">math</text:p>
          </table:table-cell>
          <table:table-cell table:style-name="Table14.B2" office:value-type="string">
            <text:p text:style-name="P87">Extended math operations.</text:p>
          </table:table-cell>
        </table:table-row>
        <table:table-row table:style-name="Table14.1">
          <table:table-cell table:style-name="Table14.A2" office:value-type="string">
            <text:p text:style-name="P20">sound</text:p>
          </table:table-cell>
          <table:table-cell table:style-name="Table14.B5" office:value-type="string">
            <text:p text:style-name="P87">Access to sound system, including midi, wave input and output, etc.</text:p>
          </table:table-cell>
        </table:table-row>
        <table:table-row table:style-name="Table14.1">
          <table:table-cell table:style-name="Table14.A2" office:value-type="string">
            <text:p text:style-name="P20">terminal</text:p>
          </table:table-cell>
          <table:table-cell table:style-name="Table14.B2" office:value-type="string">
            <text:p text:style-name="P87">Access to a text based terminal.</text:p>
          </table:table-cell>
        </table:table-row>
        <table:table-row table:style-name="Table14.1">
          <table:table-cell table:style-name="Table14.A2" office:value-type="string">
            <text:p text:style-name="P20">graphics</text:p>
          </table:table-cell>
          <table:table-cell table:style-name="Table14.B7" office:value-type="string">
            <text:p text:style-name="P87">Access to a graphics terminal.</text:p>
          </table:table-cell>
        </table:table-row>
        <table:table-row table:style-name="Table14.1">
          <table:table-cell table:style-name="Table14.A2" office:value-type="string">
            <text:p text:style-name="P20">network</text:p>
          </table:table-cell>
          <table:table-cell table:style-name="Table14.B8" office:value-type="string">
            <text:p text:style-name="P87">Access to networking.</text:p>
          </table:table-cell>
        </table:table-row>
      </table:table>
      <text:p text:style-name="Standard"><text:soft-page-break/></text:p>
      <text:p text:style-name="P181">These libraries are compiled, but are accessible from the pint interpreter.</text:p>
      <text:p text:style-name="Standard">The Pascaline libraries, originally written in Pascaline, were rewritten in C (for several reasons), and appear as the independent library called “<text:span text:style-name="T102">A</text:span>mi!”. They can be accessed by any language.</text:p>
      <text:p text:style-name="Standard">Note that not all Pascaline libraries appear in <text:span text:style-name="T102">A</text:span>mi!. For example the strings module is still written in Pascaline, and makes no sense for other languages outside of Pascaline.</text:p>
      <text:h text:style-name="Heading_20_4" text:outline-level="4"><text:bookmark-start text:name="__RefHeading___Toc15568_2478585429"/>Using externals<text:bookmark-end text:name="__RefHeading___Toc15568_2478585429"/></text:h>
      <text:p text:style-name="P185">Pascal-P6 has three different kinds of externals:</text:p>
      <table:table table:name="Table15" table:style-name="Table15">
        <table:table-column table:style-name="Table15.A"/>
        <table:table-column table:style-name="Table15.B"/>
        <table:table-row table:style-name="Table15.1">
          <table:table-cell table:style-name="Table15.A1" office:value-type="string">
            <text:p text:style-name="P23">External type</text:p>
          </table:table-cell>
          <table:table-cell table:style-name="Table15.A1" office:value-type="string">
            <text:p text:style-name="P21">Function</text:p>
          </table:table-cell>
        </table:table-row>
        <table:table-row table:style-name="Table15.1">
          <table:table-cell table:style-name="Table15.A2" office:value-type="string">
            <text:p text:style-name="P23">external</text:p>
          </table:table-cell>
          <table:table-cell table:style-name="Table15.B2" office:value-type="string">
            <text:p text:style-name="P89">Pascaline externals.</text:p>
          </table:table-cell>
        </table:table-row>
        <table:table-row table:style-name="Table15.1">
          <table:table-cell table:style-name="Table15.A2" office:value-type="string">
            <text:p text:style-name="P23">cexternal</text:p>
          </table:table-cell>
          <table:table-cell table:style-name="Table15.B3" office:value-type="string">
            <text:p text:style-name="P89">Bare C external calls, using the C identifier.</text:p>
          </table:table-cell>
        </table:table-row>
        <table:table-row table:style-name="Table15.1">
          <table:table-cell table:style-name="Table15.A2" office:value-type="string">
            <text:p text:style-name="P23">mexternal</text:p>
          </table:table-cell>
          <table:table-cell table:style-name="Table15.B4" office:value-type="string">
            <text:p text:style-name="P89">Module coined external, using the name module_function.</text:p>
          </table:table-cell>
        </table:table-row>
      </table:table>
      <text:p text:style-name="P186"/>
      <text:p text:style-name="P188">Pascal-P6 uses standard AMD64 SVSV Unix/Linux calling conventions and can interface to external C language routines and other languages that can use the same calling convention.</text:p>
      <text:p text:style-name="P43"/>
      <text:p text:style-name="Standard"/>
      <text:p text:style-name="P90"/>
      <text:h text:style-name="P205" text:outline-level="1"><text:bookmark-start text:name="__RefNumPara__19924_1293392543"/><text:bookmark-start text:name="_Toc528309099"/><text:bookmark-start text:name="_Ref528308208"/><text:bookmark-start text:name="_Ref528308190"/><text:bookmark-start text:name="_Ref397024475"/><text:bookmark-start text:name="_Ref397024435"/><text:bookmark-start text:name="_Ref397024453"/><text:bookmark-start text:name="__RefHeading___Toc15570_2478585429"/>Using Pascal-P<text:bookmark-end text:name="_Ref397024475"/><text:bookmark-end text:name="_Ref397024435"/><text:bookmark-end text:name="_Ref397024453"/>6<text:bookmark-end text:name="__RefNumPara__19924_1293392543"/><text:bookmark-end text:name="_Toc528309099"/><text:bookmark-end text:name="_Ref528308208"/><text:bookmark-end text:name="_Ref528308190"/><text:bookmark-end text:name="__RefHeading___Toc15570_2478585429"/></text:h>
      <text:h text:style-name="Heading_20_2" text:outline-level="2"><text:bookmark-start text:name="__RefHeading___Toc15536_2478585429"/><text:span text:style-name="T38">Getting Pascal-P6: </text:span>Repositories for Pascal-P6<text:bookmark-end text:name="__RefHeading___Toc15536_2478585429"/></text:h>
      <text:p text:style-name="Standard">Pascal-P6 is managed using git version control system. It is stored at the following repositories:</text:p>
      <text:p text:style-name="P94"><text:a xlink:type="simple" xlink:href="https://github.com/samiam95124/Pascal-P6" text:style-name="Internet_20_link" text:visited-style-name="Visited_20_Internet_20_Link"><text:span text:style-name="Internet_20_link">https://github.com/samiam95124/Pascal-P6</text:span></text:a></text:p>
      <text:p text:style-name="P95">You can obtain Pascal-P6 from a given version of the system, or from the current tip <text:span text:style-name="T87">(the collection of most current files)</text:span>. Versioned trees contain code that has been extensively tested, but the tip will contain the latest code. The available versions can be found at:</text:p>
      <text:p text:style-name="P95"><text:a xlink:type="simple" xlink:href="https://github.com/samiam95124/Pascal-P6/releases" text:style-name="Internet_20_link" text:visited-style-name="Visited_20_Internet_20_Link">https://github.com/samiam95124/Pascal-P6/releases</text:a></text:p>
      <text:p text:style-name="P95">To obtain a release, go to the above page, find an archive type you want and click on it. <text:span text:style-name="T39">The archive methods are </text:span><text:span text:style-name="reference">zip</text:span><text:span text:style-name="T39"> and </text:span><text:span text:style-name="reference">tar.gz</text:span>. <text:span text:style-name="T39">To unpack each is approximately:</text:span></text:p>
      <text:p text:style-name="Code">$ unzip Pascal-P6-X.X.zip</text:p>
      <text:p text:style-name="Code"/>
      <text:p text:style-name="Code">$ tar -xvzf Pascal-P6-X.X.tar.gz</text:p>
      <text:p text:style-name="Code"/>
      <text:p text:style-name="P96">To download the tip typically is:</text:p>
      <text:p text:style-name="P96">$ git clone <text:a xlink:type="simple" xlink:href="https://github.com/samiam95124/Pascal-P6.git" text:style-name="Internet_20_link" text:visited-style-name="Visited_20_Internet_20_Link">https://github.com/samiam95124/Pascal-P6.git</text:a></text:p>
      <text:p text:style-name="P97">Besides the advantage of having the current code, using git to obtain a file tree also gives you source control capabilities.</text:p>
      <text:p text:style-name="Standard">Please submit any bug tickets to:</text:p>
      <text:p text:style-name="Standard"><text:a xlink:type="simple" xlink:href="https://github.com/samiam95124/Pascal-P6/issues" text:style-name="Internet_20_link" text:visited-style-name="Visited_20_Internet_20_Link">https://github.com/samiam95124/Pascal-P6/issues</text:a></text:p>
      <text:h text:style-name="Heading_20_2" text:outline-level="2"><text:bookmark-start text:name="__RefHeading___Toc15572_2478585429"/><text:bookmark-start text:name="_Toc528309100"/><text:bookmark-start text:name="_Toc320481273"/>Configuring Pascal-P<text:bookmark-end text:name="_Toc320481273"/>6<text:bookmark-end text:name="__RefHeading___Toc15572_2478585429"/><text:bookmark-end text:name="_Toc528309100"/></text:h>
      <text:p text:style-name="Standard"><text:span text:style-name="T87">Pascal-</text:span>P6 has a simple configuration script to set up the binary, script files and compiler in use for the system, that uses the proper defaults for your system. <text:span text:style-name="T40">Go to the root directory and execute</text:span>:</text:p>
      <text:p text:style-name="Standard">[Linux]</text:p>
      <text:p text:style-name="Code">$ . setpath</text:p>
      <text:p text:style-name="Code">$ ./configure</text:p>
      <text:p text:style-name="Code">$ <text:span text:style-name="T99">build</text:span> <text:span text:style-name="T42">(optional, </text:span><text:span text:style-name="T106">only if you want to rebuild the binaries</text:span><text:span text:style-name="T42">)</text:span></text:p>
      <text:p text:style-name="Code"/>
      <text:p text:style-name="Standard">You can avoid <text:span text:style-name="T37">the need for</text:span> <text:span text:style-name="reference">setpath</text:span> by placing the ./bin directory on your path. <text:span text:style-name="T40">You will also want to set the environment variable:</text:span></text:p>
      <text:p text:style-name="Code">export PASCALP6="$PWD"</text:p>
      <text:p text:style-name="Code"/>
      <text:p text:style-name="P97">Different scripts in the archive reference this environment variable.</text:p>
      <text:p text:style-name="Standard">The configure script attempts to automatically determine the environment you are running under, choose the correct compiler, bit width of your computer, etc. You can override this by using the options for configure:</text:p>
      <table:table table:name="Table16" table:style-name="Table16" table:template-name="mytable5">
        <table:table-column table:style-name="Table16.A" table:number-columns-repeated="2"/>
        <text:soft-page-break/>
        <table:table-row table:style-name="Table16.1">
          <table:table-cell table:style-name="Table16.A1" office:value-type="string">
            <text:p text:style-name="P9">Option</text:p>
          </table:table-cell>
          <table:table-cell table:style-name="Table16.A1" office:value-type="string">
            <text:p text:style-name="P9">Meaning</text:p>
          </table:table-cell>
        </table:table-row>
        <table:table-row table:style-name="Table16.1">
          <table:table-cell table:style-name="Table16.A2" office:value-type="string">
            <text:p text:style-name="P9">--<text:span text:style-name="T35">iso7185</text:span></text:p>
          </table:table-cell>
          <table:table-cell table:style-name="Table16.B2" office:value-type="string">
            <text:p text:style-name="P86">Selects the Pascal-P6 compiler (default).</text:p>
          </table:table-cell>
        </table:table-row>
        <table:table-row table:style-name="Table16.1">
          <table:table-cell table:style-name="Table16.A2" office:value-type="string">
            <text:p text:style-name="P9">--32</text:p>
          </table:table-cell>
          <table:table-cell table:style-name="Table16.B3" office:value-type="string">
            <text:p text:style-name="P82">Selects 32 bit mode.</text:p>
          </table:table-cell>
        </table:table-row>
        <table:table-row table:style-name="Table16.1">
          <table:table-cell table:style-name="Table16.A2" office:value-type="string">
            <text:p text:style-name="P9">--64</text:p>
          </table:table-cell>
          <table:table-cell table:style-name="Table16.B2" office:value-type="string">
            <text:p text:style-name="P82">Selects 64 bit mode.</text:p>
          </table:table-cell>
        </table:table-row>
        <table:table-row table:style-name="Table16.1">
          <table:table-cell table:style-name="Table16.A2" office:value-type="string">
            <text:p text:style-name="P11">--help</text:p>
          </table:table-cell>
          <table:table-cell table:style-name="Table16.B5" office:value-type="string">
            <text:p text:style-name="P81">Prints a help menu.</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p text:style-name="P157">The configure script loads precompiled versions of the binaries for the system into the bin/ directory. At this writing, these are for Linux/Ubuntu 64 bit systems. If you do not have the means or don’t wish to rebuild the binaries, you can leave them to be the defaults and not run a <text:span text:style-name="T104">build</text:span> on the project.</text:p>
      <text:p text:style-name="P158">Example configure:</text:p>
      <text:p text:style-name="Code">Pascal-P6$ ./configure</text:p>
      <text:p text:style-name="Code">Set up for iso7185</text:p>
      <text:p text:style-name="Code">Bit length 64</text:p>
      <text:p text:style-name="Code">Configure completed!</text:p>
      <text:p text:style-name="Code"/>
      <text:p text:style-name="P193">Note that the installed compiler must match the current host if you want to build for the current machine.</text:p>
      <text:h text:style-name="Heading_20_2" text:outline-level="2"><text:bookmark-start text:name="__RefHeading___Toc15574_2478585429"/><text:bookmark-start text:name="_Toc528309101"/><text:bookmark-start text:name="_Ref320508880"/><text:bookmark-start text:name="_Ref320508875"/><text:bookmark-start text:name="_Ref320508786"/><text:bookmark-start text:name="_Ref320508793"/><text:bookmark-start text:name="_Toc320481274"/>Compiling and running Pascal programs with Pascal-P<text:bookmark-end text:name="_Ref320508880"/><text:bookmark-end text:name="_Ref320508875"/><text:bookmark-end text:name="_Ref320508786"/><text:bookmark-end text:name="_Ref320508793"/><text:bookmark-end text:name="_Toc320481274"/>6<text:bookmark-end text:name="__RefHeading___Toc15574_2478585429"/><text:bookmark-end text:name="_Toc528309101"/></text:h>
      <text:p text:style-name="P183"><text:span text:style-name="T104">Use the </text:span><text:span text:style-name="T110">pc</text:span><text:span text:style-name="T104"> compiler shell to create runnable Pascaline programs:</text:span></text:p>
      <text:p text:style-name="Code"><text:span text:style-name="T36">$</text:span> p<text:span text:style-name="T99">c</text:span> hello</text:p>
      <text:p text:style-name="P173">$ ./hello</text:p>
      <text:p text:style-name="Code"/>
      <text:p text:style-name="Standard">When a pascal program is run this way, it gets it's input from the terminal (you), and prints its results there.</text:p>
      <text:h text:style-name="Heading_20_3" text:outline-level="3"><text:bookmark-start text:name="__RefHeading___Toc15578_2478585429"/><text:bookmark-start text:name="_Toc528309103"/>Compiling on different run configurations<text:bookmark-end text:name="__RefHeading___Toc15578_2478585429"/><text:bookmark-end text:name="_Toc528309103"/></text:h>
      <text:p text:style-name="Standard">There are several types of run arrangements for <text:span text:style-name="T110">pc</text:span>. The current options are:</text:p>
      <table:table table:name="Table17" table:style-name="Table17" table:template-name="mytable5">
        <table:table-column table:style-name="Table17.A" table:number-columns-repeated="2"/>
        <table:table-row table:style-name="Table17.1">
          <table:table-cell table:style-name="Table17.A1" office:value-type="string">
            <text:p text:style-name="P11">Option</text:p>
          </table:table-cell>
          <table:table-cell table:style-name="Table17.A1" office:value-type="string">
            <text:p text:style-name="P11">Meaning</text:p>
          </table:table-cell>
        </table:table-row>
        <table:table-row table:style-name="Table17.1">
          <table:table-cell table:style-name="Table17.A2" office:value-type="string">
            <text:p text:style-name="P11">-pint</text:p>
          </table:table-cell>
          <table:table-cell table:style-name="Table17.B2" office:value-type="string">
            <text:p text:style-name="P81">Run on the pint machine.</text:p>
          </table:table-cell>
        </table:table-row>
        <table:table-row table:style-name="Table17.1">
          <table:table-cell table:style-name="Table17.A2" office:value-type="string">
            <text:p text:style-name="P11">-pmach</text:p>
          </table:table-cell>
          <table:table-cell table:style-name="Table17.B3" office:value-type="string">
            <text:p text:style-name="P81">Run on the pmach machine.</text:p>
          </table:table-cell>
        </table:table-row>
        <table:table-row table:style-name="Table17.1">
          <table:table-cell table:style-name="Table17.A2" office:value-type="string">
            <text:p text:style-name="P11">-cmach</text:p>
          </table:table-cell>
          <table:table-cell table:style-name="Table17.B2" office:value-type="string">
            <text:p text:style-name="P81">Run on the cmach machine.</text:p>
          </table:table-cell>
        </table:table-row>
        <table:table-row table:style-name="Table17.5">
          <table:table-cell table:style-name="Table17.A2" office:value-type="string">
            <text:p text:style-name="P11">-package</text:p>
          </table:table-cell>
          <table:table-cell table:style-name="Table17.B3" office:value-type="string">
            <text:p text:style-name="P81">Run via the packaging option (using cmach).</text:p>
          </table:table-cell>
        </table:table-row>
        <table:table-row table:style-name="Table17.6">
          <table:table-cell table:style-name="Table17.A2" office:value-type="string">
            <text:p text:style-name="P11">-<text:span text:style-name="T41">pgen</text:span></text:p>
          </table:table-cell>
          <table:table-cell table:style-name="Table17.B6" office:value-type="string">
            <text:p text:style-name="P85">Run via binary generation <text:span text:style-name="T49">(default)</text:span>.</text:p>
          </table:table-cell>
        </table:table-row>
      </table:table>
      <text:p text:style-name="Standard"/>
      <text:p text:style-name="P98"><text:soft-page-break/>Typical configurations are:</text:p>
      <text:p text:style-name="Code">p<text:span text:style-name="T100">c</text:span> –<text:span text:style-name="T49">pint </text:span>test</text:p>
      <text:p text:style-name="P176">pint test</text:p>
      <text:p text:style-name="Code"/>
      <text:p text:style-name="P98">For interpretation.</text:p>
      <text:p text:style-name="Code">p<text:span text:style-name="T100">c</text:span> test</text:p>
      <text:p text:style-name="Code">./test</text:p>
      <text:p text:style-name="Code"/>
      <text:p text:style-name="P98">For compilation to binary <text:span text:style-name="T100">executable and run</text:span>.</text:p>
      <text:p text:style-name="P98">Note that a compiled binary, either –pgen or –package, results in a standalone binary that can run without need for <text:span text:style-name="T100">interpretation</text:span>.</text:p>
      <text:p text:style-name="P184"><text:span text:style-name="T26">pc</text:span> only creates runnable binaries or interpreter files. <text:span text:style-name="T105">These are either run directly (an executable), or run via one of the interpreters.</text:span></text:p>
      <text:h text:style-name="Heading_20_2" text:outline-level="2"><text:bookmark-start text:name="__RefHeading___Toc30934_3822401252"/>The basic programs<text:bookmark-end text:name="__RefHeading___Toc30934_3822401252"/></text:h>
      <text:p text:style-name="P99">The <text:span text:style-name="T100">pc </text:span><text:span text:style-name="T104">compiler shell</text:span> operate<text:span text:style-name="T100">s</text:span> via the basic binary programs:</text:p>
      <text:h text:style-name="Routine_20_heading_20_3" text:outline-level="3"><text:bookmark-start text:name="__RefHeading___Toc21209_4012244740"/>pcom &lt;source file&gt; <text:span text:style-name="T100">[</text:span>&lt;intermediate file&gt;<text:span text:style-name="T100">]</text:span> <text:span text:style-name="T100">[</text:span>&lt;options&gt;<text:span text:style-name="T100">]</text:span><text:bookmark-end text:name="__RefHeading___Toc21209_4012244740"/></text:h>
      <text:p text:style-name="P99">Compiles a Pascaline source file to produce an intermediate language file.</text:p>
      <text:h text:style-name="Routine_20_heading_20_3" text:outline-level="3"><text:bookmark-start text:name="__RefHeading___Toc21211_4012244740"/>pint<text:span text:style-name="T109">[t|g]</text:span> &lt;intermediate file&gt; &lt;output file&gt; <text:span text:style-name="T100">[</text:span>&lt;options&gt;<text:span text:style-name="T100">]</text:span><text:bookmark-end text:name="__RefHeading___Toc21211_4012244740"/></text:h>
      <text:p text:style-name="P99">Either interprets the given intermediate file or converts it to a binary deck to the output. <text:span text:style-name="T109">pintt runs the program with a terminal level interface. pintg runs the program with a graphical level interface.</text:span></text:p>
      <text:h text:style-name="Routine_20_heading_20_3" text:outline-level="3"><text:bookmark-start text:name="__RefHeading___Toc21213_4012244740"/>pmach<text:span text:style-name="T109">[t|g]</text:span> &lt;binary deck&gt; &lt;output file&gt; <text:span text:style-name="T100">[</text:span>&lt;options&gt;<text:span text:style-name="T100">]</text:span><text:bookmark-end text:name="__RefHeading___Toc21213_4012244740"/></text:h>
      <text:p text:style-name="P100">Loads and interprets the given binary deck. <text:span text:style-name="T109">pmacht runs the program with a terminal level interface. pmachg runs the program with a graphical level interface.</text:span></text:p>
      <text:h text:style-name="Routine_20_heading_20_3" text:outline-level="3"><text:bookmark-start text:name="__RefHeading___Toc21215_4012244740"/>cmach<text:span text:style-name="T109">[t|g]</text:span> &lt;binary deck&gt; <text:span text:style-name="T101">[</text:span>&lt;options&gt;<text:span text:style-name="T101">]</text:span><text:bookmark-end text:name="__RefHeading___Toc21215_4012244740"/></text:h>
      <text:p text:style-name="P99">Loads and interprets the given binary deck. The same as pmach, but it is encoded in C.</text:p>
      <text:h text:style-name="Routine_20_heading_20_3" text:outline-level="3"><text:bookmark-start text:name="__RefHeading___Toc21217_4012244740"/>pgen &lt;intermediate code&gt; &lt;assembly file&gt; <text:span text:style-name="T101">[</text:span>&lt;options&gt;<text:span text:style-name="T101">]</text:span><text:bookmark-end text:name="__RefHeading___Toc21217_4012244740"/></text:h>
      <text:p text:style-name="P99">Converts the input intermediate code into assembly code for the current host processor. This is subsequently converted to a binary by an assembler or C compiler.</text:p>
      <text:p text:style-name="P182">The pc compiler shell is normally used to run compilations. You won’t need to run each of the subprograms individually. See also the chapter on pc <text:bookmark-ref text:reference-format="chapter" text:ref-name="__RefHeading___Toc21289_4012244740">4</text:bookmark-ref>:<text:bookmark-ref text:reference-format="text" text:ref-name="__RefHeading___Toc21289_4012244740">pc: The Pascal-P6 compiler integrator</text:bookmark-ref>.</text:p>
      <text:h text:style-name="Heading_20_2" text:outline-level="2"><text:bookmark-start text:name="__RefHeading___Toc1840015_3010434754"/><text:bookmark-start text:name="_Ref528132800"/><text:bookmark-start text:name="_Ref528132821"/><text:bookmark-start text:name="_Toc320481276"/><text:bookmark-start text:name="_Toc528309104"/><text:bookmark-start text:name="_Ref528135318"/>Compiler options<text:bookmark-end text:name="__RefHeading___Toc1840015_3010434754"/><text:bookmark-end text:name="_Ref528132800"/><text:bookmark-end text:name="_Ref528132821"/><text:bookmark-end text:name="_Toc320481276"/><text:bookmark-end text:name="_Toc528309104"/><text:bookmark-end text:name="_Ref528135318"/></text:h>
      <text:p text:style-name="Standard"><text:span text:style-name="T103">You can use options on the command line for each Pascal-P6 program. If the options appear on a </text:span><text:span text:style-name="T27">pc</text:span><text:span text:style-name="T103"> compiler shell command, they will be passed on to the appropriate program. </text:span>Pascal-P6 uses a "compiler comment" to indicate options to the compiler, of the form:</text:p>
      <text:p text:style-name="Standard">(*$option+/-, ...*)</text:p>
      <text:p text:style-name="Standard"><text:soft-page-break/>This option can appear anywhere a normal comment can. The first character of the comment MUST be "$". This is followed by any number if option switches separated by ",". If the option end<text:span text:style-name="T97">s</text:span> with "+", it means to turn it <text:span text:style-name="T24">on</text:span>. If the option ends with "-", it means turn it <text:span text:style-name="T24">off</text:span>. If neither appear, it means to turn the option <text:span text:style-name="T24">on</text:span>.</text:p>
      <text:p text:style-name="Standard">Example:</text:p>
      <text:p text:style-name="Standard">(*$l-*)</text:p>
      <text:p text:style-name="Standard">Turns the listing of the source code OFF.</text:p>
      <text:p text:style-name="Standard">Alternately, the options can be specified on the command line:</text:p>
      <text:p text:style-name="Standard">p<text:span text:style-name="T101">c</text:span> -[-]option[+/-]</text:p>
      <text:p text:style-name="Standard">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24">on</text:span>, and ‘-’ turns the option <text:span text:style-name="T24">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office:value-type="string">
            <text:p text:style-name="P22">Short option</text:p>
          </table:table-cell>
          <table:table-cell table:style-name="Table18.A1" office:value-type="string">
            <text:p text:style-name="P22">Long option</text:p>
          </table:table-cell>
          <table:table-cell table:style-name="Table18.A1" office:value-type="string">
            <text:p text:style-name="P22">Meaning</text:p>
          </table:table-cell>
          <table:table-cell table:style-name="Table18.A1" office:value-type="string">
            <text:p text:style-name="P22">Default</text:p>
          </table:table-cell>
        </table:table-row>
        <table:table-row table:style-name="Table18.1">
          <table:table-cell table:style-name="Table18.A2" office:value-type="string">
            <text:p text:style-name="P22">t+/-</text:p>
          </table:table-cell>
          <table:table-cell table:style-name="Table18.B2" office:value-type="string">
            <text:p text:style-name="P22">prttables+/-</text:p>
          </table:table-cell>
          <table:table-cell table:style-name="Table18.C2" office:value-type="string">
            <text:p text:style-name="P88">Print/don't print internal tables after each routine is compiled.</text:p>
          </table:table-cell>
          <table:table-cell table:style-name="Table18.C2" office:value-type="string">
            <text:p text:style-name="P88">OFF</text:p>
          </table:table-cell>
        </table:table-row>
        <table:table-row table:style-name="Table18.1">
          <table:table-cell table:style-name="Table18.A3" office:value-type="string">
            <text:p text:style-name="P22">l+/-</text:p>
          </table:table-cell>
          <table:table-cell table:style-name="Table18.B3" office:value-type="string">
            <text:p text:style-name="P22">list+/-</text:p>
          </table:table-cell>
          <table:table-cell table:style-name="Table18.C3" office:value-type="string">
            <text:p text:style-name="P88">List/don't list the source program during compilation.</text:p>
          </table:table-cell>
          <table:table-cell table:style-name="Table18.D3" office:value-type="string">
            <text:p text:style-name="P88">ON</text:p>
          </table:table-cell>
        </table:table-row>
        <table:table-row table:style-name="Table18.1">
          <table:table-cell table:style-name="Table18.A2" office:value-type="string">
            <text:p text:style-name="P22">d+/-</text:p>
          </table:table-cell>
          <table:table-cell table:style-name="Table18.B2" office:value-type="string">
            <text:p text:style-name="P22">chk+/-</text:p>
          </table:table-cell>
          <table:table-cell table:style-name="Table18.C2" office:value-type="string">
            <text:p text:style-name="P88">Add extra code to check array bounds, subranges, etc.</text:p>
          </table:table-cell>
          <table:table-cell table:style-name="Table18.C2" office:value-type="string">
            <text:p text:style-name="P88">ON</text:p>
          </table:table-cell>
        </table:table-row>
        <table:table-row table:style-name="Table18.1">
          <table:table-cell table:style-name="Table18.A3" office:value-type="string">
            <text:p text:style-name="P22">c+/-</text:p>
          </table:table-cell>
          <table:table-cell table:style-name="Table18.B3" office:value-type="string">
            <text:p text:style-name="P22">lstcod+/-</text:p>
          </table:table-cell>
          <table:table-cell table:style-name="Table18.C3" office:value-type="string">
            <text:p text:style-name="P88">Output/don't output intermediate code.</text:p>
          </table:table-cell>
          <table:table-cell table:style-name="Table18.D3" office:value-type="string">
            <text:p text:style-name="P88">ON</text:p>
          </table:table-cell>
        </table:table-row>
        <table:table-row table:style-name="Table18.1">
          <table:table-cell table:style-name="Table18.A2" office:value-type="string">
            <text:p text:style-name="P22">v+/-</text:p>
          </table:table-cell>
          <table:table-cell table:style-name="Table18.B2" office:value-type="string">
            <text:p text:style-name="P22">chkvar+/-</text:p>
          </table:table-cell>
          <table:table-cell table:style-name="Table18.C2" office:value-type="string">
            <text:p text:style-name="P88">Check variant records.</text:p>
          </table:table-cell>
          <table:table-cell table:style-name="Table18.C2" office:value-type="string">
            <text:p text:style-name="P88">ON</text:p>
          </table:table-cell>
        </table:table-row>
        <table:table-row table:style-name="Table18.1">
          <table:table-cell table:style-name="Table18.A3" office:value-type="string">
            <text:p text:style-name="P22">r+/+</text:p>
          </table:table-cell>
          <table:table-cell table:style-name="Table18.B3" office:value-type="string">
            <text:p text:style-name="P22">reference+/-</text:p>
          </table:table-cell>
          <table:table-cell table:style-name="Table18.C3" office:value-type="string">
            <text:p text:style-name="P88">Perform reference checking.</text:p>
          </table:table-cell>
          <table:table-cell table:style-name="Table18.D3" office:value-type="string">
            <text:p text:style-name="P88">ON</text:p>
          </table:table-cell>
        </table:table-row>
        <table:table-row table:style-name="Table18.1">
          <table:table-cell table:style-name="Table18.A2" office:value-type="string">
            <text:p text:style-name="P22">u+/-</text:p>
          </table:table-cell>
          <table:table-cell table:style-name="Table18.B2" office:value-type="string">
            <text:p text:style-name="P22">undestag+/-</text:p>
          </table:table-cell>
          <table:table-cell table:style-name="Table18.C2" office:value-type="string">
            <text:p text:style-name="P88">Perform undiscriminated variant checking.</text:p>
          </table:table-cell>
          <table:table-cell table:style-name="Table18.C2" office:value-type="string">
            <text:p text:style-name="P88">ON</text:p>
          </table:table-cell>
        </table:table-row>
        <table:table-row table:style-name="Table18.1">
          <table:table-cell table:style-name="Table18.A3" office:value-type="string">
            <text:p text:style-name="P22">s+/-</text:p>
          </table:table-cell>
          <table:table-cell table:style-name="Table18.B3" office:value-type="string">
            <text:p text:style-name="P22">iso7185+/-</text:p>
          </table:table-cell>
          <table:table-cell table:style-name="Table18.C3" office:value-type="string">
            <text:p text:style-name="P88">Restrict input language to ISO 7185 Pascal.</text:p>
          </table:table-cell>
          <table:table-cell table:style-name="Table18.D3" office:value-type="string">
            <text:p text:style-name="P88">OFF</text:p>
          </table:table-cell>
        </table:table-row>
        <table:table-row table:style-name="Table18.1">
          <table:table-cell table:style-name="Table18.A2" office:value-type="string">
            <text:p text:style-name="P22">x+/-</text:p>
          </table:table-cell>
          <table:table-cell table:style-name="Table18.B2" office:value-type="string">
            <text:p text:style-name="P22">prtlex+/-</text:p>
          </table:table-cell>
          <table:table-cell table:style-name="Table18.C2" office:value-type="string">
            <text:p text:style-name="P88">Dump lexical information during the run.</text:p>
          </table:table-cell>
          <table:table-cell table:style-name="Table18.C2" office:value-type="string">
            <text:p text:style-name="P88">OFF</text:p>
          </table:table-cell>
        </table:table-row>
        <table:table-row table:style-name="Table18.1">
          <table:table-cell table:style-name="Table18.A3" office:value-type="string">
            <text:p text:style-name="P22">b+/-</text:p>
          </table:table-cell>
          <table:table-cell table:style-name="Table18.B3" office:value-type="string">
            <text:p text:style-name="P22">prtlab+/-</text:p>
          </table:table-cell>
          <table:table-cell table:style-name="Table18.C3" office:value-type="string">
            <text:p text:style-name="P88">Print goto labels used at the end of the compile.</text:p>
          </table:table-cell>
          <table:table-cell table:style-name="Table18.D3" office:value-type="string">
            <text:p text:style-name="P88">OFF</text:p>
          </table:table-cell>
        </table:table-row>
        <table:table-row table:style-name="Table18.1">
          <table:table-cell table:style-name="Table18.A2" office:value-type="string">
            <text:p text:style-name="P22">y+/-</text:p>
          </table:table-cell>
          <table:table-cell table:style-name="Table18.B2" office:value-type="string">
            <text:p text:style-name="P22">prtdisplay+/-</text:p>
          </table:table-cell>
          <table:table-cell table:style-name="Table18.C2" office:value-type="string">
            <text:p text:style-name="P88">Dump display information at the end of the compile (symbols).</text:p>
          </table:table-cell>
          <table:table-cell table:style-name="Table18.C2" office:value-type="string">
            <text:p text:style-name="P88">OFF</text:p>
          </table:table-cell>
        </table:table-row>
        <table:table-row table:style-name="Table18.1">
          <table:table-cell table:style-name="Table18.A3" office:value-type="string">
            <text:p text:style-name="P22">i+/-</text:p>
          </table:table-cell>
          <table:table-cell table:style-name="Table18.B3" office:value-type="string">
            <text:p text:style-name="P22">varblk+/-</text:p>
          </table:table-cell>
          <table:table-cell table:style-name="Table18.C3" office:value-type="string">
            <text:p text:style-name="P88">Check <text:s/>VAR block violations.</text:p>
          </table:table-cell>
          <table:table-cell table:style-name="Table18.D3" office:value-type="string">
            <text:p text:style-name="P88">OFF</text:p>
          </table:table-cell>
        </table:table-row>
        <table:table-row table:style-name="Table18.1">
          <table:table-cell table:style-name="Table18.A2" office:value-type="string">
            <text:p text:style-name="P22">g+/-</text:p>
          </table:table-cell>
          <table:table-cell table:style-name="Table18.B2" office:value-type="string">
            <text:p text:style-name="P22">prtlabdef+/-</text:p>
          </table:table-cell>
          <table:table-cell table:style-name="Table18.C2" office:value-type="string">
            <text:p text:style-name="P88">Dump goto and other location labels at intermediate assembly time.</text:p>
          </table:table-cell>
          <table:table-cell table:style-name="Table18.C2" office:value-type="string">
            <text:p text:style-name="P88">OFF</text:p>
          </table:table-cell>
        </table:table-row>
        <table:table-row table:style-name="Table18.1">
          <table:table-cell table:style-name="Table18.A3" office:value-type="string">
            <text:p text:style-name="P22">h+/-</text:p>
          </table:table-cell>
          <table:table-cell table:style-name="Table18.B3" office:value-type="string">
            <text:p text:style-name="P22">sourceset+/-</text:p>
          </table:table-cell>
          <table:table-cell table:style-name="Table18.C3" office:value-type="string">
            <text:p text:style-name="P88">Add source line sets to code. This tells pint where the source lines are in the code.</text:p>
          </table:table-cell>
          <table:table-cell table:style-name="Table18.D3" office:value-type="string">
            <text:p text:style-name="P88">ON</text:p>
          </table:table-cell>
        </table:table-row>
        <table:table-row table:style-name="Table18.1">
          <table:table-cell table:style-name="Table18.A2" office:value-type="string">
            <text:p text:style-name="P22">n+/-</text:p>
          </table:table-cell>
          <table:table-cell table:style-name="Table18.B2" office:value-type="string">
            <text:p text:style-name="P22">recycle+/-</text:p>
          </table:table-cell>
          <table:table-cell table:style-name="Table18.C2" office:value-type="string">
            <text:p text:style-name="P88">Obey heap recycle requests. If false, no space is recycled.</text:p>
          </table:table-cell>
          <table:table-cell table:style-name="Table18.C2" office:value-type="string">
            <text:p text:style-name="P88">ON</text:p>
          </table:table-cell>
        </table:table-row>
        <table:table-row table:style-name="Table18.1">
          <table:table-cell table:style-name="Table18.A3" office:value-type="string">
            <text:p text:style-name="P22">o+/-</text:p>
          </table:table-cell>
          <table:table-cell table:style-name="Table18.B3" office:value-type="string">
            <text:p text:style-name="P22">chkoverflo+/-</text:p>
          </table:table-cell>
          <table:table-cell table:style-name="Table18.C3" office:value-type="string">
            <text:p text:style-name="P88">Check for arithmetic overflow.</text:p>
          </table:table-cell>
          <table:table-cell table:style-name="Table18.D3" office:value-type="string">
            <text:p text:style-name="P88">ON</text:p>
          </table:table-cell>
        </table:table-row>
        <table:table-row table:style-name="Table18.1">
          <table:table-cell table:style-name="Table18.A2" office:value-type="string">
            <text:p text:style-name="P22">p+/-</text:p>
          </table:table-cell>
          <table:table-cell table:style-name="Table18.B2" office:value-type="string">
            <text:p text:style-name="P22">chkreuse+/-</text:p>
          </table:table-cell>
          <table:table-cell table:style-name="Table18.C2" office:value-type="string">
            <text:p text:style-name="P88">Check for reuse of freed entry in heap space.</text:p>
          </table:table-cell>
          <table:table-cell table:style-name="Table18.C2" office:value-type="string">
            <text:p text:style-name="P88">OFF</text:p>
          </table:table-cell>
        </table:table-row>
        <table:table-row table:style-name="Table18.1">
          <table:table-cell table:style-name="Table18.A3" office:value-type="string">
            <text:p text:style-name="P22">m+/-</text:p>
          </table:table-cell>
          <table:table-cell table:style-name="Table18.B3" office:value-type="string">
            <text:p text:style-name="P22">breakheap+/-</text:p>
          </table:table-cell>
          <table:table-cell table:style-name="Table18.C3" office:value-type="string">
            <text:p text:style-name="P88">Break returned entries in heap into occupied and free blocks.</text:p>
          </table:table-cell>
          <table:table-cell table:style-name="Table18.D3" office:value-type="string">
            <text:p text:style-name="P88">OFF</text:p>
          </table:table-cell>
        </table:table-row>
        <table:table-row table:style-name="Table18.1">
          <table:table-cell table:style-name="Table18.A2" office:value-type="string">
            <text:p text:style-name="P22">q+/-</text:p>
          </table:table-cell>
          <table:table-cell table:style-name="Table18.B2" office:value-type="string">
            <text:p text:style-name="P22">chkundef+/-</text:p>
          </table:table-cell>
          <table:table-cell table:style-name="Table18.C2" office:value-type="string">
            <text:p text:style-name="P88">Check accesses to undefined memory.</text:p>
          </table:table-cell>
          <table:table-cell table:style-name="Table18.C2" office:value-type="string">
            <text:p text:style-name="P88">ON</text:p>
          </table:table-cell>
        </table:table-row>
        <table:table-row table:style-name="Table18.1">
          <table:table-cell table:style-name="Table18.A3" office:value-type="string">
            <text:p text:style-name="P22">w+/-</text:p>
          </table:table-cell>
          <table:table-cell table:style-name="Table18.B3" office:value-type="string">
            <text:p text:style-name="P22">debug+/-</text:p>
          </table:table-cell>
          <table:table-cell table:style-name="Table18.C3" office:value-type="string">
            <text:p text:style-name="P88">Enter debug mode (pint only).</text:p>
          </table:table-cell>
          <table:table-cell table:style-name="Table18.D3" office:value-type="string">
            <text:p text:style-name="P88">OFF</text:p>
          </table:table-cell>
        </table:table-row>
        <table:table-row table:style-name="Table18.1">
          <table:table-cell table:style-name="Table18.A2" office:value-type="string">
            <text:p text:style-name="P22">a+/-</text:p>
          </table:table-cell>
          <table:table-cell table:style-name="Table18.B2" office:value-type="string">
            <text:p text:style-name="P22">debugflt+/-</text:p>
          </table:table-cell>
          <table:table-cell table:style-name="Table18.C2" office:value-type="string">
            <text:p text:style-name="P88">Enter debugger on fault</text:p>
          </table:table-cell>
          <table:table-cell table:style-name="Table18.C2" office:value-type="string">
            <text:p text:style-name="P88">OFF</text:p>
          </table:table-cell>
        </table:table-row>
        <table:table-row table:style-name="Table18.1">
          <table:table-cell table:style-name="Table18.A3" office:value-type="string">
            <text:p text:style-name="P22">f+/-</text:p>
          </table:table-cell>
          <table:table-cell table:style-name="Table18.B3" office:value-type="string">
            <text:p text:style-name="P22">debugsrc+/-</text:p>
          </table:table-cell>
          <table:table-cell table:style-name="Table18.C3" office:value-type="string">
            <text:p text:style-name="P88">Perform source level debugging.</text:p>
          </table:table-cell>
          <table:table-cell table:style-name="Table18.D3" office:value-type="string">
            <text:p text:style-name="P88">OFF</text:p>
          </table:table-cell>
        </table:table-row>
        <table:table-row table:style-name="Table18.1">
          <table:table-cell table:style-name="Table18.A2" office:value-type="string">
            <text:p text:style-name="P22">e+/-</text:p>
          </table:table-cell>
          <table:table-cell table:style-name="Table18.B2" office:value-type="string">
            <text:p text:style-name="P22">machdeck+/-</text:p>
          </table:table-cell>
          <table:table-cell table:style-name="Table18.C2" office:value-type="string">
            <text:p text:style-name="P88">Output binary deck from pint instead of running the assembled results (pint only).</text:p>
          </table:table-cell>
          <table:table-cell table:style-name="Table18.C2" office:value-type="string">
            <text:p text:style-name="P88">OFF</text:p>
          </table:table-cell>
        </table:table-row>
        <table:table-row table:style-name="Table18.1">
          <table:table-cell table:style-name="Table18.A25" office:value-type="string">
            <text:p text:style-name="P22">ee+/-</text:p>
          </table:table-cell>
          <table:table-cell table:style-name="Table18.B25" office:value-type="string">
            <text:p text:style-name="P22">experror+/-</text:p>
          </table:table-cell>
          <table:table-cell table:style-name="Table18.C25" office:value-type="string">
            <text:p text:style-name="P88">Output expanded error descriptions.</text:p>
          </table:table-cell>
          <table:table-cell table:style-name="Table18.D25" office:value-type="string">
            <text:p text:style-name="P88">ON</text:p>
          </table:table-cell>
        </table:table-row>
        <table:table-row table:style-name="Table18.1">
          <table:table-cell table:style-name="Table18.A25" office:value-type="string">
            <text:p text:style-name="P25">z+/-</text:p>
          </table:table-cell>
          <table:table-cell table:style-name="Table18.B25" office:value-type="string">
            <text:p text:style-name="P27">lineinfo+/-</text:p>
          </table:table-cell>
          <table:table-cell table:style-name="Table18.C25" office:value-type="string">
            <text:p text:style-name="P150">Output line statistics.</text:p>
          </table:table-cell>
          <table:table-cell table:style-name="Table18.D25" office:value-type="string">
            <text:p text:style-name="P150">ON</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h text:style-name="Heading_20_3" text:outline-level="3"><text:bookmark-start text:name="__RefHeading___Toc15580_2478585429"/><text:bookmark-start text:name="_Toc528309105"/>Option descriptions<text:bookmark-end text:name="__RefHeading___Toc15580_2478585429"/><text:bookmark-end text:name="_Toc528309105"/></text:h>
      <text:p text:style-name="Standard">List format is: short form, long form, description.</text:p>
      <text:h text:style-name="P33" text:outline-level="3"><text:bookmark-start text:name="__RefHeading___Toc18874_1027172818"/>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33" text:outline-level="3"><text:bookmark-start text:name="__RefHeading___Toc18876_1027172818"/><text:soft-page-break/>l+/-<text:tab/>list+/-<text:tab/><text:tab/>List/don't list the source program during compilation.<text:bookmark-end text:name="__RefHeading___Toc18876_1027172818"/></text:h>
      <text:p text:style-name="Standard">Enables the compiler to output a source listing.</text:p>
      <text:h text:style-name="P33"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33" text:outline-level="3"><text:bookmark-start text:name="__RefHeading___Toc18880_1027172818"/>c+/-<text:tab/>lstcod+/-<text:tab/>Output/don't output intermediate code.<text:bookmark-end text:name="__RefHeading___Toc18880_1027172818"/></text:h>
      <text:p text:style-name="P37">Supresses the creation of the intermediate file contents. Note that the output intermediate file is always created, but it’s contents will be empty.</text:p>
      <text:p text:style-name="P37"/>
      <text:h text:style-name="P33"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33"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33"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33"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23">not a ISO 7185 compliance flag</text:span>. Pascaline is completely compliant with ISO 7185 Pascal regardless of the state of the s option. It simply restricts the source language to ISO 7185 Pascal only.</text:p>
      <text:h text:style-name="P33"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33" text:outline-level="3"><text:bookmark-start text:name="__RefHeading___Toc18892_1027172818"/>b+/-<text:tab/>prtlab+/-<text:tab/>Print goto labels used at the end of the compile.<text:bookmark-end text:name="__RefHeading___Toc18892_1027172818"/></text:h>
      <text:p text:style-name="Standard">Prints all goto labels used in the compile. For debugging purposes.</text:p>
      <text:h text:style-name="P33" text:outline-level="3"><text:bookmark-start text:name="__RefHeading___Toc18894_1027172818"/>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33" text:outline-level="3"><text:bookmark-start text:name="__RefHeading___Toc18896_1027172818"/>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33" text:outline-level="3"><text:bookmark-start text:name="__RefHeading___Toc18898_1027172818"/><text:soft-page-break/>g+/-<text:tab/>prtlabdef+/-<text:tab/>Dump goto and other location labels at intermediate assembly time.<text:bookmark-end text:name="__RefHeading___Toc18898_1027172818"/></text:h>
      <text:p text:style-name="Standard">Dumps the interpreter label tables at the end of intermediate assembly.</text:p>
      <text:h text:style-name="P33"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33"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33"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33"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33"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33"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33" text:outline-level="3"><text:bookmark-start text:name="__RefHeading___Toc18912_1027172818"/>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33" text:outline-level="3"><text:bookmark-start text:name="__RefHeading___Toc18914_1027172818"/>a+/-<text:tab/>debugflt+/-<text:tab/>Enter debugger on fault<text:bookmark-end text:name="__RefHeading___Toc18914_1027172818"/></text:h>
      <text:p text:style-name="Standard">Enters debug mode if any fault occurs. See also the w option.</text:p>
      <text:h text:style-name="P33" text:outline-level="3"><text:bookmark-start text:name="__RefHeading___Toc18916_1027172818"/>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33" text:outline-level="3"><text:bookmark-start text:name="__RefHeading___Toc18918_1027172818"/><text:soft-page-break/>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At the end of the compiler run, a list of errors by number, the number of occurre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 text:c="5"/>1 <text:s text:c="5"/>-48 program test(output); </text:p>
      <text:p text:style-name="Code"><text:s text:c="5"/>2 <text:s text:c="5"/>-48 <text:s/></text:p>
      <text:p text:style-name="Code"><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text:soft-page-break/></text:p>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P211" text:outline-level="2"><text:bookmark-start text:name="__RefHeading___Toc15582_2478585429 Copy 1"/>Runtime errors<text:bookmark-end text:name="__RefHeading___Toc15582_2478585429 Copy 1"/><text:bookmark text:name="_Toc320481275 Copy 1"/><text:bookmark text:name="_Toc528309106 Copy 1"/></text:h>
      <text:p text:style-name="P111">When a binary executable is run, the errors appear as:</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p>
      <text:p text:style-name="Code"><text:s text:c="5"/>2 <text:s text:c="6"/>-8 <text:s/></text:p>
      <text:p text:style-name="Code"><text:s text:c="5"/>3 <text:s text:c="6"/>-8 begin </text:p>
      <text:p text:style-name="Code"><text:s text:c="5"/>4 <text:s text:c="7"/>5 <text:s/></text:p>
      <text:p text:style-name="Code"><text:s text:c="5"/>5 <text:s text:c="7"/>5 <text:s text:c="3"/>writeln(1/0) </text:p>
      <text:p text:style-name="Code"><text:s text:c="5"/>6 <text:s text:c="6"/>14 <text:s/></text:p>
      <text:p text:style-name="Code"><text:s text:c="5"/>7 <text:s text:c="6"/>14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smxSEo.o: in function `resetfn':</text:p>
      <text:p text:style-name="Code">/home/samiam/projects/pascal/pascal-p6/source/AMD64/gcc/psystem.c:1846: warning: the use of `tmpnam' is dangerous, better use `mkstemp'</text:p>
      <text:p text:style-name="Code"/>
      <text:p text:style-name="Code">*** Runtime error: test:5:Zero divide</text:p>
      <text:p text:style-name="Code"/>
      <text:p text:style-name="P111">The module name where the error occurred and the line number of the error is given.</text:p>
      <text:h text:style-name="Heading_20_2" text:outline-level="2"><text:bookmark-start text:name="__RefHeading___Toc15582_2478585429"/><text:bookmark-start text:name="_Toc320481275"/><text:bookmark-start text:name="_Toc528309106"/>Other operations<text:bookmark-end text:name="__RefHeading___Toc15582_2478585429"/><text:bookmark-end text:name="_Toc320481275"/><text:bookmark-end text:name="_Toc528309106"/></text:h>
      <text:p text:style-name="Standard">Within the Pascal-P6 toolset, you will find a series of scripts to perform common operations using Pascal-P6. This includes building the compiler and interpreter using an existing ISO 7185 compatible compiler, and also testing Pascal-P6. <text:span text:style-name="T111">These script commands will be described in the chapter of their use.</text:span></text:p>
      <text:p text:style-name="Standard"><text:soft-page-break/>The scripts used in Pascal-P6 are designed to be independent of what operating system you are running on. The Pascal-P6 system as been successfully run on the following systems<text:note text:id="ftn4" text:note-class="footnote"><text:note-citation>4</text:note-citation><text:note-body><text:p text:style-name="P110">At the present time, the Windows and Mac OS X support is not functioning.</text:p></text:note-body></text:note>:</text:p>
      <text:list text:style-name="WWNum4">
        <text:list-item>
          <text:p text:style-name="P217">Windows</text:p>
        </text:list-item>
        <text:list-item>
          <text:p text:style-name="P217">Ubuntu linux</text:p>
        </text:list-item>
        <text:list-item>
          <text:p text:style-name="P217">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p text:style-name="P194">All of the relevant scripts have .bat equivalents. You need to have a bash installed on your Windows machine to use them. They work by referring the script to the bash shell on Windows.</text:p>
      <text:h text:style-name="Heading_20_2" text:outline-level="2"><text:bookmark-start text:name="__RefHeading___Toc15584_2478585429"/><text:bookmark-start text:name="_Ref320531638"/><text:bookmark-start text:name="_Ref320531634"/><text:bookmark-start text:name="_Toc320481277"/><text:bookmark-start text:name="_Toc528309107"/>Reliance on Unix commands in the Pascal-P6 toolset<text:bookmark-end text:name="__RefHeading___Toc15584_2478585429"/><text:bookmark-end text:name="_Ref320531638"/><text:bookmark-end text:name="_Ref320531634"/><text:bookmark-end text:name="_Toc320481277"/><text:bookmark-end text:name="_Toc528309107"/></text:h>
      <text:p text:style-name="Standard">Most of the scripts in this package, even the DOS/Windows scripts, rely on Unix commands like <text:span text:style-name="T111">bash, </text:span>cp, sed, diff, chmod and others.</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Using the Mingw toolkit, it is possible to use the bash scripts by simply executing bash under Windows.</text:p>
      <text:p text:style-name="P112">Alternately, you can use the WSL or “Windows Subsystem for Linux”.</text:p>
      <text:h text:style-name="Heading_20_2" text:outline-level="2"><text:bookmark-start text:name="__RefHeading___Toc15586_2478585429"/><text:bookmark-start text:name="_Toc528309108"/><text:bookmark-start text:name="_Toc320481278"/>The “flip” command and line endings<text:bookmark-end text:name="__RefHeading___Toc15586_2478585429"/><text:bookmark-end text:name="_Toc528309108"/><text:bookmark-end text:name="_Toc320481278"/></text:h>
      <text:p text:style-name="Standard">Every effort was made to make the Pascal-P6 compile and evaluate system independent of what system it is running on, from Windows command shell, to Linux with Bash shell. One common <text:span text:style-name="T50">problem </text:span>is that several utilities don’t appreciate seeing a line ending outside of their “native” line ending, such as CRLF for Windows, and LF for linux. Examples include “diff” (find file differences) and Bash.</text:p>
      <text:p text:style-name="P194">To aid in preventing line ending issues a command “flip” is included with Pascal-P6 in the C language. You can use this program to change the line endings to match your host system.</text:p>
      <text:p text:style-name="Standard">To make the flip utility, you run:</text:p>
      <text:p text:style-name="Standard">$ make_flip</text:p>
      <text:p text:style-name="Standard">Then flip will exist in the root directory.</text:p>
      <text:p text:style-name="Standard"/>
      <text:p text:style-name="P90"/>
      <text:h text:style-name="P206" text:outline-level="1"><text:bookmark-start text:name="__RefHeading___Toc21289_4012244740"/>pc: The Pascal-P6 compiler integrator<text:bookmark-end text:name="__RefHeading___Toc21289_4012244740"/></text:h>
      <text:h text:style-name="Heading_20_2" text:outline-level="2"><text:bookmark-start text:name="__RefHeading___Toc21291_4012244740"/>Overview<text:bookmark-end text:name="__RefHeading___Toc21291_4012244740"/></text:h>
      <text:p text:style-name="Standard">pc is a compiler shell that manages the entire compile-assemble-link pipeline for Pascal programs. Rather than invoking the compiler (pcom), code generator (pgen), assembler, and linker individually, pc handles the full process in a single command. It examines the dependency tree of a program (through uses and joins statements), checks file modification times, and rebuilds only those modules that have changed, similar to the Unix "make" utility.</text:p>
      <text:p text:style-name="Standard">The key difference between pc and make is that pc automatically determines which libraries and modules are needed by parsing the source code directly. There is no need to write or maintain a Makefile. pc builds a complete dependency tree, identifies which files are out of date, and performs only the necessary compilation and linking steps.</text:p>
      <text:p text:style-name="Standard">pc supports multiple compilation targets: native executables (the default, using pgen), and interpreted modes (pint, pmach, cmach) for use with the P-machine interpreters. It also supports a package mode for creating portable binaries.</text:p>
      <text:h text:style-name="Heading_20_2" text:outline-level="2"><text:bookmark-start text:name="__RefHeading___Toc21293_4012244740"/>Command format<text:bookmark-end text:name="__RefHeading___Toc21293_4012244740"/></text:h>
      <text:p text:style-name="Standard">The basic command line format is:</text:p>
      <text:p text:style-name="Code">$ pc [options] &lt;file&gt; [options]</text:p>
      <text:p text:style-name="Standard">where &lt;file&gt; is the Pascal source file to compile. The .pas extension is added automatically if not present. Options may appear before or after the filename. For example:</text:p>
      <text:p text:style-name="Code">$ pc myprogram</text:p>
      <text:p text:style-name="Code">$ pc -list myprogram.pas</text:p>
      <text:p text:style-name="Code">$ pc myprogram -v -t</text:p>
      <text:p text:style-name="Code"/>
      <text:p text:style-name="Standard">Options are specified with a dash prefix. Most options can be negated by adding an "n" prefix after the dash. For example, -list enables source listing and -nlist disables it. <text:span text:style-name="T112">To match the compiler, using a trailing +/- also enables or disables the option. </text:span>Options that have both a short form and a long form can be specified with either.</text:p>
      <text:h text:style-name="Heading_20_2" text:outline-level="2"><text:bookmark-start text:name="__RefHeading___Toc21295_4012244740"/>Operation<text:bookmark-end text:name="__RefHeading___Toc21295_4012244740"/></text:h>
      <text:p text:style-name="Standard">When pc is invoked, it proceeds through the following stages:</text:p>
      <text:p text:style-name="Standard">1. Instruction file loading. pc searches for instruction files (pc.ins) in the program directory, the user home directory, and the current directory, and loads any that are found. It also loads any instruction file with the same base name as the target program (e.g., myprogram.ins). These files can set options, declare module paths, and exclude directories from recompilation.</text:p>
      <text:p text:style-name="Standard">2. Command line parsing. pc parses the command line for options and the target filename.</text:p>
      <text:p text:style-name="Standard">3. Dependency analysis. pc parses the target source file and recursively follows all uses and joins statements to build a complete dependency tree. Each module referenced by the program is located using the module path.</text:p>
      <text:p text:style-name="Standard">4. Registration. pc examines each file in the dependency tree and determines whether it needs to be rebuilt. A file needs rebuilding if its source (.pas) is newer than its compiled output (.p6, .o), or if the -rebuild option was specified. Files in excluded directories are never rebuilt.</text:p>
      <text:p text:style-name="Standard"><text:soft-page-break/>5. Compilation. For each file that needs rebuilding, pc invokes the compiler (pcom) to produce intermediate code (.p6), then the code generator (pgen) to produce assembly (.s), then gcc to produce object code (.o). In interpreter modes (pint, pmach, cmach), only the compilation to .p6 is performed.</text:p>
      <text:p text:style-name="Standard">6. Linking. pc combines all outputs into the final result. For native executables, gcc links the .o files together with the runtime system. For interpreter modes, the .p6 files are concatenated. For package mode, an additional binary encoding step is performed.</text:p>
      <text:h text:style-name="Heading_20_2" text:outline-level="2"><text:bookmark-start text:name="__RefHeading___Toc21297_4012244740"/>pc options<text:bookmark-end text:name="__RefHeading___Toc21297_4012244740"/></text:h>
      <text:p text:style-name="Standard">Options specific to pc control its behavior during compilation. These options are not passed through to the compiler.</text:p>
      <text:h text:style-name="Heading_20_3" text:outline-level="3"><text:bookmark-start text:name="__RefHeading___Toc21299_4012244740"/>Option descriptions<text:bookmark-end text:name="__RefHeading___Toc21299_4012244740"/></text:h>
      <text:h text:style-name="P33" text:outline-level="3">h<text:tab/>help<text:tab/>Print this help message and exit.</text:h>
      <text:h text:style-name="P33" text:outline-level="3"><text:bookmark-start text:name="__RefHeading___Toc21301_4012244740"/>v+/-<text:tab/><text:span text:style-name="T113">[n]</text:span>verbose+/-<text:tab/>Enable/disable verbose output.<text:bookmark-end text:name="__RefHeading___Toc21301_4012244740"/></text:h>
      <text:p text:style-name="Standard">When enabled (the default), pc prints progress messages showing each compilation step being performed. Disable with -nv or -nverbose for quiet operation.</text:p>
      <text:h text:style-name="P33" text:outline-level="3"><text:bookmark-start text:name="__RefHeading___Toc21303_4012244740"/>t+/-<text:tab/><text:span text:style-name="T113">[n]</text:span>tree+/-<text:tab/>List/don't list the dependency tree.<text:bookmark-end text:name="__RefHeading___Toc21303_4012244740"/></text:h>
      <text:p text:style-name="Standard">Prints the complete dependency tree that pc has built by following uses and joins statements. Useful for understanding which modules are included in a build and their relationships.</text:p>
      <text:h text:style-name="P33" text:outline-level="3"><text:bookmark-start text:name="__RefHeading___Toc21305_4012244740"/>a+/-<text:tab/><text:span text:style-name="T113">[n]</text:span>action+/-<text:tab/>List/don't list the actions being performed.<text:bookmark-end text:name="__RefHeading___Toc21305_4012244740"/></text:h>
      <text:p text:style-name="Standard">Prints each command that pc executes (compiler, assembler, linker invocations). Can be combined with -dry to preview what would be done without actually doing it.</text:p>
      <text:h text:style-name="P33" text:outline-level="3"><text:bookmark-start text:name="__RefHeading___Toc21307_4012244740"/>d+/-<text:tab/><text:span text:style-name="T113">[n]</text:span>dry+/-<text:tab/>Enable/disable dry run mode.<text:bookmark-end text:name="__RefHeading___Toc21307_4012244740"/></text:h>
      <text:p text:style-name="Standard">When enabled, pc goes through all the analysis steps but does not actually execute any commands. Use with -action to see what commands would be run. This is useful for previewing large builds before committing to them.</text:p>
      <text:h text:style-name="P33" text:outline-level="3"><text:bookmark-start text:name="__RefHeading___Toc21309_4012244740"/>r+/-<text:tab/><text:span text:style-name="T113">[n]</text:span>rebuild+/-<text:tab/>Force/don't force rebuild of all files.<text:bookmark-end text:name="__RefHeading___Toc21309_4012244740"/></text:h>
      <text:h text:style-name="P33" text:outline-level="3">doc+/-<text:tab/><text:span text:style-name="T113">[n]</text:span>document+/-<text:tab/>Generate documentation for the target program by running pasdoc on it.</text:h>
      <text:h text:style-name="P33" text:outline-level="3"><text:tab/><text:span text:style-name="T113">[n]</text:span>html+/-<text:tab/>When generating documentation, produce HTML output instead of plain text.</text:h>
      <text:p text:style-name="Standard">When enabled, pc ignores file modification times and rebuilds every file in the dependency tree. This is equivalent to a clean build.</text:p>
      <text:h text:style-name="Heading_20_2" text:outline-level="2"><text:bookmark-start text:name="__RefHeading___Toc21311_4012244740"/>Run configuration options<text:bookmark-end text:name="__RefHeading___Toc21311_4012244740"/></text:h>
      <text:p text:style-name="Standard">These options select the compilation target. Only one should be active at a time. If none is specified, pc defaults to generating a native executable (pgen mode).</text:p>
      <text:h text:style-name="P33" text:outline-level="3"><text:bookmark-start text:name="__RefHeading___Toc21313_4012244740"/><text:soft-page-break/><text:tab/><text:span text:style-name="T113">[n]</text:span>pgen+/-<text:tab/>Compile for native executable (default).<text:bookmark-end text:name="__RefHeading___Toc21313_4012244740"/></text:h>
      <text:p text:style-name="Standard">Generates a native executable by running the full pipeline: pcom (compiler), pgen (code generator), gcc (assembler and linker). This is the default mode.</text:p>
      <text:h text:style-name="P33" text:outline-level="3"><text:bookmark-start text:name="__RefHeading___Toc21315_4012244740"/><text:tab/><text:span text:style-name="T113">[n]</text:span>pint+/-<text:tab/>Compile for the pint interpreter.<text:bookmark-end text:name="__RefHeading___Toc21315_4012244740"/></text:h>
      <text:p text:style-name="Standard">Compiles only to .p6 intermediate code, suitable for execution by pint. The .p6 files for all modules are concatenated into a single file.</text:p>
      <text:h text:style-name="P33" text:outline-level="3"><text:bookmark-start text:name="__RefHeading___Toc21317_4012244740"/><text:tab/><text:span text:style-name="T113">[n]</text:span>pmach+/-<text:tab/>Compile for the pmach interpreter.<text:bookmark-end text:name="__RefHeading___Toc21317_4012244740"/></text:h>
      <text:p text:style-name="Standard">Compiles to .p6 intermediate code, then uses pint --machdeck to create a .p6o binary for execution by pmach.</text:p>
      <text:h text:style-name="P33" text:outline-level="3"><text:bookmark-start text:name="__RefHeading___Toc21319_4012244740"/><text:tab/><text:span text:style-name="T113">[n]</text:span>cmach+/-<text:tab/>Compile for the cmach interpreter.<text:bookmark-end text:name="__RefHeading___Toc21319_4012244740"/></text:h>
      <text:p text:style-name="Standard">Same as pmach, producing a .p6o binary suitable for execution by cmach.</text:p>
      <text:h text:style-name="P33" text:outline-level="3"><text:bookmark-start text:name="__RefHeading___Toc21321_4012244740"/><text:tab/><text:span text:style-name="T113">[n]</text:span>package+/-<text:tab/>Compile for package mode.<text:bookmark-end text:name="__RefHeading___Toc21321_4012244740"/></text:h>
      <text:p text:style-name="Standard">Produces a self-contained packaged binary. After creating the .p6o file, pc runs genobj to embed it in a C array, then compiles and links with gcc to create a standalone executable that carries the P-machine code within it.</text:p>
      <text:h text:style-name="Heading_20_2" text:outline-level="2"><text:bookmark-start text:name="__RefHeading___Toc21323_4012244740"/>Graphical and symbol options<text:bookmark-end text:name="__RefHeading___Toc21323_4012244740"/></text:h>
      <text:h text:style-name="P33" text:outline-level="3"><text:bookmark-start text:name="__RefHeading___Toc21325_4012244740"/>ktw+/-<text:tab/><text:span text:style-name="T113">[n]</text:span>keepterminalwindow+/-<text:tab/>Keep/don't keep the terminal window open for graphical applications.<text:bookmark-end text:name="__RefHeading___Toc21325_4012244740"/></text:h>
      <text:p text:style-name="Standard">When enabled, the terminal window remains open after a graphical application exits. This is useful for seeing any text output produced by a graphical program. <text:span text:style-name="T113">This option applies to Windows only.</text:span></text:p>
      <text:h text:style-name="P33" text:outline-level="3"><text:bookmark-start text:name="__RefHeading___Toc21327_4012244740"/>dt+/-<text:tab/><text:span text:style-name="T113">[n]</text:span>defaultterminal+/-<text:tab/>Default to terminal mode.<text:bookmark-end text:name="__RefHeading___Toc21327_4012244740"/></text:h>
      <text:p text:style-name="Standard">Forces the application to use terminal (text) mode I/O.</text:p>
      <text:h text:style-name="P33" text:outline-level="3"><text:bookmark-start text:name="__RefHeading___Toc21329_4012244740"/>dg+/-<text:tab/><text:span text:style-name="T113">[n]</text:span>defaultgraphical+/-<text:tab/>Default to graphical mode.<text:bookmark-end text:name="__RefHeading___Toc21329_4012244740"/></text:h>
      <text:p text:style-name="Standard">Forces the application to use graphical mode I/O.</text:p>
      <text:h text:style-name="P33" text:outline-level="3"><text:bookmark-start text:name="__RefHeading___Toc21331_4012244740"/>sc+/-<text:tab/><text:span text:style-name="T113">[n]</text:span>symcoff+/-<text:tab/>Generate/don't generate COFF symbols in the binary.<text:bookmark-end text:name="__RefHeading___Toc21331_4012244740"/></text:h>
      <text:h text:style-name="P33" text:outline-level="3"><text:tab/><text:span text:style-name="T113">[n]</text:span>static+/-<text:tab/>Link the executable statically (the default, for portability), or dynamically with -nstatic.</text:h>
      <text:p text:style-name="Standard">When enabled, generates COFF (Common Object File Format) debugging symbols in the output binary. <text:span text:style-name="T113">This option applies to Windows only.</text:span></text:p>
      <text:h text:style-name="Heading_20_2" text:outline-level="2"><text:bookmark-start text:name="__RefHeading___Toc21333_4012244740"/>Module path option<text:bookmark-end text:name="__RefHeading___Toc21333_4012244740"/></text:h>
      <text:h text:style-name="P33" text:outline-level="3"><text:bookmark-start text:name="__RefHeading___Toc21335_4012244740"/>mp=&lt;path&gt;<text:tab/>modulepath=&lt;path&gt;<text:tab/>Specify the module search path.<text:bookmark-end text:name="__RefHeading___Toc21335_4012244740"/></text:h>
      <text:h text:style-name="P33" text:outline-level="3">ef=&lt;file&gt;<text:tab/>errfile=&lt;file&gt;<text:tab/>Set the file that compiler error output is written to.</text:h>
      <text:p text:style-name="Standard">Sets or appends to the module search path. Multiple paths are separated by colons. Modules referenced by uses and joins statements are located by searching these paths in order. The module path can also be set via the MODULEPATH environment variable or via a modulepath command in an instruction file.</text:p>
      <text:p text:style-name="Standard"><text:soft-page-break/>Example:</text:p>
      <text:p text:style-name="Code">$ pc -mp="../libs:../source" myprogram</text:p>
      <text:h text:style-name="Heading_20_2" text:outline-level="2"><text:bookmark-start text:name="__RefHeading___Toc21337_4012244740"/>Compiler passthrough options<text:bookmark-end text:name="__RefHeading___Toc21337_4012244740"/></text:h>
      <text:p text:style-name="Standard">The following options are passed through to the Pascal compiler (pcom). They control compiler behavior such as runtime checking, listing output, and debugging features. Each option can be negated with an "n" prefix (e.g., -nlist). For full descriptions of what each option does, see the compiler options section.</text:p>
      <text:h text:style-name="P189" text:outline-level="3"><text:bookmark-start text:name="__RefHeading___Toc21339_4012244740"/><text:soft-page-break/><text:tab/><text:span text:style-name="T113">[n]</text:span>prtlab+/-<text:tab/><text:tab/>See the compiler options.<text:bookmark-end text:name="__RefHeading___Toc21339_4012244740"/></text:h>
      <text:h text:style-name="P189" text:outline-level="3"><text:bookmark-start text:name="__RefHeading___Toc21341_4012244740"/><text:tab/><text:span text:style-name="T113">[n]</text:span>lstcod+/-<text:tab/><text:tab/>See the compiler options.<text:bookmark-end text:name="__RefHeading___Toc21341_4012244740"/></text:h>
      <text:h text:style-name="P189" text:outline-level="3"><text:bookmark-start text:name="__RefHeading___Toc21343_4012244740"/><text:tab/><text:span text:style-name="T113">[n]</text:span>chk+/-<text:tab/><text:tab/>See the compiler options.<text:bookmark-end text:name="__RefHeading___Toc21343_4012244740"/></text:h>
      <text:h text:style-name="P189" text:outline-level="3"><text:bookmark-start text:name="__RefHeading___Toc21345_4012244740"/><text:tab/><text:span text:style-name="T113">[n]</text:span>prtlabdef+/-<text:tab/>See the compiler options.<text:bookmark-end text:name="__RefHeading___Toc21345_4012244740"/></text:h>
      <text:h text:style-name="P189" text:outline-level="3"><text:bookmark-start text:name="__RefHeading___Toc21347_4012244740"/><text:tab/><text:span text:style-name="T113">[n]</text:span>sourceset+/-<text:tab/>See the compiler options.<text:bookmark-end text:name="__RefHeading___Toc21347_4012244740"/></text:h>
      <text:h text:style-name="P189" text:outline-level="3"><text:bookmark-start text:name="__RefHeading___Toc21349_4012244740"/><text:tab/><text:span text:style-name="T113">[n]</text:span>varblk+/-<text:tab/><text:tab/>See the compiler options.<text:bookmark-end text:name="__RefHeading___Toc21349_4012244740"/></text:h>
      <text:h text:style-name="P189" text:outline-level="3"><text:bookmark-start text:name="__RefHeading___Toc21351_4012244740"/><text:tab/><text:span text:style-name="T113">[n]</text:span>experror+/-<text:tab/><text:tab/>See the compiler options.<text:bookmark-end text:name="__RefHeading___Toc21351_4012244740"/></text:h>
      <text:h text:style-name="P190" text:outline-level="3"><text:bookmark-start text:name="__RefHeading___Toc21353_4012244740"/><text:tab/><text:span text:style-name="T113">[n]</text:span>echoline+/-<text:tab/><text:tab/>See the compiler options.<text:bookmark-end text:name="__RefHeading___Toc21353_4012244740"/></text:h>
      <text:h text:style-name="P190" text:outline-level="3"><text:bookmark-start text:name="__RefHeading___Toc21355_4012244740"/>l+/-<text:tab/><text:span text:style-name="T113">[n]</text:span>list+/-<text:tab/><text:tab/>See the compiler options.<text:bookmark-end text:name="__RefHeading___Toc21355_4012244740"/></text:h>
      <text:h text:style-name="P190" text:outline-level="3"><text:bookmark-start text:name="__RefHeading___Toc21357_4012244740"/><text:tab/><text:span text:style-name="T113">[n]</text:span>breakheap+/-<text:tab/>See the compiler options.<text:bookmark-end text:name="__RefHeading___Toc21357_4012244740"/></text:h>
      <text:h text:style-name="P190" text:outline-level="3"><text:bookmark-start text:name="__RefHeading___Toc21359_4012244740"/><text:tab/><text:span text:style-name="T113">[n]</text:span>recycle+/-<text:tab/><text:tab/>See the compiler options.<text:bookmark-end text:name="__RefHeading___Toc21359_4012244740"/></text:h>
      <text:h text:style-name="P190" text:outline-level="3"><text:bookmark-start text:name="__RefHeading___Toc21361_4012244740"/>o+/-<text:tab/><text:span text:style-name="T113">[n]</text:span>chkoverflo+/-<text:tab/>See the compiler options.<text:bookmark-end text:name="__RefHeading___Toc21361_4012244740"/></text:h>
      <text:h text:style-name="P190" text:outline-level="3"><text:bookmark-start text:name="__RefHeading___Toc21363_4012244740"/><text:tab/><text:span text:style-name="T113">[n]</text:span>chkreuse+/-<text:tab/>See the compiler options.<text:bookmark-end text:name="__RefHeading___Toc21363_4012244740"/></text:h>
      <text:h text:style-name="P190" text:outline-level="3"><text:bookmark-start text:name="__RefHeading___Toc21365_4012244740"/><text:tab/><text:span text:style-name="T113">[n]</text:span>chkundef+/-<text:tab/>See the compiler options.<text:bookmark-end text:name="__RefHeading___Toc21365_4012244740"/></text:h>
      <text:h text:style-name="P190" text:outline-level="3"><text:bookmark-start text:name="__RefHeading___Toc21367_4012244740"/><text:tab/><text:span text:style-name="T113">[n]</text:span>reference+/-<text:tab/>See the compiler options.<text:bookmark-end text:name="__RefHeading___Toc21367_4012244740"/></text:h>
      <text:h text:style-name="P190" text:outline-level="3"><text:bookmark-start text:name="__RefHeading___Toc21369_4012244740"/>s+/-<text:tab/><text:span text:style-name="T113">[n]</text:span>iso7185+/-<text:tab/><text:tab/>See the compiler options.<text:bookmark-end text:name="__RefHeading___Toc21369_4012244740"/></text:h>
      <text:h text:style-name="P190" text:outline-level="3"><text:bookmark-start text:name="__RefHeading___Toc21371_4012244740"/><text:tab/><text:span text:style-name="T113">[n]</text:span>prttables+/-<text:tab/>See the compiler options.<text:bookmark-end text:name="__RefHeading___Toc21371_4012244740"/></text:h>
      <text:h text:style-name="P190" text:outline-level="3"><text:bookmark-start text:name="__RefHeading___Toc21373_4012244740"/><text:tab/><text:span text:style-name="T113">[n]</text:span>undestag+/-<text:tab/>See the compiler options.<text:bookmark-end text:name="__RefHeading___Toc21373_4012244740"/></text:h>
      <text:h text:style-name="P190" text:outline-level="3"><text:bookmark-start text:name="__RefHeading___Toc21375_4012244740"/><text:tab/><text:span text:style-name="T113">[n]</text:span>chkvar+/-<text:tab/><text:tab/>See the compiler options.<text:bookmark-end text:name="__RefHeading___Toc21375_4012244740"/></text:h>
      <text:h text:style-name="P190" text:outline-level="3"><text:bookmark-start text:name="__RefHeading___Toc21377_4012244740"/><text:tab/><text:span text:style-name="T113">[n]</text:span>debug+/-<text:tab/><text:tab/>See the compiler options.<text:bookmark-end text:name="__RefHeading___Toc21377_4012244740"/></text:h>
      <text:h text:style-name="P190" text:outline-level="3"><text:bookmark-start text:name="__RefHeading___Toc21379_4012244740"/><text:tab/><text:span text:style-name="T113">[n]</text:span>debugflt+/-<text:tab/><text:tab/>See the compiler options.<text:bookmark-end text:name="__RefHeading___Toc21379_4012244740"/></text:h>
      <text:h text:style-name="P190" text:outline-level="3"><text:bookmark-start text:name="__RefHeading___Toc21381_4012244740"/>f+/-<text:tab/><text:span text:style-name="T113">[n]</text:span>debugsrc+/-<text:tab/>See the compiler options.<text:bookmark-end text:name="__RefHeading___Toc21381_4012244740"/></text:h>
      <text:h text:style-name="P190" text:outline-level="3"><text:bookmark-start text:name="__RefHeading___Toc21383_4012244740"/><text:tab/><text:span text:style-name="T113">[n]</text:span>prtlex+/-<text:tab/><text:tab/>See the compiler options.<text:bookmark-end text:name="__RefHeading___Toc21383_4012244740"/></text:h>
      <text:h text:style-name="P190" text:outline-level="3"><text:bookmark-start text:name="__RefHeading___Toc21385_4012244740"/><text:tab/><text:span text:style-name="T113">[n]</text:span>prtdisplay+/-<text:tab/>See the compiler options.<text:bookmark-end text:name="__RefHeading___Toc21385_4012244740"/></text:h>
      <text:h text:style-name="P190" text:outline-level="3"><text:bookmark-start text:name="__RefHeading___Toc21387_4012244740"/><text:tab/><text:span text:style-name="T113">[n]</text:span>lineinfo+/-<text:tab/>See the compiler options.<text:bookmark-end text:name="__RefHeading___Toc21387_4012244740"/></text:h>
      <text:h text:style-name="P190" text:outline-level="3"><text:bookmark-start text:name="__RefHeading___Toc21389_4012244740"/><text:tab/><text:span text:style-name="T113">[n]</text:span>mrkasslin+/-<text:tab/>See the compiler options.<text:bookmark-end text:name="__RefHeading___Toc21389_4012244740"/></text:h>
      <text:h text:style-name="P190" text:outline-level="3"><text:tab/><text:span text:style-name="T113">[n]</text:span>amd64_sysv+/-<text:tab/>See the compiler options. Enabled automatically in pgen mode unless overridden.</text:h>
      <text:h text:style-name="Heading_20_2" text:outline-level="2"><text:bookmark-start text:name="__RefHeading___Toc21391_4012244740"/>Instruction files<text:bookmark-end text:name="__RefHeading___Toc21391_4012244740"/></text:h>
      <text:p text:style-name="Standard">Instruction files (.ins) allow configuration to be stored alongside programs rather than specified on the command line each time. They contain commands that set options, declare module paths, exclude directories from recompilation, and define packaged libraries.</text:p>
      <text:h text:style-name="Heading_20_3" text:outline-level="3"><text:bookmark-start text:name="__RefHeading___Toc21393_4012244740"/>Instruction file search order<text:bookmark-end text:name="__RefHeading___Toc21393_4012244740"/></text:h>
      <text:p text:style-name="Standard">pc searches for instruction files in the following locations, in order. All files found are loaded and their commands are cumulative:</text:p>
      <text:p text:style-name="Standard"><text:soft-page-break/>1. pc.ins in the directory where the pc executable itself resides (the program path).</text:p>
      <text:p text:style-name="Standard">2. pc.ins in the user's home directory (if different from the program path).</text:p>
      <text:p text:style-name="Standard">3. pc.ins in the current working directory (if different from both of the above).</text:p>
      <text:p text:style-name="Standard">4. &lt;name&gt;.ins alongside the target Pascal source file, where &lt;name&gt; matches the base name of the source file. For example, if compiling utils/p2c.pas, pc also looks for utils/p2c.ins.</text:p>
      <text:h text:style-name="Heading_20_3" text:outline-level="3"><text:bookmark-start text:name="__RefHeading___Toc21395_4012244740"/>Instruction file format<text:bookmark-end text:name="__RefHeading___Toc21395_4012244740"/></text:h>
      <text:p text:style-name="Standard">Each line in an instruction file is either a command, a comment, or blank. Comments begin with "!" and extend to the end of the line. Commands may also have trailing comments after the command arguments.</text:p>
      <text:p text:style-name="Code">! This is a comment</text:p>
      <text:p text:style-name="Code">modulepath "../libs"</text:p>
      <text:p text:style-name="Code">exclude "../libs" ! protect library from recompilation</text:p>
      <text:h text:style-name="Heading_20_3" text:outline-level="3"><text:bookmark-start text:name="__RefHeading___Toc21397_4012244740"/>Instruction file commands<text:bookmark-end text:name="__RefHeading___Toc21397_4012244740"/></text:h>
      <text:h text:style-name="P33" text:outline-level="3"><text:bookmark-start text:name="__RefHeading___Toc21399_4012244740"/>modulepath &lt;path&gt;<text:tab/><text:tab/>Set the module search path.<text:bookmark-end text:name="__RefHeading___Toc21399_4012244740"/></text:h>
      <text:p text:style-name="Standard">Specifies one or more directories (colon-separated) where pc should search for module source files referenced by uses and joins statements. Multiple modulepath commands accumulate; each new path is appended to the existing path with a colon separator. Paths may be quoted if they contain spaces.</text:p>
      <text:h text:style-name="P33" text:outline-level="3"><text:bookmark-start text:name="__RefHeading___Toc21401_4012244740"/>exclude &lt;path&gt; [&lt;path&gt;]...<text:tab/>Exclude paths from recompilation.<text:bookmark-end text:name="__RefHeading___Toc21401_4012244740"/></text:h>
      <text:p text:style-name="Standard">Files in excluded directories are never rebuilt, even if their source is newer than the compiled output. This is used to protect library directories from unnecessary recompilation. Multiple paths may be listed on a single line. The standard pc.ins file typically excludes the libs directory.</text:p>
      <text:h text:style-name="P33" text:outline-level="3"><text:bookmark-start text:name="__RefHeading___Toc21403_4012244740"/>package &lt;name&gt; = &lt;file&gt; [&lt;file&gt;]...<text:tab/>Declare a packaged library.<text:bookmark-end text:name="__RefHeading___Toc21403_4012244740"/></text:h>
      <text:p text:style-name="Standard">Declares a named package consisting of one or more component files. When a program references any of the component files, the entire package is linked as a unit. This is used for pre-compiled library archives.</text:p>
      <text:h text:style-name="P33" text:outline-level="3"><text:bookmark-start text:name="__RefHeading___Toc21405_4012244740"/>standard / nstandard<text:tab/>Enable/disable ISO 7185 standard mode.<text:bookmark-end text:name="__RefHeading___Toc21405_4012244740"/></text:h>
      <text:p text:style-name="Standard">Equivalent to the -iso7185 / -niso7185 command line option.</text:p>
      <text:h text:style-name="P33" text:outline-level="3"><text:bookmark-start text:name="__RefHeading___Toc21407_4012244740"/>overflow / noverflow<text:tab/><text:tab/>Enable/disable overflow checking.<text:bookmark-end text:name="__RefHeading___Toc21407_4012244740"/></text:h>
      <text:p text:style-name="Standard">Equivalent to the -chkoverflo / -nchkoverflo command line option.</text:p>
      <text:h text:style-name="P33" text:outline-level="3"><text:bookmark-start text:name="__RefHeading___Toc21409_4012244740"/>refer / nrefer<text:tab/><text:tab/><text:tab/>Enable/disable reference checking.<text:bookmark-end text:name="__RefHeading___Toc21409_4012244740"/></text:h>
      <text:p text:style-name="Standard">Equivalent to the -reference / -nreference command line option.</text:p>
      <text:h text:style-name="P33" text:outline-level="3"><text:bookmark-start text:name="__RefHeading___Toc21411_4012244740"/>keepterminalwindow / nkeepterminalwindow<text:tab/>Keep/don't keep terminal window for graphical applications.<text:bookmark-end text:name="__RefHeading___Toc21411_4012244740"/></text:h>
      <text:p text:style-name="Standard">Equivalent to the -keepterminalwindow / -nkeepterminalwindow command line option. <text:span text:style-name="T114">This is a Windows only command.</text:span></text:p>
      <text:h text:style-name="P33" text:outline-level="3"><text:bookmark-start text:name="__RefHeading___Toc21413_4012244740"/><text:soft-page-break/>symcoff / nosymcoff<text:tab/><text:tab/>Generate/don't generate COFF symbols.<text:bookmark-end text:name="__RefHeading___Toc21413_4012244740"/></text:h>
      <text:p text:style-name="Standard">Equivalent to the -symcoff / -nsymcoff command line option. <text:span text:style-name="T114">This is a Windows only command.</text:span></text:p>
      <text:h text:style-name="Heading_20_3" text:outline-level="3"><text:bookmark-start text:name="__RefHeading___Toc21415_4012244740"/>Example instruction file<text:bookmark-end text:name="__RefHeading___Toc21415_4012244740"/></text:h>
      <text:p text:style-name="Standard">The standard pc.ins file shipped with Pascal-P6 contains:</text:p>
      <text:p text:style-name="Code">!</text:p>
      <text:p text:style-name="Code">! Declare the main library and protect it from recompiles</text:p>
      <text:p text:style-name="Code">!</text:p>
      <text:p text:style-name="Code">modulepath "../libs"</text:p>
      <text:p text:style-name="Code">exclude "../libs"</text:p>
      <text:p text:style-name="Standard">This tells pc to search the libs directory for module source files, and to never attempt to recompile files in that directory. Program-specific instruction files can add additional module paths; for example, p2c.ins adds paths for the little-endian and 64-bit machine parameter block source directories.</text:p>
      <text:h text:style-name="Heading_20_2" text:outline-level="2"><text:bookmark-start text:name="__RefHeading___Toc21417_4012244740"/>File types<text:bookmark-end text:name="__RefHeading___Toc21417_4012244740"/></text:h>
      <text:p text:style-name="Standard">pc manages several file types during the compilation process:</text:p>
      <text:p text:style-name="Standard">.pas - Pascal source file. The input to the compiler.</text:p>
      <text:p text:style-name="Standard">.p6 - P6 intermediate code. Produced by the compiler (pcom). This is a text representation of the P-machine instructions.</text:p>
      <text:p text:style-name="Standard">.p6o - P-machine binary. Produced from .p6 by pint --machdeck. Used in pmach, cmach, and package modes.</text:p>
      <text:p text:style-name="Standard">.s - Assembly source. Produced by the code generator (pgen) from .p6 intermediate code.</text:p>
      <text:p text:style-name="Standard">.asm - Assembly source. Hand-written assembly, assembled by gcc; distinct from .s, which pgen generates.</text:p>
      <text:p text:style-name="Standard">.o - Object file. Produced by gcc from .s assembly source.</text:p>
      <text:p text:style-name="Standard">.a - Archive file. Pre-compiled library archive. Not produced by pc, but can be referenced in the link step.</text:p>
      <text:p text:style-name="Standard">.ins - Instruction file. Configuration file for pc.</text:p>
      <text:p text:style-name="Standard">(no extension)/.<text:span text:style-name="T115">exe</text:span> - Executable binary. The final output in pgen mode.</text:p>
      <text:h text:style-name="Heading_20_2" text:outline-level="2"><text:bookmark-start text:name="__RefHeading___Toc21419_4012244740"/>Examples<text:bookmark-end text:name="__RefHeading___Toc21419_4012244740"/></text:h>
      <text:p text:style-name="Standard">Compile a program to a native executable (default pgen mode):</text:p>
      <text:p text:style-name="Code">$ bin/pc myprogram</text:p>
      <text:p text:style-name="Standard">Compile with verbose output, showing the dependency tree and actions:</text:p>
      <text:p text:style-name="Code">$ bin/pc -v -t -a myprogram</text:p>
      <text:p text:style-name="Standard">Preview what would be done without actually doing it (dry run):</text:p>
      <text:p text:style-name="Code">$ bin/pc -a -d myprogram</text:p>
      <text:p text:style-name="Standard">Force a complete rebuild of all dependencies:</text:p>
      <text:p text:style-name="Code"><text:soft-page-break/>$ bin/pc -r myprogram</text:p>
      <text:p text:style-name="Standard">Compile for the pint interpreter:</text:p>
      <text:p text:style-name="Code">$ bin/pc -pint myprogram</text:p>
      <text:p text:style-name="Standard">Compile with ISO 7185 standard mode and source listing enabled:</text:p>
      <text:p text:style-name="Code">$ bin/pc -s -list myprogram</text:p>
      <text:p text:style-name="Standard">Compile with a custom module path:</text:p>
      <text:p text:style-name="Code">$ bin/pc -mp="../libs:../source" myprogram</text:p>
      <text:p text:style-name="Standard"/>
      <text:h text:style-name="P205" text:outline-level="1"><text:bookmark-start text:name="__RefHeading___Toc90001_9999999999"/>Using VSCode with Pascal-P6<text:bookmark-end text:name="__RefHeading___Toc90001_9999999999"/></text:h>
      <text:p text:style-name="Standard">Visual Studio Code (VSCode) can be used as a full-featured development environment for Pascal-P6 programs. The Pascaline extension for VSCode provides syntax highlighting, an integrated language server for code navigation and error checking, a source-level debugger, and a documentation viewer. This chapter describes how to install and use these features.</text:p>
      <text:p text:style-name="P195">[needs lots of screen caps]</text:p>
      <text:h text:style-name="Heading_20_2" text:outline-level="2"><text:bookmark-start text:name="__RefHeading___Toc90002_9999999999"/>Installing the Pascaline extension<text:bookmark-end text:name="__RefHeading___Toc90002_9999999999"/></text:h>
      <text:p text:style-name="Standard">The Pascaline extension is available on the Visual Studio Code Marketplace. To install it, open the Extensions panel in VSCode (Ctrl+Shift+X), search for "Pascaline", and click Install. Alternatively, you can install a .vsix package file directly using the command line:</text:p>
      <text:p text:style-name="Code">$ code --install-extension pascaline-0.2.1.vsix</text:p>
      <text:p text:style-name="Code"/>
      <text:p text:style-name="Standard">Once installed, the extension activates automatically when a .pas file is opened. The extension requires the Pascal-P6 toolchain to be present in the workspace for full functionality. Specifically, it looks for the following tools relative to the workspace root:</text:p>
      <text:p text:style-name="Standard"><text:span text:style-name="reference">source/parser</text:span> — Used by the language server for diagnostics (error checking).</text:p>
      <text:p text:style-name="Standard"><text:span text:style-name="reference">utils/passym</text:span> — Used by the language server for symbol information (go-to-definition, hover, code completion, and other navigation features).</text:p>
      <text:p text:style-name="Standard"><text:span text:style-name="reference">bin/pc</text:span> — Used by the debugger to compile programs before debugging.</text:p>
      <text:p text:style-name="Standard"><text:span text:style-name="reference">bin/pint</text:span> — Used by the debugger as the runtime interpreter.</text:p>
      <text:p text:style-name="Standard">The paths to these tools can be overridden in the extension settings. If a tool is not found, the features that depend on it are simply unavailable, and the remaining features continue to work.</text:p>
      <text:h text:style-name="Heading_20_2" text:outline-level="2"><text:bookmark-start text:name="__RefHeading___Toc90003_9999999999"/>Editing Pascal programs<text:bookmark-end text:name="__RefHeading___Toc90003_9999999999"/></text:h>
      <text:p text:style-name="Standard">The Pascaline extension provides several editing aids for Pascal source files. These features work together to provide an experience similar to modern IDEs, with real-time feedback as you write code.</text:p>
      <text:h text:style-name="Heading_20_3" text:outline-level="3"><text:bookmark-start text:name="__RefHeading___Toc90004_9999999999"/>Syntax highlighting<text:bookmark-end text:name="__RefHeading___Toc90004_9999999999"/></text:h>
      <text:p text:style-name="Standard">Full syntax coloring is provided for Pascaline and ISO 7185 Pascal. Keywords, types, operators, string literals, escape sequences, numeric literals (decimal, hexadecimal, octal, and binary), and comments are all highlighted with distinct colors. Three comment styles are recognized: curly brace comments { }, parenthesis-asterisk comments (* *), and Pascaline line comments starting with !. Syntax highlighting is automatic and requires no configuration beyond installing the extension.</text:p>
      <text:h text:style-name="Heading_20_3" text:outline-level="3"><text:bookmark-start text:name="__RefHeading___Toc90005_9999999999"/>Code completion<text:bookmark-end text:name="__RefHeading___Toc90005_9999999999"/></text:h>
      <text:p text:style-name="Standard">As you type, the extension offers context-aware identifier suggestions. Completions include all accessible symbols: variables, constants, types, procedures, and functions. Symbols declared after the current cursor position are excluded (except standard library symbols), and duplicates are resolved by preferring the innermost or most recent declaration. Completions appear automatically, or can be triggered manually with Ctrl+Space. Each suggestion shows the symbol name along with its type or signature.</text:p>
      <text:h text:style-name="Heading_20_3" text:outline-level="3"><text:bookmark-start text:name="__RefHeading___Toc90006_9999999999"/><text:soft-page-break/>Signature help<text:bookmark-end text:name="__RefHeading___Toc90006_9999999999"/></text:h>
      <text:p text:style-name="Standard">When calling a procedure or function, parameter hints are displayed automatically. Typing an opening parenthesis or a comma inside an argument list triggers a popup showing the full parameter list with types and direction indicators (var, out). The current parameter is highlighted as you type successive arguments.</text:p>
      <text:h text:style-name="Heading_20_3" text:outline-level="3"><text:bookmark-start text:name="__RefHeading___Toc90007_9999999999"/>Hover information<text:bookmark-end text:name="__RefHeading___Toc90007_9999999999"/></text:h>
      <text:p text:style-name="Standard">Hovering the mouse cursor over any identifier displays a popup with information about that symbol. The content varies by symbol kind:</text:p>
      <text:p text:style-name="Standard"/>
      <text:p text:style-name="Standard">For variables, the popup shows the variable declaration with its type. For constants, it shows the name, type, and value. For types, it shows the type definition. For procedures and functions, it shows the full signature with all parameters and return type. If a trailing comment appears on the declaration line in the source, it is also displayed.</text:p>
      <text:h text:style-name="Heading_20_3" text:outline-level="3"><text:bookmark-start text:name="__RefHeading___Toc90008_9999999999"/>Go-to-definition<text:bookmark-end text:name="__RefHeading___Toc90008_9999999999"/></text:h>
      <text:p text:style-name="Standard">Ctrl+Click on any identifier navigates to the line where that symbol is declared. When a symbol name is reused at different scope levels (for example, a local variable that shadows a global), the extension resolves to the innermost declaration that applies at the cursor position.</text:p>
      <text:h text:style-name="Heading_20_3" text:outline-level="3"><text:bookmark-start text:name="__RefHeading___Toc90009_9999999999"/>Find all references<text:bookmark-end text:name="__RefHeading___Toc90009_9999999999"/></text:h>
      <text:p text:style-name="Standard">Right-click on an identifier and select "Find All References" (or press Shift+Alt+F12) to locate every usage of that symbol in the current file. Results include both the declaration and all reference sites. Symbol matching is case-insensitive, consistent with Pascal semantics.</text:p>
      <text:h text:style-name="Heading_20_3" text:outline-level="3"><text:bookmark-start text:name="__RefHeading___Toc90010_9999999999"/>Document outline<text:bookmark-end text:name="__RefHeading___Toc90010_9999999999"/></text:h>
      <text:p text:style-name="Standard">The Outline panel (View &gt; Outline, or the outline section of the Explorer sidebar) shows a hierarchical tree of all symbols in the current file. Procedures and functions appear as top-level items, with their local declarations nested inside. Types, variables, and constants are shown with their kind icons. Clicking any item in the outline jumps to that line in the editor. Standard library symbols and internal aliases are filtered out of the display.</text:p>
      <text:h text:style-name="Heading_20_3" text:outline-level="3"><text:bookmark-start text:name="__RefHeading___Toc90011_9999999999"/>Call hierarchy<text:bookmark-end text:name="__RefHeading___Toc90011_9999999999"/></text:h>
      <text:p text:style-name="Standard">Right-click on a procedure or function name and select "Show Call Hierarchy" to view which routines call the selected routine (incoming calls) and which routines it calls (outgoing calls). This is useful for understanding the structure of a program and tracing the flow of execution.</text:p>
      <text:h text:style-name="Heading_20_2" text:outline-level="2"><text:bookmark-start text:name="__RefHeading___Toc90012_9999999999"/>Compiling Pascal programs<text:bookmark-end text:name="__RefHeading___Toc90012_9999999999"/></text:h>
      <text:p text:style-name="Standard">The Pascaline extension provides real-time compilation feedback through its language server. While it does not replace the command-line compiler for producing executables, it gives immediate feedback on errors as you edit.</text:p>
      <text:h text:style-name="Heading_20_3" text:outline-level="3"><text:bookmark-start text:name="__RefHeading___Toc90013_9999999999"/>Diagnostics and error checking<text:bookmark-end text:name="__RefHeading___Toc90013_9999999999"/></text:h>
      <text:p text:style-name="Standard">By default, the extension runs the Pascal-P6 parser each time a file is saved or opened. Syntax and semantic errors are displayed as underlines in the editor, and the full list of errors appears in the Problems panel (Ctrl+Shift+M). Each error shows the line number, column, error code, and a descriptive message. Errors are cleared when the file is closed.</text:p>
      <text:p text:style-name="Standard"><text:soft-page-break/>This behavior can be controlled with the extension settings. Setting pascaline.checkOnSave to false disables checking on save, and setting pascaline.checkOnOpen to false disables checking when a file is first opened.</text:p>
      <text:h text:style-name="Heading_20_3" text:outline-level="3"><text:bookmark-start text:name="__RefHeading___Toc90014_9999999999"/>Compiling from the integrated terminal<text:bookmark-end text:name="__RefHeading___Toc90014_9999999999"/></text:h>
      <text:p text:style-name="Standard">The VSCode integrated terminal (Ctrl+`) can be used to run the Pascal-P6 compiler directly. From the workspace root:</text:p>
      <text:p text:style-name="Code">$ bin/pc program</text:p>
      <text:p text:style-name="Code"/>
      <text:p text:style-name="Standard">This compiles program.pas and produces the intermediate code and executable. The p6 batch file can also be used to compile and run in one step:</text:p>
      <text:p text:style-name="Code">$ bin/p6 program</text:p>
      <text:p text:style-name="Code"/>
      <text:p text:style-name="Standard">See the chapter on using Pascal-P6 for full details on compiler invocation and options.</text:p>
      <text:h text:style-name="Heading_20_2" text:outline-level="2"><text:bookmark-start text:name="__RefHeading___Toc90015_9999999999"/>Debugging Pascal programs<text:bookmark-end text:name="__RefHeading___Toc90015_9999999999"/></text:h>
      <text:p text:style-name="Standard">The Pascaline extension includes a full source-level debugger that operates through the Pascal-P6 pint interpreter. It supports breakpoints, single-stepping, variable inspection, expression evaluation, and call stack navigation. The debugger uses VSCode's standard Debug Adapter Protocol, so all the familiar debug controls are available.</text:p>
      <text:h text:style-name="Heading_20_3" text:outline-level="3"><text:bookmark-start text:name="__RefHeading___Toc90016_9999999999"/>Launch configuration<text:bookmark-end text:name="__RefHeading___Toc90016_9999999999"/></text:h>
      <text:p text:style-name="Standard">To debug a Pascal program, you need a launch configuration. VSCode stores these in a file called .vscode/launch.json in your workspace. A minimal configuration looks like this:</text:p>
      <text:p text:style-name="Code">{</text:p>
      <text:p text:style-name="Code">"version": "0.2.0",</text:p>
      <text:p text:style-name="Code">"configurations": [</text:p>
      <text:p text:style-name="Code">{</text:p>
      <text:p text:style-name="Code">"type": "pascaline",</text:p>
      <text:p text:style-name="Code">"request": "launch",</text:p>
      <text:p text:style-name="Code">"name": "Debug Pascal Program",</text:p>
      <text:p text:style-name="Code">"program": "${file}",</text:p>
      <text:p text:style-name="Code">"stopOnEntry": true</text:p>
      <text:p text:style-name="Code">}</text:p>
      <text:p text:style-name="Code">]</text:p>
      <text:p text:style-name="Code">}</text:p>
      <text:p text:style-name="Code"/>
      <text:p text:style-name="Standard">The <text:span text:style-name="reference">program</text:span> field specifies the Pascal source file to debug. Using ${file} means whichever file is currently open in the editor. The <text:span text:style-name="reference">stopOnEntry</text:span> field controls whether the debugger pauses at the first executable line. If set to false, the program runs until it hits a breakpoint or completes.</text:p>
      <text:p text:style-name="Standard">Optional fields include:</text:p>
      <text:p text:style-name="Standard"><text:span text:style-name="reference">pc</text:span> — Path to the pc compiler (default: looks in bin/ of the workspace).</text:p>
      <text:p text:style-name="Standard"><text:span text:style-name="reference">pint</text:span> — Path to the pint interpreter (default: looks in bin/ of the workspace).</text:p>
      <text:p text:style-name="Standard"><text:soft-page-break/></text:p>
      <text:p text:style-name="Standard">When a debug session is launched, the extension first compiles the program with pc, then starts pint in debug mode. If compilation fails, the errors are reported and the debug session does not start.</text:p>
      <text:h text:style-name="Heading_20_3" text:outline-level="3"><text:bookmark-start text:name="__RefHeading___Toc90017_9999999999"/>Setting breakpoints<text:bookmark-end text:name="__RefHeading___Toc90017_9999999999"/></text:h>
      <text:p text:style-name="Standard">Click in the left gutter of the editor next to a line number to set a breakpoint. A red dot appears to indicate the breakpoint. When the program reaches that line during execution, the debugger pauses and highlights the current line in the editor. Breakpoints can be toggled on and off by clicking the gutter again. They persist across debug sessions for the same file.</text:p>
      <text:h text:style-name="Heading_20_3" text:outline-level="3"><text:bookmark-start text:name="__RefHeading___Toc90018_9999999999"/>Stepping through code<text:bookmark-end text:name="__RefHeading___Toc90018_9999999999"/></text:h>
      <text:p text:style-name="Standard">Once paused at a breakpoint or the program entry, you can step through the code using the debug control bar:</text:p>
      <text:p text:style-name="Standard"><text:span text:style-name="reference">Continue (F5)</text:span> — Resume execution until the next breakpoint or program completion.</text:p>
      <text:p text:style-name="Standard"><text:span text:style-name="reference">Step Over (F10)</text:span> — Execute the current line, stepping over procedure and function calls.</text:p>
      <text:p text:style-name="Standard"><text:span text:style-name="reference">Step Into (F11)</text:span> — Execute the current line, entering any procedure or function call.</text:p>
      <text:p text:style-name="Standard"><text:span text:style-name="reference">Step Out (Shift+F11)</text:span> — Resume execution until the current routine returns.</text:p>
      <text:p text:style-name="Standard">The current execution position is shown with a yellow arrow in the editor gutter, and the current line is highlighted.</text:p>
      <text:h text:style-name="Heading_20_3" text:outline-level="3"><text:bookmark-start text:name="__RefHeading___Toc90019_9999999999"/>Inspecting variables<text:bookmark-end text:name="__RefHeading___Toc90019_9999999999"/></text:h>
      <text:p text:style-name="Standard">When the debugger is paused, the Variables panel (in the Run and Debug sidebar) shows the values of all accessible variables, organized into three scopes:</text:p>
      <text:p text:style-name="Standard"><text:span text:style-name="reference">Locals</text:span> — Variables declared in the current procedure or function.</text:p>
      <text:p text:style-name="Standard"><text:span text:style-name="reference">Parameters</text:span> — Formal parameters of the current routine.</text:p>
      <text:p text:style-name="Standard"><text:span text:style-name="reference">Globals</text:span> — Variables declared at the program level.</text:p>
      <text:p text:style-name="Standard">Variable values can be modified during a debug session by double-clicking a value in the Variables panel and entering a new value.</text:p>
      <text:h text:style-name="Heading_20_3" text:outline-level="3"><text:bookmark-start text:name="__RefHeading___Toc90020_9999999999"/>Evaluating expressions<text:bookmark-end text:name="__RefHeading___Toc90020_9999999999"/></text:h>
      <text:p text:style-name="Standard">Expressions can be evaluated during a debug session in several ways. Hovering over an identifier in the editor displays its current value in a popup. The Debug Console (Ctrl+Shift+Y) accepts arbitrary expressions and displays their values. This uses the pint debugger's expression evaluator, so any expression that pint supports can be entered.</text:p>
      <text:h text:style-name="Heading_20_3" text:outline-level="3"><text:bookmark-start text:name="__RefHeading___Toc90021_9999999999"/>Call stack<text:bookmark-end text:name="__RefHeading___Toc90021_9999999999"/></text:h>
      <text:p text:style-name="Standard">The Call Stack panel shows the chain of procedure and function calls that led to the current execution point. Each frame in the stack shows the routine name and the current line within that routine. Clicking <text:soft-page-break/>on a frame in the call stack navigates to that location in the editor and updates the Variables panel to show the variables in that frame's scope.</text:p>
      <text:h text:style-name="Heading_20_2" text:outline-level="2"><text:bookmark-start text:name="__RefHeading___Toc90022_9999999999"/>Viewing documentation<text:bookmark-end text:name="__RefHeading___Toc90022_9999999999"/></text:h>
      <text:p text:style-name="Standard">The Pascaline extension includes a documentation viewer for pasdoc-generated HTML files. To use it, first generate documentation for a program by running:</text:p>
      <text:p text:style-name="Code">$ bin/pc program -pasdoc</text:p>
      <text:p text:style-name="Code"/>
      <text:p text:style-name="Standard">This produces a file called program.html in the same directory as the source file. Then, in VSCode, right-click in the editor while viewing the corresponding .pas file and select "Open Pasdoc Documentation". The documentation opens in a side panel within VSCode. If you have a symbol selected when you invoke the command, the documentation scrolls to and highlights that symbol's entry.</text:p>
      <text:h text:style-name="Heading_20_2" text:outline-level="2"><text:bookmark-start text:name="__RefHeading___Toc90023_9999999999"/>Extension settings<text:bookmark-end text:name="__RefHeading___Toc90023_9999999999"/></text:h>
      <text:p text:style-name="Standard">The Pascaline extension settings can be configured in VSCode's Settings editor (File &gt; Preferences &gt; Settings, then search for "Pascaline") or directly in .vscode/settings.json. The following settings are available:</text:p>
      <text:p text:style-name="Standard"><text:span text:style-name="reference">pascaline.parserPath</text:span> — Path to the parser executable. Default: empty (looks for source/parser relative to the workspace root).</text:p>
      <text:p text:style-name="Standard"><text:span text:style-name="reference">pascaline.symPath</text:span> — Path to the passym executable. Default: empty (looks for utils/passym relative to the workspace root).</text:p>
      <text:p text:style-name="Standard"><text:span text:style-name="reference">pascaline.checkOnSave</text:span> — Run the parser when a file is saved. Default: true.</text:p>
      <text:p text:style-name="Standard"><text:span text:style-name="reference">pascaline.checkOnOpen</text:span> — Run the parser when a file is opened. Default: true.</text:p>
      <text:p text:style-name="Standard">By default, the extension looks for the required tools relative to the workspace root. Paths can be configured in settings if the tools are located elsewhere.</text:p>
      <text:p text:style-name="Standard"/>
      <text:h text:style-name="P205" text:outline-level="1"><text:bookmark-start text:name="__RefHeading___Toc21219_4012244740"/>p2c: The Pascal to C translator<text:bookmark-end text:name="__RefHeading___Toc21219_4012244740"/></text:h>
      <text:h text:style-name="Heading_20_2" text:outline-level="2"><text:bookmark-start text:name="__RefHeading___Toc21221_4012244740"/>Overview<text:bookmark-end text:name="__RefHeading___Toc21221_4012244740"/></text:h>
      <text:p text:style-name="Standard">p2c is a utility that translates Pascal source programs into C source code. It reads a single Pascal source file (.pas) and produces two output files: a C source file (.c) containing the translated program, and a C header file (.h) containing type definitions and function declarations. The generated C code can then be compiled with any standard C compiler (gcc, clang, etc.) to produce a native executable.</text:p>
      <text:p text:style-name="Standard">The purpose of p2c is to allow Pascal programs to be ported to environments where only a C compiler is available, or to integrate Pascal-written algorithms into C-based projects. The translation is designed to produce readable, human-comprehensible C code that preserves the structure and comments of the original Pascal source as closely as possible.</text:p>
      <text:p text:style-name="Standard">p2c is itself written in Pascal and is compiled and run using the Pascal-P6 compiler toolchain. It handles ISO 7185 Pascal and the Pascaline extensions supported by Pascal-P6, with the exception of the modular features (uses and joins statements), which are not yet supported.</text:p>
      <text:h text:style-name="Heading_20_2" text:outline-level="2"><text:bookmark-start text:name="__RefHeading___Toc21223_4012244740"/>Executing p2c<text:bookmark-end text:name="__RefHeading___Toc21223_4012244740"/></text:h>
      <text:p text:style-name="Standard">p2c is invoked from the command line. It must be run from the directory containing the Pascal source file to be translated. The basic invocation is:</text:p>
      <text:p text:style-name="Code">$ p2c &lt;filename&gt;</text:p>
      <text:p text:style-name="Standard">where &lt;filename&gt; is the name of the Pascal source file without the .pas extension. For example, to translate hello.pas:</text:p>
      <text:p text:style-name="Code">$ cd sample_programs</text:p>
      <text:p text:style-name="Code">$ ../bin/p2c hello</text:p>
      <text:p text:style-name="Standard">This produces hello.c and hello.h in the current directory. The C file can then be compiled with:</text:p>
      <text:p text:style-name="Code">$ gcc -o hello hello.c ../libs/source/pas2csup.c -lm</text:p>
      <text:p text:style-name="Standard">The pas2csup.c file provides runtime support functions for set operations and typed file I/O. The -lm flag links the math library, which is needed if the Pascal program uses any mathematical functions (sin, cos, sqrt, etc.).</text:p>
      <text:h text:style-name="Heading_20_3" text:outline-level="3"><text:bookmark-start text:name="__RefHeading___Toc21225_4012244740"/>Command-line options<text:bookmark-end text:name="__RefHeading___Toc21225_4012244740"/></text:h>
      <text:p text:style-name="Standard">p2c accepts the same compiler options as the Pascal-P6 compiler, specified with a dash prefix. Options can be negated with an "n" prefix. For example:</text:p>
      <text:p text:style-name="Code">$ p2c -list hello</text:p>
      <text:p text:style-name="Code">$ p2c -nlist hello</text:p>
      <text:p text:style-name="Standard">The first form enables listing of the source during translation; the second disables it. The option names are the same as documented in the compiler options section of this manual. Options that control code generation in the compiler (such as debug checking, heap recycling, overflow checking) are accepted by p2c for compatibility but have no effect on the C output.</text:p>
      <text:h text:style-name="Heading_20_3" text:outline-level="3"><text:bookmark-start text:name="__RefHeading___Toc21227_4012244740"/>Building p2c from source<text:bookmark-end text:name="__RefHeading___Toc21227_4012244740"/></text:h>
      <text:p text:style-name="Standard">To build p2c from its Pascal source, run the following from the project root directory:</text:p>
      <text:p text:style-name="Code">$ bin/pc utils/p2c</text:p>
      <text:p text:style-name="Standard">This compiles utils/p2c.pas using the Pascal-P6 compiler and produces the p2c executable. Copy it to the bin directory for convenience:</text:p>
      <text:p text:style-name="Code"><text:soft-page-break/>$ cp utils/p2c bin/p2c</text:p>
      <text:h text:style-name="Heading_20_3" text:outline-level="3"><text:bookmark-start text:name="__RefHeading___Toc21229_4012244740"/>Running the regression tests<text:bookmark-end text:name="__RefHeading___Toc21229_4012244740"/></text:h>
      <text:p text:style-name="Standard">A regression test suite verifies that p2c correctly translates a set of sample programs. Run it from the project root:</text:p>
      <text:p text:style-name="Code">$ bin/testp2cs</text:p>
      <text:p text:style-name="Standard">This translates each sample program, compiles the resulting C code with gcc, runs the executable, and compares the output against a known-good reference. The test report shows pass/fail status, gcc warnings, and any output differences.</text:p>
      <text:h text:style-name="Heading_20_2" text:outline-level="2"><text:bookmark-start text:name="__RefHeading___Toc21231_4012244740"/>Generated file structure<text:bookmark-end text:name="__RefHeading___Toc21231_4012244740"/></text:h>
      <text:p text:style-name="Standard">For a Pascal source file named prog.pas, p2c produces two files:</text:p>
      <text:h text:style-name="Heading_20_3" text:outline-level="3"><text:bookmark-start text:name="__RefHeading___Toc21233_4012244740"/>The C source file (prog.c)<text:bookmark-end text:name="__RefHeading___Toc21233_4012244740"/></text:h>
      <text:p text:style-name="Standard">The .c file contains, in order:</text:p>
      <text:p text:style-name="Standard">1. A comment banner identifying the file as p2c output and naming the source program.</text:p>
      <text:p text:style-name="Standard">2. Standard C library includes: stdio.h, stdlib.h, string.h, math.h, and setjmp.h.</text:p>
      <text:p text:style-name="Standard">3. An include of pas2csup.h, which provides runtime support for set operations and typed file I/O.</text:p>
      <text:p text:style-name="Standard">4. An include of the generated header file (prog.h).</text:p>
      <text:p text:style-name="Standard">5. Compatibility definitions for bool/true/false and helper macros for Pascal-style eof, eoln, and character reading.</text:p>
      <text:p text:style-name="Standard">6. Constant definitions as #define macros.</text:p>
      <text:p text:style-name="Standard">7. Enumeration types, structure types, and typedefs.</text:p>
      <text:p text:style-name="Standard">8. Global variable declarations.</text:p>
      <text:p text:style-name="Standard">9. jmp_buf declarations for any Pascal labels used in goto/longjmp translation.</text:p>
      <text:p text:style-name="Standard">10. Function and procedure implementations.</text:p>
      <text:p text:style-name="Standard">11. The main() function containing the translated program body.</text:p>
      <text:h text:style-name="Heading_20_3" text:outline-level="3"><text:bookmark-start text:name="__RefHeading___Toc21235_4012244740"/>The C header file (prog.h)<text:bookmark-end text:name="__RefHeading___Toc21235_4012244740"/></text:h>
      <text:p text:style-name="Standard">The .h file contains:</text:p>
      <text:p text:style-name="Standard">1. An include guard (#ifndef prog_H / #define prog_H / #endif).</text:p>
      <text:p text:style-name="Standard">2. Include of stdbool.h.</text:p>
      <text:p text:style-name="Standard">3. The p2c_procptr typedef for procedure/function parameters.</text:p>
      <text:p text:style-name="Standard">4. Forward declarations of struct types.</text:p>
      <text:p text:style-name="Standard">5. Declarations of all global functions.</text:p>
      <text:h text:style-name="Heading_20_3" text:outline-level="3"><text:bookmark-start text:name="__RefHeading___Toc21237_4012244740"/><text:soft-page-break/>The runtime support library (pas2csup.h / pas2csup.c)<text:bookmark-end text:name="__RefHeading___Toc21237_4012244740"/></text:h>
      <text:p text:style-name="Standard">The runtime support library provides:</text:p>
      <text:p text:style-name="Standard">Set operations: p2c_sclr (clear), p2c_sadd (add element), p2c_radd (add range), p2c_suni (union), p2c_sint (intersection), p2c_sdif (difference), p2c_scpy (copy), p2c_sisin (membership test), p2c_sequ (equality), p2c_sinc (subset test). Sets are represented as 32-byte unsigned char arrays (256 bits), matching Pascaline set semantics.</text:p>
      <text:p text:style-name="Standard">Typed file I/O: p2c_frewrite, p2c_freset, p2c_fput, p2c_fget, p2c_fwrite, p2c_fread, p2c_feof. These implement Pascal binary file semantics using C stdio.</text:p>
      <text:h text:style-name="Heading_20_2" text:outline-level="2"><text:bookmark-start text:name="__RefHeading___Toc21239_4012244740"/>Translation of Pascal constructs to C<text:bookmark-end text:name="__RefHeading___Toc21239_4012244740"/></text:h>
      <text:p text:style-name="Standard">This section describes, construct by construct, how p2c translates Pascal source code into C. Understanding these translations is essential for reading and debugging the generated C code.</text:p>
      <text:h text:style-name="Heading_20_3" text:outline-level="3"><text:bookmark-start text:name="__RefHeading___Toc21241_4012244740"/>Program structure<text:bookmark-end text:name="__RefHeading___Toc21241_4012244740"/></text:h>
      <text:p text:style-name="Standard">A Pascal program declaration becomes a C main() function. The program name is used for the header file include guard. Program parameters (input, output) are handled implicitly: input maps to stdin and output maps to stdout.</text:p>
      <text:p text:style-name="Standard">Pascal:</text:p>
      <text:p text:style-name="Code">program hello(output);</text:p>
      <text:p text:style-name="Code">begin</text:p>
      <text:p text:style-name="Code">writeln('Hello, world')</text:p>
      <text:p text:style-name="Code">end.</text:p>
      <text:p text:style-name="Standard">C:</text:p>
      <text:p text:style-name="Code">int main(void)</text:p>
      <text:p text:style-name="Code">{</text:p>
      <text:p text:style-name="Code">printf("Hello, world\n");</text:p>
      <text:p text:style-name="Code">}</text:p>
      <text:p text:style-name="Standard">Every function body, including main(), includes a declaration of two set temporaries (_stmp1 and _stmp2) marked with __attribute__((unused)). These are used by set operations if they appear in the function.</text:p>
      <text:h text:style-name="Heading_20_3" text:outline-level="3"><text:bookmark-start text:name="__RefHeading___Toc21243_4012244740"/>Scalar types<text:bookmark-end text:name="__RefHeading___Toc21243_4012244740"/></text:h>
      <text:p text:style-name="Standard">Pascal scalar types are mapped to C types as follows:</text:p>
      <text:p text:style-name="Standard">integer maps to long. This provides at least 32 bits on all platforms, matching Pascal-P6 integer semantics.</text:p>
      <text:p text:style-name="Standard">real maps to double. Pascal-P6 uses 64-bit IEEE floating point.</text:p>
      <text:p text:style-name="Standard">char maps to char. Single-byte character.</text:p>
      <text:p text:style-name="Standard">boolean maps to bool (from stdbool.h, or emulated as int with true=1/false=0 for older compilers).</text:p>
      <text:h text:style-name="Heading_20_3" text:outline-level="3"><text:bookmark-start text:name="__RefHeading___Toc21245_4012244740"/><text:soft-page-break/>Subrange types<text:bookmark-end text:name="__RefHeading___Toc21245_4012244740"/></text:h>
      <text:p text:style-name="Standard">Subrange types are mapped to the smallest C integer type that can represent the range. For example, a subrange 0..255 becomes unsigned char, a subrange 1..43 becomes unsigned char, and a general integer subrange becomes long. Char subranges remain char.</text:p>
      <text:p text:style-name="Standard">Pascal:</text:p>
      <text:p text:style-name="Code">type index = 1..43;</text:p>
      <text:p text:style-name="Standard">C:</text:p>
      <text:p text:style-name="Code">/* index represented as unsigned char in parameters and locals */</text:p>
      <text:h text:style-name="Heading_20_3" text:outline-level="3"><text:bookmark-start text:name="__RefHeading___Toc21247_4012244740"/>Enumerated types<text:bookmark-end text:name="__RefHeading___Toc21247_4012244740"/></text:h>
      <text:p text:style-name="Standard">Pascal enumerated types become C enum declarations. The enumeration constants are available as integer values in expressions. Variables of the enumerated type are declared as int.</text:p>
      <text:p text:style-name="Standard">Pascal:</text:p>
      <text:p text:style-name="Code">type mover = (user, prog);</text:p>
      <text:p text:style-name="Code">var nextmove: mover;</text:p>
      <text:p text:style-name="Standard">C:</text:p>
      <text:p text:style-name="Code">enum mover {</text:p>
      <text:p text:style-name="Code">user,</text:p>
      <text:p text:style-name="Code">prog</text:p>
      <text:p text:style-name="Code">};</text:p>
      <text:p text:style-name="Code">int nextmove;</text:p>
      <text:h text:style-name="Heading_20_3" text:outline-level="3"><text:bookmark-start text:name="__RefHeading___Toc21249_4012244740"/>Constants<text:bookmark-end text:name="__RefHeading___Toc21249_4012244740"/></text:h>
      <text:p text:style-name="Standard">Pascal named constants become C #define preprocessor macros. Integer constants produce integer literals; real constants produce floating-point literals with full precision; character constants produce character literals; string constants produce string literals.</text:p>
      <text:p text:style-name="Standard">Pascal:</text:p>
      <text:p text:style-name="Code">const maxstr = 43;</text:p>
      <text:p text:style-name="Code">entsym = 'E';</text:p>
      <text:p text:style-name="Standard">C:</text:p>
      <text:p text:style-name="Code">#define maxstr 43</text:p>
      <text:p text:style-name="Code">#define entsym 'E'</text:p>
      <text:h text:style-name="Heading_20_3" text:outline-level="3"><text:bookmark-start text:name="__RefHeading___Toc21251_4012244740"/>Arrays<text:bookmark-end text:name="__RefHeading___Toc21251_4012244740"/></text:h>
      <text:p text:style-name="Standard">Pascal arrays are translated to C arrays with adjusted dimensions to account for Pascal indexing conventions. Since Pascal arrays can start at any index (commonly 1), while C arrays always start at 0, p2c allocates extra space and accesses elements using the original Pascal indices directly.</text:p>
      <text:p text:style-name="Standard">For an array [0..N], the C dimension is N+1. For an array [1..N], the C dimension is N+1, leaving element 0 unused. For packed arrays of char (strings), two extra bytes are allocated to accommodate a null terminator.</text:p>
      <text:p text:style-name="Standard">Pascal:</text:p>
      <text:p text:style-name="Code"><text:soft-page-break/>var a: packed array [1..43] of char;</text:p>
      <text:p text:style-name="Code">flags: array [0..8190] of boolean;</text:p>
      <text:p text:style-name="Standard">C:</text:p>
      <text:p text:style-name="Code">char a[45]; /* 43 + 2 for 1-based indexing and null */</text:p>
      <text:p text:style-name="Code">bool flags[8191]; /* 0..8190 = 8191 elements */</text:p>
      <text:p text:style-name="Standard">Multi-dimensional arrays follow the same pattern, with each dimension independently adjusted:</text:p>
      <text:p text:style-name="Standard">Pascal:</text:p>
      <text:p text:style-name="Code">var galaxy: array [0..7, 0..7] of quadrec;</text:p>
      <text:p text:style-name="Standard">C:</text:p>
      <text:p text:style-name="Code">quadrec galaxy[8][8];</text:p>
      <text:h text:style-name="Heading_20_3" text:outline-level="3"><text:bookmark-start text:name="__RefHeading___Toc21253_4012244740"/>Strings (packed arrays of char)<text:bookmark-end text:name="__RefHeading___Toc21253_4012244740"/></text:h>
      <text:p text:style-name="Standard">Pascal strings (packed arrays of char) are represented as C char arrays. Because Pascal strings are 1-based, the C array is sized with extra room and element [0] is unused. String operations use the address of element [1] as the effective string pointer.</text:p>
      <text:p text:style-name="Standard">String assignment uses memmove with the address of element [1]. String comparison uses strncmp, also starting at element [1]. String constants in write statements are emitted as C string literals in printf format strings.</text:p>
      <text:p text:style-name="Standard">Pascal:</text:p>
      <text:p text:style-name="Code">a := 'erhklhklgsdtsknsknskdlhfksghskhskeljefhjgkh';</text:p>
      <text:p text:style-name="Standard">C:</text:p>
      <text:p text:style-name="Code">memmove(&amp;a[1],"erhklhklgsdtsknsknskdlhfksghskhskeljefhjgkh", 43);</text:p>
      <text:p text:style-name="Standard">Pascal:</text:p>
      <text:p text:style-name="Code">if whosemove = 'you' then ...</text:p>
      <text:p text:style-name="Standard">C:</text:p>
      <text:p text:style-name="Code">if (strncmp(&amp;whosemove[1], "you", 3) == 0) ...</text:p>
      <text:p text:style-name="Standard">String output in write/writeln uses printf with a precision-limited %s format specifier that prints exactly the declared length:</text:p>
      <text:p text:style-name="Standard">Pascal:</text:p>
      <text:p text:style-name="Code">writeln('Result: ', a);</text:p>
      <text:p text:style-name="Standard">C:</text:p>
      <text:p text:style-name="Code">printf("Result: %43.43s\n", &amp;a[1]);</text:p>
      <text:h text:style-name="Heading_20_3" text:outline-level="3"><text:bookmark-start text:name="__RefHeading___Toc21255_4012244740"/>Records<text:bookmark-end text:name="__RefHeading___Toc21255_4012244740"/></text:h>
      <text:p text:style-name="Standard">Pascal record types become C struct types, wrapped in a typedef so the struct tag and the type name are the same. Fields retain their original names and are translated to their corresponding C types.</text:p>
      <text:p text:style-name="Standard">Pascal:</text:p>
      <text:p text:style-name="Code">type quadrec = record</text:p>
      <text:p text:style-name="Code">ishistory: boolean;</text:p>
      <text:p text:style-name="Code"><text:soft-page-break/>klingnum: 0..maxdigit;</text:p>
      <text:p text:style-name="Code">fedbasenum: 0..maxdigit;</text:p>
      <text:p text:style-name="Code">starnum: 0..maxdigit</text:p>
      <text:p text:style-name="Code">end;</text:p>
      <text:p text:style-name="Standard">C:</text:p>
      <text:p text:style-name="Code">typedef struct quadrec quadrec;</text:p>
      <text:p text:style-name="Code">struct quadrec {</text:p>
      <text:p text:style-name="Code">bool ishistory;</text:p>
      <text:p text:style-name="Code">unsigned char klingnum;</text:p>
      <text:p text:style-name="Code">unsigned char fedbasenum;</text:p>
      <text:p text:style-name="Code">unsigned char starnum;</text:p>
      <text:p text:style-name="Code">};</text:p>
      <text:p text:style-name="Standard">Record field access uses dot notation for value types and arrow notation for pointer types, exactly as in C.</text:p>
      <text:h text:style-name="Heading_20_3" text:outline-level="3"><text:bookmark-start text:name="__RefHeading___Toc21257_4012244740"/>Sets<text:bookmark-end text:name="__RefHeading___Toc21257_4012244740"/></text:h>
      <text:p text:style-name="Standard">Pascal set types are represented as p2c_settype, a typedef for unsigned char[32] (256 bits). This is sufficient to represent any set of 0..255, which covers all Pascaline set base types.</text:p>
      <text:p text:style-name="Standard">Set operations are translated to calls to runtime library functions from pas2csup.h:</text:p>
      <text:p text:style-name="Standard">Set construction: [a, b, lo..hi] is translated to a sequence of p2c_sclr (clear), p2c_sadd (add scalar element), and p2c_radd (add range) calls into a temporary _stmp2, followed by p2c_scpy to copy the result into _stmp1.</text:p>
      <text:p text:style-name="Standard">Set union (+): p2c_scpy(_stmp1, LHS) followed by p2c_suni(_stmp1, RHS).</text:p>
      <text:p text:style-name="Standard">Set intersection (*): p2c_scpy(_stmp1, LHS) followed by p2c_sint(_stmp1, RHS).</text:p>
      <text:p text:style-name="Standard">Set difference (-): p2c_scpy(_stmp1, LHS) followed by p2c_sdif(_stmp1, RHS).</text:p>
      <text:p text:style-name="Standard">Set membership (in): For constant sets, an inline bit-shift test is used. For variable sets, p2c_sisin(element, set) is called.</text:p>
      <text:p text:style-name="Standard">Set comparison (=, &lt;=): p2c_sequ for equality, p2c_sinc for subset testing.</text:p>
      <text:p text:style-name="Standard">Set assignment (:=): p2c_scpy(destination, source).</text:p>
      <text:h text:style-name="Heading_20_3" text:outline-level="3"><text:bookmark-start text:name="__RefHeading___Toc21259_4012244740"/>Pointers and dynamic allocation<text:bookmark-end text:name="__RefHeading___Toc21259_4012244740"/></text:h>
      <text:p text:style-name="Standard">Pascal pointer types (^type) become C pointer types (type*). Pointer dereference (p^) becomes C dereference (*p) or arrow notation (p-&gt;field) for record pointers. nil becomes NULL.</text:p>
      <text:p text:style-name="Standard">new(p) is translated to a malloc call with sizeof for the pointed-to type. dispose(p) is translated to free(p).</text:p>
      <text:h text:style-name="Heading_20_3" text:outline-level="3"><text:bookmark-start text:name="__RefHeading___Toc21261_4012244740"/>Procedures and functions<text:bookmark-end text:name="__RefHeading___Toc21261_4012244740"/></text:h>
      <text:p text:style-name="Standard">Pascal procedures become C void functions. Pascal functions become C functions returning the appropriate type.</text:p>
      <text:p text:style-name="Standard"><text:soft-page-break/>Value parameters are passed by value in C, as in Pascal. Var parameters are translated to pointer parameters: the formal parameter type becomes a pointer, and at call sites the actual parameter is prefixed with &amp; (address-of). Inside the function body, var parameters are dereferenced with *.</text:p>
      <text:p text:style-name="Standard">Function return values: Pascal assigns the return value by assigning to the function name. In C, a local variable named functionname__result is declared at the top of the function body, assignments to the function name become assignments to this variable, and a return statement at the end returns it.</text:p>
      <text:p text:style-name="Standard">Pascal:</text:p>
      <text:p text:style-name="Code">function square(x: integer): integer;</text:p>
      <text:p text:style-name="Code">begin</text:p>
      <text:p text:style-name="Code">square := x * x</text:p>
      <text:p text:style-name="Code">end;</text:p>
      <text:p text:style-name="Standard">C:</text:p>
      <text:p text:style-name="Code">long square(long x)</text:p>
      <text:p text:style-name="Code">{</text:p>
      <text:p text:style-name="Code">long square__result;</text:p>
      <text:p text:style-name="Code">square__result = x * x;</text:p>
      <text:p text:style-name="Code">return square__result;</text:p>
      <text:p text:style-name="Code">}</text:p>
      <text:h text:style-name="Heading_20_3" text:outline-level="3"><text:bookmark-start text:name="__RefHeading___Toc21263_4012244740"/>Nested procedures (procedure flattening)<text:bookmark-end text:name="__RefHeading___Toc21263_4012244740"/></text:h>
      <text:p text:style-name="Standard">C does not support nested function definitions, so p2c flattens nested Pascal procedures into top-level C functions. The naming convention is parent_child for a procedure "child" nested inside "parent".</text:p>
      <text:p text:style-name="Standard">When a nested procedure references variables from an enclosing scope (uplevel references), those variables are passed as additional pointer parameters with an __up suffix. At the call site, the address of the local variable is passed.</text:p>
      <text:p text:style-name="Standard">Pascal:</text:p>
      <text:p text:style-name="Code">procedure prtlin(str: string80);</text:p>
      <text:p text:style-name="Code">procedure prtkey(str: string10);</text:p>
      <text:p text:style-name="Code">begin</text:p>
      <text:p text:style-name="Code">{ accesses prtlin's locals }</text:p>
      <text:p text:style-name="Code">end;</text:p>
      <text:p text:style-name="Code">begin</text:p>
      <text:p text:style-name="Code">prtkey(keywd[x]);</text:p>
      <text:p text:style-name="Code">end;</text:p>
      <text:p text:style-name="Standard">C:</text:p>
      <text:p text:style-name="Code">static void prtlin_prtkey(string10 str)</text:p>
      <text:p text:style-name="Code">{</text:p>
      <text:p text:style-name="Code">/* body of nested procedure */</text:p>
      <text:p text:style-name="Code">}</text:p>
      <text:p text:style-name="Code"/>
      <text:p text:style-name="Code">void prtlin(string80 str)</text:p>
      <text:p text:style-name="Code">{</text:p>
      <text:p text:style-name="Code">prtlin_prtkey(keywd[x]);</text:p>
      <text:p text:style-name="Code">}</text:p>
      <text:p text:style-name="Standard"><text:soft-page-break/>Nested procedures that reference no uplevel variables are emitted as static functions (file-local scope). Procedures that reference uplevel variables receive additional pointer parameters to access the enclosing scope's variables.</text:p>
      <text:h text:style-name="Heading_20_3" text:outline-level="3"><text:bookmark-start text:name="__RefHeading___Toc21265_4012244740"/>Control structures<text:bookmark-end text:name="__RefHeading___Toc21265_4012244740"/></text:h>
      <text:p text:style-name="Standard">Pascal control structures map directly to their C equivalents:</text:p>
      <text:p text:style-name="Standard">if/then/else becomes C if/else. Compound statements (begin..end) become C brace blocks. The condition is wrapped in parentheses as required by C syntax.</text:p>
      <text:p text:style-name="Standard">while/do becomes C while. The condition and body translate directly.</text:p>
      <text:p text:style-name="Standard">repeat/until becomes C do/while with an inverted condition. Pascal "repeat ... until condition" becomes C "do { ... } while (!(condition))" because Pascal repeats until the condition is true, while C repeats while the condition is true.</text:p>
      <text:p text:style-name="Standard">Pascal:</text:p>
      <text:p text:style-name="Code">repeat</text:p>
      <text:p text:style-name="Code">x := y; readln(y)</text:p>
      <text:p text:style-name="Code">until y &gt; 5000</text:p>
      <text:p text:style-name="Standard">C:</text:p>
      <text:p text:style-name="Code">do {</text:p>
      <text:p text:style-name="Code">x = y;</text:p>
      <text:p text:style-name="Code">scanf("%ld", &amp;y);</text:p>
      <text:p text:style-name="Code">} while (!(y &gt; 5000));</text:p>
      <text:p text:style-name="Standard">for loops require special treatment. The loop limit is evaluated once into a temporary variable _forlim, matching Pascal semantics (the limit expression is evaluated only at loop entry). The temporary is declared in a new block scope to allow nested for loops with their own _forlim.</text:p>
      <text:p text:style-name="Standard">Pascal:</text:p>
      <text:p text:style-name="Code">for iter := 1 to iterations do begin</text:p>
      <text:p text:style-name="Code">{ body }</text:p>
      <text:p text:style-name="Code">end;</text:p>
      <text:p text:style-name="Standard">C:</text:p>
      <text:p text:style-name="Code">{ long _forlim = 10;</text:p>
      <text:p text:style-name="Code">for (iter = 1; iter &lt;= _forlim; iter++) {</text:p>
      <text:p text:style-name="Code">/* body */</text:p>
      <text:p text:style-name="Code">}</text:p>
      <text:p text:style-name="Code">}</text:p>
      <text:p text:style-name="Standard">For "downto" loops, the increment becomes a decrement (i--) and the comparison becomes &gt;=.</text:p>
      <text:p text:style-name="Standard">Narrow-type for loop variables (char, boolean, small subranges) receive an overflow guard: "if (var == _forlim) break;" is inserted at the end of the loop body. This prevents undefined behavior when the loop variable would overflow its type at the final increment. For example, a for loop over all char values (0..255) with an unsigned char counter would wrap around without the guard.</text:p>
      <text:p text:style-name="Standard">C:</text:p>
      <text:p text:style-name="Code">{ long _forlim = '7';</text:p>
      <text:p text:style-name="Code"><text:soft-page-break/>for (ch = '0'; ch &lt;= _forlim; ch++) {</text:p>
      <text:p text:style-name="Code">device[(unsigned char)ch].downtime = 0;</text:p>
      <text:p text:style-name="Code">if (ch == _forlim) break;</text:p>
      <text:p text:style-name="Code">}</text:p>
      <text:p text:style-name="Code">}</text:p>
      <text:p text:style-name="Standard">case statements become C switch statements. Each case label becomes a C case. Case ranges (a..b) are expanded into individual case labels for each value. Each arm ends with a break statement. The Pascal "else" or "otherwise" clause becomes C "default:".</text:p>
      <text:h text:style-name="Heading_20_3" text:outline-level="3"><text:bookmark-start text:name="__RefHeading___Toc21267_4012244740"/>With statements<text:bookmark-end text:name="__RefHeading___Toc21267_4012244740"/></text:h>
      <text:p text:style-name="Standard">Pascal "with" statements, which bring record fields into scope, are translated using a pointer temporary. A block is opened, a pointer to the record is stored in a temporary named _with1 (or _with2, etc., for nested "with" statements), and field references use arrow notation through the pointer.</text:p>
      <text:p text:style-name="Standard">Pascal:</text:p>
      <text:p text:style-name="Code">with galaxy[i][j] do begin</text:p>
      <text:p text:style-name="Code">ishistory := false;</text:p>
      <text:p text:style-name="Code">klingnum := k</text:p>
      <text:p text:style-name="Code">end</text:p>
      <text:p text:style-name="Standard">C:</text:p>
      <text:p text:style-name="Code">{ quadrec *_with1 = &amp;(galaxy[i][j]);</text:p>
      <text:p text:style-name="Code">_with1-&gt;ishistory = false;</text:p>
      <text:p text:style-name="Code">_with1-&gt;klingnum = k;</text:p>
      <text:p text:style-name="Code">}</text:p>
      <text:h text:style-name="Heading_20_3" text:outline-level="3"><text:bookmark-start text:name="__RefHeading___Toc21269_4012244740"/>Goto statements and labels<text:bookmark-end text:name="__RefHeading___Toc21269_4012244740"/></text:h>
      <text:p text:style-name="Standard">Pascal goto statements and labels are translated differently depending on whether the jump stays within the current procedure or crosses procedure boundaries.</text:p>
      <text:p text:style-name="Standard">Local gotos (within the same procedure) are translated to C goto with the label prefixed by _l. For example, Pascal "goto 99" becomes C "goto _l99;".</text:p>
      <text:p text:style-name="Standard">Non-local gotos (jumping out of a nested procedure to a label in an enclosing scope) are translated using setjmp/longjmp. At the label site, a setjmp establishes the jump target into a jmp_buf variable named _jmpenv_N (where N is the label number). At the goto site, longjmp transfers control. This is necessary because C goto cannot cross function boundaries.</text:p>
      <text:p text:style-name="Standard">Pascal:</text:p>
      <text:p text:style-name="Code">label 4, 5, 6;</text:p>
      <text:p text:style-name="Code">...</text:p>
      <text:p text:style-name="Code">goto 4; { from nested procedure }</text:p>
      <text:p text:style-name="Standard">C:</text:p>
      <text:p text:style-name="Code">jmp_buf _jmpenv_4;</text:p>
      <text:p text:style-name="Code">jmp_buf _jmpenv_5;</text:p>
      <text:p text:style-name="Code">jmp_buf _jmpenv_6;</text:p>
      <text:p text:style-name="Code">...</text:p>
      <text:p text:style-name="Code">longjmp(_jmpenv_4, 1);</text:p>
      <text:p text:style-name="Code">...</text:p>
      <text:p text:style-name="Code"><text:soft-page-break/>if (setjmp(_jmpenv_4)) goto _l4;</text:p>
      <text:h text:style-name="Heading_20_3" text:outline-level="3"><text:bookmark-start text:name="__RefHeading___Toc21271_4012244740"/>Write and writeln<text:bookmark-end text:name="__RefHeading___Toc21271_4012244740"/></text:h>
      <text:p text:style-name="Standard">Pascal write/writeln calls are translated to C printf/fprintf calls. The Pascal format specifiers (field width and decimal places) are converted to C printf format specifiers. writeln appends a "\n" to the format string.</text:p>
      <text:p text:style-name="Standard">Each Pascal type uses a specific format specifier:</text:p>
      <text:p text:style-name="Standard">Integers: %ld (long decimal). When a field width is specified, e.g., write(x:5), this becomes printf("%5ld", (long)(x)). When no field width is specified, the default Pascal field width of 11 is used: printf("%11ld", (long)(x)).</text:p>
      <text:p text:style-name="Standard">Reals: When both width and decimal places are given, e.g., write(r:10:2), the format is %10.2f. When only width is specified, %e (scientific notation) format is used. Variable field widths use the printf * specifier.</text:p>
      <text:p text:style-name="Standard">Characters: %c, with a cast to int: printf("%c", (int)(ch)).</text:p>
      <text:p text:style-name="Standard">Strings (packed arrays of char): %N.Ns where N is the declared array length. The argument is the address of element [1]: printf("%43.43s", &amp;a[1]).</text:p>
      <text:p text:style-name="Standard">String literals in write statements are placed directly into the printf format string rather than as separate arguments.</text:p>
      <text:p text:style-name="Standard">Boolean values are written as the strings "true" or "false".</text:p>
      <text:p text:style-name="Standard">write to a specific file (write(f, ...)) uses fprintf(f, ...) instead of printf.</text:p>
      <text:h text:style-name="Heading_20_3" text:outline-level="3"><text:bookmark-start text:name="__RefHeading___Toc21273_4012244740"/>Read and readln<text:bookmark-end text:name="__RefHeading___Toc21273_4012244740"/></text:h>
      <text:p text:style-name="Standard">Pascal read/readln calls are translated to C scanf/fscanf calls. readln includes a line-consumption sequence after reading values.</text:p>
      <text:p text:style-name="Standard">Integer reading: readln(x) becomes scanf("%ld", &amp;x); followed by scanf("%*[^\n]"); scanf("%*c"); to consume the remainder of the line.</text:p>
      <text:p text:style-name="Standard">Character reading: read(ch) uses the p2c_readc macro, which reads a character and substitutes a space for end-of-line or end-of-file, matching Pascal semantics.</text:p>
      <text:p text:style-name="Standard">Reading from a file: read(f, x) becomes fscanf(f, ...) with the file variable as the first argument.</text:p>
      <text:h text:style-name="Heading_20_3" text:outline-level="3"><text:bookmark-start text:name="__RefHeading___Toc21275_4012244740"/>File operations<text:bookmark-end text:name="__RefHeading___Toc21275_4012244740"/></text:h>
      <text:p text:style-name="Standard">Pascal text files are represented as C FILE* pointers. The standard files input and output are mapped to stdin and stdout respectively when they appear as program parameters.</text:p>
      <text:p text:style-name="Standard">reset(f) and rewrite(f) are translated to fopen calls with appropriate modes. close(f) becomes fclose(f). assign(f, name) associates a filename with a file variable.</text:p>
      <text:p text:style-name="Standard">eof(f) uses the p2c_eof macro, which performs a look-ahead read to accurately detect end-of-file. This is necessary because Pascal eof semantics differ from C feof: Pascal eof is true when no more data can be read, while C feof is only true after a read has failed.</text:p>
      <text:p text:style-name="Standard"><text:soft-page-break/>eoln(f) uses the p2c_eoln macro, which peeks at the next character and checks for a newline (character 10) or EOF.</text:p>
      <text:p text:style-name="Standard">Typed (binary) files use the p2c_file structure from the runtime support library. The Pascal operations read/write on typed files become p2c_fread/p2c_fwrite calls.</text:p>
      <text:h text:style-name="Heading_20_3" text:outline-level="3"><text:bookmark-start text:name="__RefHeading___Toc21277_4012244740"/>Arithmetic operators<text:bookmark-end text:name="__RefHeading___Toc21277_4012244740"/></text:h>
      <text:p text:style-name="Standard">Most Pascal arithmetic operators translate directly to their C equivalents: + to +, - to -, * to *.</text:p>
      <text:p text:style-name="Standard">Pascal div (integer division) translates to C / (integer division when both operands are integers).</text:p>
      <text:p text:style-name="Standard">Pascal mod translates to C %.</text:p>
      <text:p text:style-name="Standard">Pascal / (real division) always produces a real result, even when both operands are integers. In C, integer / integer produces an integer result. p2c handles this by casting at least one operand to double: (double)(x) / (double)(y).</text:p>
      <text:h text:style-name="Heading_20_3" text:outline-level="3"><text:bookmark-start text:name="__RefHeading___Toc21279_4012244740"/>Relational and logical operators<text:bookmark-end text:name="__RefHeading___Toc21279_4012244740"/></text:h>
      <text:p text:style-name="Standard">Relational operators translate directly: = to ==, &lt;&gt; to !=, &lt; to &lt;, &gt; to &gt;, &lt;= to &lt;=, &gt;= to &gt;=.</text:p>
      <text:p text:style-name="Standard">Logical operators translate as: and to &amp;&amp;, or to ||, not to !. Note that Pascal and/or do not short-circuit (both operands are always evaluated), while C &amp;&amp; and || do short-circuit. This semantic difference is accepted as a pragmatic compromise; in practice, most Pascal programs behave correctly with short-circuit evaluation.</text:p>
      <text:h text:style-name="Heading_20_3" text:outline-level="3"><text:bookmark-start text:name="__RefHeading___Toc21281_4012244740"/>Standard functions and procedures<text:bookmark-end text:name="__RefHeading___Toc21281_4012244740"/></text:h>
      <text:p text:style-name="Standard">Pascal standard functions are translated to their C equivalents:</text:p>
      <text:p text:style-name="Standard">abs(x): abs(x) for integers, fabs(x) for reals.</text:p>
      <text:p text:style-name="Standard">sqr(x): expanded inline as x*x (or as a multiplication expression).</text:p>
      <text:p text:style-name="Standard">sqrt(x), sin(x), cos(x), exp(x), arctan(x): sqrt, sin, cos, exp, atan from math.h.</text:p>
      <text:p text:style-name="Standard">ln(x): log(x) from math.h.</text:p>
      <text:p text:style-name="Standard">ord(x): cast to long, e.g., (long)(x).</text:p>
      <text:p text:style-name="Standard">chr(x): cast to char, e.g., (char)(x).</text:p>
      <text:p text:style-name="Standard">succ(x): x + 1 (inline expansion).</text:p>
      <text:p text:style-name="Standard">pred(x): x - 1 (inline expansion).</text:p>
      <text:p text:style-name="Standard">odd(x): x % 2 (inline expansion).</text:p>
      <text:p text:style-name="Standard">trunc(x): cast to long, (long)(x).</text:p>
      <text:p text:style-name="Standard">round(x): lround(x) from math.h.</text:p>
      <text:h text:style-name="Heading_20_3" text:outline-level="3"><text:bookmark-start text:name="__RefHeading___Toc21283_4012244740"/>Comments<text:bookmark-end text:name="__RefHeading___Toc21283_4012244740"/></text:h>
      <text:p text:style-name="Standard">Pascal comments are preserved in the C output. Both comment styles ({ } and (* *)) are converted to C /* */ comments. The text content of the comment is preserved as-is.</text:p>
      <text:p text:style-name="Standard"><text:soft-page-break/>Star-decorated comment blocks (such as comment headers surrounded by asterisks) are translated with the Pascal delimiters converted to their C equivalents. For example, a Pascal comment beginning with "{***" is emitted as "/***" and the closing "***}" becomes "***/".</text:p>
      <text:p text:style-name="Standard">Comments are associated with the nearest following token and are emitted at the corresponding point in the C output. Comments that appear at the end of a Pascal line are placed as trailing comments on the corresponding C statement.</text:p>
      <text:h text:style-name="Heading_20_3" text:outline-level="3"><text:bookmark-start text:name="__RefHeading___Toc21285_4012244740"/>Type definitions<text:bookmark-end text:name="__RefHeading___Toc21285_4012244740"/></text:h>
      <text:p text:style-name="Standard">Pascal type definitions are translated to C typedef declarations, which appear in the global scope before any function definitions. Named record types produce both a typedef and a struct definition. Named array types produce typedef with the array dimensions. Named scalar types produce typedef to the appropriate C base type.</text:p>
      <text:p text:style-name="Standard">Pascal:</text:p>
      <text:p text:style-name="Code">type string10 = packed array [1..10] of char;</text:p>
      <text:p text:style-name="Code">string80 = packed array [1..80] of char;</text:p>
      <text:p text:style-name="Standard">C:</text:p>
      <text:p text:style-name="Code">typedef char string10[12];</text:p>
      <text:p text:style-name="Code">typedef char string80[82];</text:p>
      <text:h text:style-name="Heading_20_2" text:outline-level="2"><text:bookmark-start text:name="__RefHeading___Toc21287_4012244740"/>Limitations and known issues<text:bookmark-end text:name="__RefHeading___Toc21287_4012244740"/></text:h>
      <text:p text:style-name="Standard">p2c has been tested on a limited set of programs: the sample programs included with Pascal-P6 (hello, prime, qsort, roman, match, fbench, drystone, startrek, pascals, basics), the BASIC interpreter, and the ISO 7185 acceptance test (iso7185pat). All of these produce correct output after translation and C compilation.</text:p>
      <text:p text:style-name="Standard">The following limitations are known:</text:p>
      <text:p text:style-name="Standard">1. Module features not supported: The Pascaline "uses" and "joins" statements for modular programming are not supported. p2c can only translate single-file Pascal programs.</text:p>
      <text:p text:style-name="Standard">2. Short-circuit evaluation: Pascal and/or operators evaluate both operands, while C &amp;&amp; and || short-circuit. Programs that depend on both operands being evaluated (e.g., for side effects) may behave differently in the C translation.</text:p>
      <text:p text:style-name="Standard">3. Identifier recycle warnings: During translation, p2c may report identifier recycle balance warnings. These are cosmetic and do not affect the correctness of the output.</text:p>
      <text:p text:style-name="Standard">4. The generated C code requires the pas2csup runtime library (pas2csup.h and pas2csup.c) for set operations and typed file I/O. These files must be available when compiling the generated C code.</text:p>
      <text:p text:style-name="Standard">5. The generated C code uses GCC statement expressions ({ }) in some helper macros (p2c_eof, p2c_eoln, p2c_readc). This is a GCC extension also supported by clang, but may not work with all C compilers.</text:p>
      <text:p text:style-name="Standard">6. Floating-point arithmetic may produce slightly different results between the Pascal interpreter and the C native code due to differences in intermediate precision and rounding.</text:p>
      <text:p text:style-name="Standard"/>
      <text:h text:style-name="P205" text:outline-level="1"><text:bookmark-start text:name="__RefHeading___Toc19436_1849125053"/>pasdoc: The Pascal-P6 documentation generator<text:bookmark-end text:name="__RefHeading___Toc19436_1849125053"/></text:h>
      <text:h text:style-name="Heading_20_2" text:outline-level="2"><text:bookmark-start text:name="__RefHeading___Toc19438_1849125053"/>Overview<text:bookmark-end text:name="__RefHeading___Toc19438_1849125053"/></text:h>
      <text:p text:style-name="Standard">pasdoc generates reference documentation for a Pascal program from the comments attached to its declarations. It reads a single Pascal source file (.pas) and produces either a plain text or an HTML reference, in the spirit of tools such as Doxygen.</text:p>
      <text:p text:style-name="Standard">pasdoc documents the outer-scope declarations of the program or module — its constants, types, fixed variables, variables, procedures and functions — together with the block comment that precedes each one, and it builds a cross reference recording where each identifier is used. Because it shares the Pascal-P6 front end, it understands the same Pascaline source language as the compiler, including the modules a program joins.</text:p>
      <text:h text:style-name="Heading_20_2" text:outline-level="2"><text:bookmark-start text:name="__RefHeading___Toc19440_1849125053"/>Executing pasdoc<text:bookmark-end text:name="__RefHeading___Toc19440_1849125053"/></text:h>
      <text:p text:style-name="Standard">pasdoc is invoked with the source file and, optionally, the output format:</text:p>
      <text:p text:style-name="Code">pasdoc [options] &lt;file&gt;.pas</text:p>
      <text:p text:style-name="Standard">The output file is given the base name of the source with its extension changed: &lt;file&gt;.doc for plain text, or &lt;file&gt;.html for HTML. Options may appear before or after the file name.</text:p>
      <text:h text:style-name="Heading_20_3" text:outline-level="3"><text:bookmark-start text:name="__RefHeading___Toc19442_1849125053"/>Command-line options<text:bookmark-end text:name="__RefHeading___Toc19442_1849125053"/></text:h>
      <text:p text:style-name="Standard">-text — produce plain text output, written to &lt;file&gt;.doc. This is the default.</text:p>
      <text:p text:style-name="Standard">-html — produce HTML output, written to &lt;file&gt;.html.</text:p>
      <text:p text:style-name="Standard">-modules=&lt;path&gt; — a colon-separated list of directories in which to find the modules the source joins, following the same convention as the pc integrator.</text:p>
      <text:h text:style-name="Heading_20_2" text:outline-level="2"><text:bookmark-start text:name="__RefHeading___Toc19444_1849125053"/>Output<text:bookmark-end text:name="__RefHeading___Toc19444_1849125053"/></text:h>
      <text:p text:style-name="Standard">The plain text reference (.doc) opens with a summary listing the joined modules and then the program’s constants, types, fixed variables, variables, and procedures and functions. A detail section follows, giving each declaration’s signature and its full comment, and the reference closes with a cross reference of where each identifier is used.</text:p>
      <text:p text:style-name="Standard">The HTML reference (.html) is a styled, self-contained page with a navigation sidebar, a documentation view, and a syntax-highlighted source view whose identifiers link to their declarations, followed by the same cross reference. If a file named &lt;file&gt;.theops.txt sits beside the source, its contents are included as a "Theory of operations" view.</text:p>
      <text:h text:style-name="Heading_20_2" text:outline-level="2"><text:bookmark-start text:name="__RefHeading___Toc19446_1849125053"/>Limitations and known issues<text:bookmark-end text:name="__RefHeading___Toc19446_1849125053"/></text:h>
      <text:p text:style-name="Standard">pasdoc documents only outer-scope declarations; declarations local to a procedure or function are not included. A comment is associated with the declaration that follows it; inline comments are not extracted as documentation. For a module referenced through a uses or joins clause, only the first line of the module’s header comment is shown as a brief description. Comment text longer than the internal line limit is truncated.</text:p>
      <text:h text:style-name="P205" text:outline-level="1"><text:bookmark-start text:name="__RefHeading___Toc19448_1849125053"/>pasfmt: The Pascal-P6 source formatter<text:bookmark-end text:name="__RefHeading___Toc19448_1849125053"/></text:h>
      <text:h text:style-name="Heading_20_2" text:outline-level="2"><text:bookmark-start text:name="__RefHeading___Toc19450_1849125053"/>Overview<text:bookmark-end text:name="__RefHeading___Toc19450_1849125053"/></text:h>
      <text:p text:style-name="Standard">pasfmt is a source formatter, or pretty printer, for Pascaline and ISO 7185 Pascal. It parses a source file and rewrites it with consistent indentation, line wrapping, blank-line placement and aligned declarations, while preserving the original comments. It recovers from syntax errors rather than stopping, so it can reformat source that is incomplete or does not yet compile.</text:p>
      <text:h text:style-name="Heading_20_2" text:outline-level="2"><text:bookmark-start text:name="__RefHeading___Toc19452_1849125053"/>Executing pasfmt<text:bookmark-end text:name="__RefHeading___Toc19452_1849125053"/></text:h>
      <text:p text:style-name="Standard">pasfmt is invoked with the options and the source file:</text:p>
      <text:p text:style-name="Code">pasfmt [options] &lt;file&gt;</text:p>
      <text:p text:style-name="Standard">It reads &lt;file&gt;.pas and writes the formatted result to &lt;file&gt;.pas.fmt, leaving the original untouched. Each of the boolean options below may be turned off by prefixing its name with the letter n, for example nbracketbreak.</text:p>
      <text:h text:style-name="Heading_20_3" text:outline-level="3"><text:bookmark-start text:name="__RefHeading___Toc19454_1849125053"/>Command-line options<text:bookmark-end text:name="__RefHeading___Toc19454_1849125053"/></text:h>
      <text:p text:style-name="Standard">-h, --help — print a help message and exit.</text:p>
      <text:p text:style-name="Standard">-l, --list — list source lines as they are processed.</text:p>
      <text:p text:style-name="Standard">-s, --iso7185 — restrict the input to ISO 7185 Pascal; Pascaline-only keywords are then treated as ordinary identifiers. The default is Pascaline.</text:p>
      <text:p text:style-name="Standard">-e, --experr — show expanded error descriptions. On by default.</text:p>
      <text:p text:style-name="Standard">-c, --columns &lt;n&gt; — wrap output at column n. The default is 80; a value of 0 disables wrapping.</text:p>
      <text:p text:style-name="Standard">-b, --bracketbreak — place blank lines around begin and end and around the const, type and var sections. On by default.</text:p>
      <text:p text:style-name="Standard">-f, --flushleft — do not indent the continuation lines of a multi-line const, type or var definition. On by default.</text:p>
      <text:p text:style-name="Standard">-z, --columnize — align the = or : separators within a const, type or var section so they form neat columns. On by default.</text:p>
      <text:p text:style-name="Standard">-n, --sourceline — prefix each output line with its original source line number as a comment.</text:p>
      <text:p text:style-name="Standard">-r, --noerror — suppress the error listing on the console. The error count is still reported. On by default.</text:p>
      <text:h text:style-name="Heading_20_3" text:outline-level="3"><text:bookmark-start text:name="__RefHeading___Toc19456_1849125053"/>The instruction file<text:bookmark-end text:name="__RefHeading___Toc19456_1849125053"/></text:h>
      <text:p text:style-name="Standard">If a file named &lt;file&gt;.fmt sits beside &lt;file&gt;.pas, pasfmt reads it for additional directives, applied after the command-line options, so that a module can carry its own formatting settings. Each line is a command — the long or short name of an option — with an optional parameter; a line beginning with an exclamation mark is a comment. For example:</text:p>
      <text:p text:style-name="Code">! formatting for this module</text:p>
      <text:p text:style-name="Code">columns 100</text:p>
      <text:p text:style-name="Code">columnize</text:p>
      <text:p text:style-name="Code">nbracketbreak</text:p>
      <text:h text:style-name="Heading_20_2" text:outline-level="2"><text:bookmark-start text:name="__RefHeading___Toc19458_1849125053"/><text:soft-page-break/>Limitations and known issues<text:bookmark-end text:name="__RefHeading___Toc19458_1849125053"/></text:h>
      <text:p text:style-name="Standard">pasfmt makes a single forward pass and builds no syntax tree, so a few layout decisions — such as whether a short definition fits on one line — are made as the text is read and are not revised. Column alignment applies within a single const, type or var section and does not cross section boundaries; a definition that wraps is emitted at once and does not take part in alignment. Comments keep their position relative to the code; (* *) and ! comments are rewritten in { } form, and nested comment styles are not supported.</text:p>
      <text:h text:style-name="P205" text:outline-level="1"><text:bookmark-start text:name="__RefHeading___Toc19460_1849125053"/>passym: The Pascal-P6 symbol reporter<text:bookmark-end text:name="__RefHeading___Toc19460_1849125053"/></text:h>
      <text:h text:style-name="Heading_20_2" text:outline-level="2"><text:bookmark-start text:name="__RefHeading___Toc19462_1849125053"/>Overview<text:bookmark-end text:name="__RefHeading___Toc19462_1849125053"/></text:h>
      <text:p text:style-name="Standard">passym reports the symbol table and cross reference of a Pascal program. It parses a single source file with the Pascal-P6 front end and writes one record for each declared symbol and, on request, one record for each use of a symbol. It exists chiefly to support editor integration — the go-to-definition and find-references features of the Pascaline VSCode extension are built on it — but it is equally useful on its own for auditing a program’s structure.</text:p>
      <text:h text:style-name="Heading_20_2" text:outline-level="2"><text:bookmark-start text:name="__RefHeading___Toc19464_1849125053"/>Executing passym<text:bookmark-end text:name="__RefHeading___Toc19464_1849125053"/></text:h>
      <text:p text:style-name="Standard">passym is invoked with the options and the source file:</text:p>
      <text:p text:style-name="Code">passym [options] &lt;file&gt;</text:p>
      <text:p text:style-name="Standard">It reads &lt;file&gt;.pas and writes its records to standard output; the final line reports the error count. passym accepts the standard Pascal-P6 compiler options, and any boolean option may be negated with an n prefix (for example -nlist). The options most relevant to passym are:</text:p>
      <text:p text:style-name="Standard">-r, -reference — also emit a reference record for each use of a symbol. Without it, only declarations are reported.</text:p>
      <text:p text:style-name="Standard">-l, -list — list source lines as they are parsed.</text:p>
      <text:p text:style-name="Standard">-s, -iso7185 — parse the input as ISO 7185 Pascal rather than Pascaline.</text:p>
      <text:h text:style-name="Heading_20_2" text:outline-level="2"><text:bookmark-start text:name="__RefHeading___Toc19466_1849125053"/>Output format<text:bookmark-end text:name="__RefHeading___Toc19466_1849125053"/></text:h>
      <text:p text:style-name="Standard">The records are tab-separated and line-oriented, so they are easily read by another program. A symbol record has the form:</text:p>
      <text:p text:style-name="Code">SYM &lt;name&gt; &lt;class&gt; &lt;line&gt; &lt;level&gt; &lt;type&gt; &lt;value&gt; &lt;endline&gt;</text:p>
      <text:p text:style-name="Standard">where class is one of types, konst, vars, fixedt, field, proc, func or alias; line is the line on which the symbol is declared; level is the scope nesting, with 0 the outermost; type is the resolved type name; value is the value of a konst; and endline is the line on which a procedure or function body ends.</text:p>
      <text:p text:style-name="Standard">A reference record, emitted only with -reference, has the form:</text:p>
      <text:p text:style-name="Code">REF &lt;name&gt; &lt;useline&gt; &lt;defline&gt; &lt;deflevel&gt;</text:p>
      <text:p text:style-name="Standard">giving the line on which the symbol is used, the line of the declaration it resolves to, and that declaration’s scope level. Each use produces one record.</text:p>
      <text:h text:style-name="Heading_20_2" text:outline-level="2"><text:bookmark-start text:name="__RefHeading___Toc19468_1849125053"/>Limitations and known issues<text:bookmark-end text:name="__RefHeading___Toc19468_1849125053"/></text:h>
      <text:p text:style-name="Standard">References inside include files are not reported. Symbols are listed flat with their scope level rather than as a scope tree. The output is plain tab-separated text, not JSON or XML.</text:p>
      <text:h text:style-name="P205" text:outline-level="1"><text:bookmark-start text:name="__RefHeading___Toc19470_1849125053"/>spew: The compiler fault generator<text:bookmark-end text:name="__RefHeading___Toc19470_1849125053"/></text:h>
      <text:h text:style-name="Heading_20_2" text:outline-level="2"><text:bookmark-start text:name="__RefHeading___Toc19472_1849125053"/>Overview<text:bookmark-end text:name="__RefHeading___Toc19472_1849125053"/></text:h>
      <text:p text:style-name="Standard">spew is a robustness tester, or fault injector, for the Pascal-P6 compiler. It takes a Pascal source file and, one position at a time, replaces a single character with an alternate character, compiles the altered program, and records how many errors that one-character change produced. Tabulated across the whole file, the result measures the quality of the compiler’s error recovery: a single bad character should produce only a few errors, not a cascade.</text:p>
      <text:p text:style-name="Standard">spew is also a crash finder. If the compiler fails to complete on an altered file — raising an operator-attention condition, or producing no completion at all — spew stops and leaves the offending program in spewtest.pas so the fault can be reproduced and fixed. It is a long-standing tool that has proven very effective at finding compiler faults and improving error handling.</text:p>
      <text:h text:style-name="Heading_20_2" text:outline-level="2"><text:bookmark-start text:name="__RefHeading___Toc19474_1849125053"/>Executing spew<text:bookmark-end text:name="__RefHeading___Toc19474_1849125053"/></text:h>
      <text:p text:style-name="Standard">spew is invoked with the options and the source file:</text:p>
      <text:p text:style-name="Code">spew [options] &lt;file&gt;</text:p>
      <text:p text:style-name="Standard">spew reads &lt;file&gt;, writes each altered program to spewtest.pas, compiles it through the compile script (capturing the compiler’s output in spewtest.err), and inspects the result. In linear mode, the default, it walks every character of every line in turn; in random mode it injects faults at random positions.</text:p>
      <text:h text:style-name="Heading_20_3" text:outline-level="3"><text:bookmark-start text:name="__RefHeading___Toc19476_1849125053"/>Command-line options<text:bookmark-end text:name="__RefHeading___Toc19476_1849125053"/></text:h>
      <text:p text:style-name="Standard">-h, --help — print a help message and exit.</text:p>
      <text:p text:style-name="Standard">-l, --line &lt;n&gt; — set the line of a single fault; the default is 1. Selecting a line or character places spew in single-fault mode.</text:p>
      <text:p text:style-name="Standard">-c, --char &lt;n&gt; — set the character of a single fault; the default is 1.</text:p>
      <text:p text:style-name="Standard">-r, --random — inject faults at random positions instead of walking linearly.</text:p>
      <text:p text:style-name="Standard">-i, --iterations &lt;n&gt; — limit the number of faults injected. The default in linear mode is the length of the file.</text:p>
      <text:p text:style-name="Standard">-p, --proceed — override single-fault mode and continue past the selected position. It must follow the --line and --char options.</text:p>
      <text:p text:style-name="Standard">-a, --again — resume from the position recorded in the existing spewtest.pas.</text:p>
      <text:h text:style-name="Heading_20_2" text:outline-level="2"><text:bookmark-start text:name="__RefHeading___Toc19478_1849125053"/>Results<text:bookmark-end text:name="__RefHeading___Toc19478_1849125053"/></text:h>
      <text:p text:style-name="Standard">When the run completes, spew prints the worst cases — the positions whose single-character change produced the most errors — highest count first. The single worst case is written back into spewtest.pas so it can be re-run immediately for investigation. A high error count for a one-character change points at a place where the compiler’s error recovery could be improved; an abort points at a fault that should be corrected at once.</text:p>
      <text:h text:style-name="Heading_20_2" text:outline-level="2"><text:bookmark-start text:name="__RefHeading___Toc19480_1849125053"/>Limitations and known issues<text:bookmark-end text:name="__RefHeading___Toc19480_1849125053"/></text:h>
      <text:p text:style-name="Standard">spew is a C program (source/spew.c) and is built through the Makefile, with make spew, rather than through pc. The alternate character it substitutes is the tilde. Lines longer than its internal limit and files <text:soft-page-break/>longer than its line limit are processed only up to those bounds. Because spew drives the compiler through the compile script, that script and the compiler binaries must be reachable on the path.</text:p>
      <text:h text:style-name="P205" text:outline-level="1"><text:bookmark-start text:name="__RefHeading___Toc15588_2478585429"/><text:bookmark-start text:name="_Ref527962450"/><text:bookmark-start text:name="_Toc528309109"/><text:bookmark-start text:name="_Ref527967513"/><text:bookmark-start text:name="_Ref527967812"/>Pascal-P6 debugger mode<text:bookmark-end text:name="__RefHeading___Toc15588_2478585429"/><text:bookmark-end text:name="_Ref527962450"/><text:bookmark-end text:name="_Toc528309109"/><text:bookmark-end text:name="_Ref527967513"/><text:bookmark-end text:name="_Ref527967812"/></text:h>
      <text:p text:style-name="Standard">Debug mode in Pascal-P6 gives you the ability to step through, set break points, dump variable values and other facilities to enable debugging of issues with Pascaline code, both at the machine level and also at source level.</text:p>
      <text:p text:style-name="P196">It is possible to debug Pascal-P6 programs at the target machine code level <text:span text:style-name="T116">using gdb, lldb or similar tool</text:span>. But pint includes a portable debugger that works the same and provides the same capabilities on any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text:style-name="WWNum14">
        <text:list-item>
          <text:p text:style-name="P218">Trace through the code at source level.</text:p>
        </text:list-item>
        <text:list-item>
          <text:p text:style-name="P218">Print the contents of any variable in Pascal formatted form.</text:p>
        </text:list-item>
        <text:list-item>
          <text:p text:style-name="P218">Print what blocks are currently running.</text:p>
        </text:list-item>
        <text:list-item>
          <text:p text:style-name="P218">Watch changes in variables <text:span text:style-name="T116">(and not just on breakpoints)</text:span>.</text:p>
        </text:list-item>
        <text:list-item>
          <text:p text:style-name="P218">Place breakpoints at source lines.</text:p>
        </text:list-item>
        <text:list-item>
          <text:p text:style-name="P218">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9">Short option</text:p>
          </table:table-cell>
          <table:table-cell table:style-name="Table19.A1" office:value-type="string">
            <text:p text:style-name="P29">Long option</text:p>
          </table:table-cell>
          <table:table-cell table:style-name="Table19.A1" office:value-type="string">
            <text:p text:style-name="P29">Description</text:p>
          </table:table-cell>
        </table:table-row>
        <table:table-row table:style-name="Table19.1">
          <table:table-cell table:style-name="Table19.A2" office:value-type="string">
            <text:p text:style-name="P153">w+/-</text:p>
          </table:table-cell>
          <table:table-cell table:style-name="Table19.B2" office:value-type="string">
            <text:p text:style-name="P148">debug+/-</text:p>
          </table:table-cell>
          <table:table-cell table:style-name="Table19.C2" office:value-type="string">
            <text:p text:style-name="P148">Starts debugging before code is run.</text:p>
          </table:table-cell>
        </table:table-row>
        <table:table-row table:style-name="Table19.1">
          <table:table-cell table:style-name="Table19.A3" office:value-type="string">
            <text:p text:style-name="P153">a+/-</text:p>
          </table:table-cell>
          <table:table-cell table:style-name="Table19.B3" office:value-type="string">
            <text:p text:style-name="P148">debugflt+/-</text:p>
          </table:table-cell>
          <table:table-cell table:style-name="Table19.C3" office:value-type="string">
            <text:p text:style-name="P148">Starts debugging when fault is encountered.</text:p>
          </table:table-cell>
        </table:table-row>
        <table:table-row table:style-name="Table19.1">
          <table:table-cell table:style-name="Table19.A2" office:value-type="string">
            <text:p text:style-name="P153">f+/-</text:p>
          </table:table-cell>
          <table:table-cell table:style-name="Table19.B2" office:value-type="string">
            <text:p text:style-name="P148">debugsrc+/-</text:p>
          </table:table-cell>
          <table:table-cell table:style-name="Table19.C2" office:value-type="string">
            <text:p text:style-name="P148">A modifier, sets debugger to source mode</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text:span text:style-name="T88">$</text:span>a/<text:span text:style-name="T88">$</text:span>debugflt option is used to enter the debugger mode only after a fault is encountered. The w/debug option is primary and will override <text:span text:style-name="T88">$</text:span>a/<text:span text:style-name="T88">$</text:span>debugflt.</text:p>
      <text:p text:style-name="Standard">The <text:span text:style-name="T88">$</text:span>f/<text:span text:style-name="T88">$</text:span>debugsrc option modifies the behavior of the w/debug or <text:span text:style-name="T88">$</text:span>a/<text:span text:style-name="T88">$</text:span>debugflt flags. It performs two actions:</text:p>
      <text:p text:style-name="Standard">1. The program is stopped at the first statement in the program block.</text:p>
      <text:p text:style-name="Standard">2. Program status, the location report after stepping, breakpoints, etc., are reported in source code terms.</text:p>
      <text:h text:style-name="Heading_20_2" text:outline-level="2"><text:bookmark-start text:name="__RefHeading___Toc18920_1027172818"/><text:soft-page-break/>Commands<text:bookmark-end text:name="__RefHeading___Toc18920_1027172818"/></text:h>
      <text:p text:style-name="Standard">The commands possible in debug mode are:</text:p>
      <text:p text:style-name="Standard">Commands:</text:p>
      <table:table table:name="Table20" table:style-name="Table20" table:template-name="mytable5">
        <table:table-column table:style-name="Table20.A"/>
        <table:table-column table:style-name="Table20.B"/>
        <table:table-column table:style-name="Table20.C"/>
        <table:table-row table:style-name="Table20.1">
          <table:table-cell table:style-name="Table20.A1" office:value-type="string">
            <text:p text:style-name="P11">Command</text:p>
          </table:table-cell>
          <table:table-cell table:style-name="Table20.A1" office:value-type="string">
            <text:p text:style-name="P11">Parameters</text:p>
          </table:table-cell>
          <table:table-cell table:style-name="Table20.A1" office:value-type="string">
            <text:p text:style-name="P11">Description</text:p>
          </table:table-cell>
        </table:table-row>
        <table:table-row table:style-name="Table20.1">
          <table:table-cell table:style-name="Table20.A2" office:value-type="string">
            <text:p text:style-name="P66">h|help</text:p>
          </table:table-cell>
          <table:table-cell table:style-name="Table20.B2" office:value-type="string">
            <text:p text:style-name="P81"/>
          </table:table-cell>
          <table:table-cell table:style-name="Table20.B2" office:value-type="string">
            <text:p text:style-name="P67">Help</text:p>
          </table:table-cell>
        </table:table-row>
        <table:table-row table:style-name="Table20.1">
          <table:table-cell table:style-name="Table20.A2" office:value-type="string">
            <text:p text:style-name="P66">l</text:p>
          </table:table-cell>
          <table:table-cell table:style-name="Table20.B3" office:value-type="string">
            <text:p text:style-name="P67">[m] [s[ e|:l]</text:p>
          </table:table-cell>
          <table:table-cell table:style-name="Table20.B3" office:value-type="string">
            <text:p text:style-name="P67">List source lines</text:p>
          </table:table-cell>
        </table:table-row>
        <table:table-row table:style-name="Table20.1">
          <table:table-cell table:style-name="Table20.A2" office:value-type="string">
            <text:p text:style-name="P66">lc</text:p>
          </table:table-cell>
          <table:table-cell table:style-name="Table20.B2" office:value-type="string">
            <text:p text:style-name="P67">[s[ e|:l]</text:p>
          </table:table-cell>
          <table:table-cell table:style-name="Table20.B2" office:value-type="string">
            <text:p text:style-name="P67">List source and machine lines coordinated</text:p>
          </table:table-cell>
        </table:table-row>
        <table:table-row table:style-name="Table20.1">
          <table:table-cell table:style-name="Table20.A2" office:value-type="string">
            <text:p text:style-name="P66">li</text:p>
          </table:table-cell>
          <table:table-cell table:style-name="Table20.B3" office:value-type="string">
            <text:p text:style-name="P67">[s[ e|:l]</text:p>
          </table:table-cell>
          <table:table-cell table:style-name="Table20.B3" office:value-type="string">
            <text:p text:style-name="P67">List machine instructions</text:p>
          </table:table-cell>
        </table:table-row>
        <table:table-row table:style-name="Table20.1">
          <table:table-cell table:style-name="Table20.A2" office:value-type="string">
            <text:p text:style-name="P66">p</text:p>
          </table:table-cell>
          <table:table-cell table:style-name="Table20.B2" office:value-type="string">
            <text:p text:style-name="P67">v</text:p>
          </table:table-cell>
          <table:table-cell table:style-name="Table20.B2" office:value-type="string">
            <text:p text:style-name="P67">Print expression</text:p>
          </table:table-cell>
        </table:table-row>
        <table:table-row table:style-name="Table20.1">
          <table:table-cell table:style-name="Table20.A2" office:value-type="string">
            <text:p text:style-name="P66">d[b|l][8|16|32|64]</text:p>
          </table:table-cell>
          <table:table-cell table:style-name="Table20.B3" office:value-type="string">
            <text:p text:style-name="P67">[s[ e|:l]</text:p>
          </table:table-cell>
          <table:table-cell table:style-name="Table20.B3" office:value-type="string">
            <text:p text:style-name="P67">Dump memory</text:p>
          </table:table-cell>
        </table:table-row>
        <table:table-row table:style-name="Table20.1">
          <table:table-cell table:style-name="Table20.A2" office:value-type="string">
            <text:p text:style-name="P66">e</text:p>
          </table:table-cell>
          <table:table-cell table:style-name="Table20.B2" office:value-type="string">
            <text:p text:style-name="P67">a v[ v]...</text:p>
          </table:table-cell>
          <table:table-cell table:style-name="Table20.B2" office:value-type="string">
            <text:p text:style-name="P67">Enter byte values to memory address</text:p>
          </table:table-cell>
        </table:table-row>
        <table:table-row table:style-name="Table20.1">
          <table:table-cell table:style-name="Table20.A2" office:value-type="string">
            <text:p text:style-name="P66">st</text:p>
          </table:table-cell>
          <table:table-cell table:style-name="Table20.B3" office:value-type="string">
            <text:p text:style-name="P67">d v</text:p>
          </table:table-cell>
          <table:table-cell table:style-name="Table20.B3" office:value-type="string">
            <text:p text:style-name="P67">Set program variable</text:p>
          </table:table-cell>
        </table:table-row>
        <table:table-row table:style-name="Table20.1">
          <table:table-cell table:style-name="Table20.A2" office:value-type="string">
            <text:p text:style-name="P66">pg</text:p>
          </table:table-cell>
          <table:table-cell table:style-name="Table20.B2" office:value-type="string">
            <text:p text:style-name="P81"/>
          </table:table-cell>
          <table:table-cell table:style-name="Table20.B2" office:value-type="string">
            <text:p text:style-name="P67">Print all globals</text:p>
          </table:table-cell>
        </table:table-row>
        <table:table-row table:style-name="Table20.1">
          <table:table-cell table:style-name="Table20.A2" office:value-type="string">
            <text:p text:style-name="P66">pl</text:p>
          </table:table-cell>
          <table:table-cell table:style-name="Table20.B3" office:value-type="string">
            <text:p text:style-name="P67">[n]</text:p>
          </table:table-cell>
          <table:table-cell table:style-name="Table20.B3" office:value-type="string">
            <text:p text:style-name="P67">print locals for current/number of enclosing blocks</text:p>
          </table:table-cell>
        </table:table-row>
        <table:table-row table:style-name="Table20.1">
          <table:table-cell table:style-name="Table20.A2" office:value-type="string">
            <text:p text:style-name="P66">pp</text:p>
          </table:table-cell>
          <table:table-cell table:style-name="Table20.B2" office:value-type="string">
            <text:p text:style-name="P67">[n]</text:p>
          </table:table-cell>
          <table:table-cell table:style-name="Table20.B2" office:value-type="string">
            <text:p text:style-name="P67">print parameters for current/number of enclosing blocks</text:p>
          </table:table-cell>
        </table:table-row>
        <table:table-row table:style-name="Table20.1">
          <table:table-cell table:style-name="Table20.A2" office:value-type="string">
            <text:p text:style-name="P66">ds</text:p>
          </table:table-cell>
          <table:table-cell table:style-name="Table20.B3" office:value-type="string">
            <text:p text:style-name="P81"/>
          </table:table-cell>
          <table:table-cell table:style-name="Table20.B3" office:value-type="string">
            <text:p text:style-name="P67">Dump storage parameters</text:p>
          </table:table-cell>
        </table:table-row>
        <table:table-row table:style-name="Table20.1">
          <table:table-cell table:style-name="Table20.A2" office:value-type="string">
            <text:p text:style-name="P66">dd</text:p>
          </table:table-cell>
          <table:table-cell table:style-name="Table20.B2" office:value-type="string">
            <text:p text:style-name="P67">[n]</text:p>
          </table:table-cell>
          <table:table-cell table:style-name="Table20.B2" office:value-type="string">
            <text:p text:style-name="P67">Dump display frames</text:p>
          </table:table-cell>
        </table:table-row>
        <table:table-row table:style-name="Table20.1">
          <table:table-cell table:style-name="Table20.A2" office:value-type="string">
            <text:p text:style-name="P66">df</text:p>
          </table:table-cell>
          <table:table-cell table:style-name="Table20.B3" office:value-type="string">
            <text:p text:style-name="P67">[n]</text:p>
          </table:table-cell>
          <table:table-cell table:style-name="Table20.B3" office:value-type="string">
            <text:p text:style-name="P67">Dump frames formatted (call trace)</text:p>
          </table:table-cell>
        </table:table-row>
        <table:table-row table:style-name="Table20.1">
          <table:table-cell table:style-name="Table20.A2" office:value-type="string">
            <text:p text:style-name="P66">dst</text:p>
          </table:table-cell>
          <table:table-cell table:style-name="Table20.B2" office:value-type="string">
            <text:p text:style-name="P67">[n]</text:p>
          </table:table-cell>
          <table:table-cell table:style-name="Table20.B2" office:value-type="string">
            <text:p text:style-name="P67">Dump stack words</text:p>
          </table:table-cell>
        </table:table-row>
        <table:table-row table:style-name="Table20.1">
          <table:table-cell table:style-name="Table20.A2" office:value-type="string">
            <text:p text:style-name="P66">b</text:p>
          </table:table-cell>
          <table:table-cell table:style-name="Table20.B3" office:value-type="string">
            <text:p text:style-name="P67">[m] a</text:p>
          </table:table-cell>
          <table:table-cell table:style-name="Table20.B3" office:value-type="string">
            <text:p text:style-name="P67">Place breakpoint at source line number/routine</text:p>
          </table:table-cell>
        </table:table-row>
        <table:table-row table:style-name="Table20.1">
          <table:table-cell table:style-name="Table20.A2" office:value-type="string">
            <text:p text:style-name="P66">tp</text:p>
          </table:table-cell>
          <table:table-cell table:style-name="Table20.B2" office:value-type="string">
            <text:p text:style-name="P67">[m] a</text:p>
          </table:table-cell>
          <table:table-cell table:style-name="Table20.B2" office:value-type="string">
            <text:p text:style-name="P67">Place tracepoint at source line number/routine</text:p>
          </table:table-cell>
        </table:table-row>
        <table:table-row table:style-name="Table20.1">
          <table:table-cell table:style-name="Table20.A2" office:value-type="string">
            <text:p text:style-name="P66">bi</text:p>
          </table:table-cell>
          <table:table-cell table:style-name="Table20.B3" office:value-type="string">
            <text:p text:style-name="P67">a</text:p>
          </table:table-cell>
          <table:table-cell table:style-name="Table20.B3" office:value-type="string">
            <text:p text:style-name="P67">Place breakpoint at instruction</text:p>
          </table:table-cell>
        </table:table-row>
        <table:table-row table:style-name="Table20.1">
          <table:table-cell table:style-name="Table20.A2" office:value-type="string">
            <text:p text:style-name="P66">tpi</text:p>
          </table:table-cell>
          <table:table-cell table:style-name="Table20.B2" office:value-type="string">
            <text:p text:style-name="P67">a</text:p>
          </table:table-cell>
          <table:table-cell table:style-name="Table20.B2" office:value-type="string">
            <text:p text:style-name="P67">Place tracepoint at instruction</text:p>
          </table:table-cell>
        </table:table-row>
        <table:table-row table:style-name="Table20.1">
          <table:table-cell table:style-name="Table20.A2" office:value-type="string">
            <text:p text:style-name="P66">c</text:p>
          </table:table-cell>
          <table:table-cell table:style-name="Table20.B3" office:value-type="string">
            <text:p text:style-name="P67">[a]</text:p>
          </table:table-cell>
          <table:table-cell table:style-name="Table20.B3" office:value-type="string">
            <text:p text:style-name="P67">Clear breakpoint/all breakpoints</text:p>
          </table:table-cell>
        </table:table-row>
        <table:table-row table:style-name="Table20.1">
          <table:table-cell table:style-name="Table20.A2" office:value-type="string">
            <text:p text:style-name="P66">lb</text:p>
          </table:table-cell>
          <table:table-cell table:style-name="Table20.B2" office:value-type="string">
            <text:p text:style-name="P81"/>
          </table:table-cell>
          <table:table-cell table:style-name="Table20.B2" office:value-type="string">
            <text:p text:style-name="P67">List active breakpoints</text:p>
          </table:table-cell>
        </table:table-row>
        <table:table-row table:style-name="Table20.1">
          <table:table-cell table:style-name="Table20.A2" office:value-type="string">
            <text:p text:style-name="P66">w</text:p>
          </table:table-cell>
          <table:table-cell table:style-name="Table20.B3" office:value-type="string">
            <text:p text:style-name="P67">a</text:p>
          </table:table-cell>
          <table:table-cell table:style-name="Table20.B3" office:value-type="string">
            <text:p text:style-name="P67">Watch variable</text:p>
          </table:table-cell>
        </table:table-row>
        <table:table-row table:style-name="Table20.1">
          <table:table-cell table:style-name="Table20.A2" office:value-type="string">
            <text:p text:style-name="P66">lw</text:p>
          </table:table-cell>
          <table:table-cell table:style-name="Table20.B2" office:value-type="string">
            <text:p text:style-name="P81"/>
          </table:table-cell>
          <table:table-cell table:style-name="Table20.B2" office:value-type="string">
            <text:p text:style-name="P67">List watch table</text:p>
          </table:table-cell>
        </table:table-row>
        <table:table-row table:style-name="Table20.1">
          <table:table-cell table:style-name="Table20.A2" office:value-type="string">
            <text:p text:style-name="P66">cw</text:p>
          </table:table-cell>
          <table:table-cell table:style-name="Table20.B3" office:value-type="string">
            <text:p text:style-name="P67">[n]</text:p>
          </table:table-cell>
          <table:table-cell table:style-name="Table20.B3" office:value-type="string">
            <text:p text:style-name="P67">Clear watch table entry/all watch entries</text:p>
          </table:table-cell>
        </table:table-row>
        <table:table-row table:style-name="Table20.1">
          <table:table-cell table:style-name="Table20.A2" office:value-type="string">
            <text:p text:style-name="P66">lia</text:p>
          </table:table-cell>
          <table:table-cell table:style-name="Table20.B2" office:value-type="string">
            <text:p text:style-name="P81"/>
          </table:table-cell>
          <table:table-cell table:style-name="Table20.B2" office:value-type="string">
            <text:p text:style-name="P67">List instruction analyzer buffer</text:p>
          </table:table-cell>
        </table:table-row>
        <table:table-row table:style-name="Table20.1">
          <table:table-cell table:style-name="Table20.A2" office:value-type="string">
            <text:p text:style-name="P66">lsa</text:p>
          </table:table-cell>
          <table:table-cell table:style-name="Table20.B3" office:value-type="string">
            <text:p text:style-name="P81"/>
          </table:table-cell>
          <table:table-cell table:style-name="Table20.B3" office:value-type="string">
            <text:p text:style-name="P67">List source analyzer buffer</text:p>
          </table:table-cell>
        </table:table-row>
        <table:table-row table:style-name="Table20.1">
          <table:table-cell table:style-name="Table20.A2" office:value-type="string">
            <text:p text:style-name="P66">s</text:p>
          </table:table-cell>
          <table:table-cell table:style-name="Table20.B2" office:value-type="string">
            <text:p text:style-name="P67">[n]</text:p>
          </table:table-cell>
          <table:table-cell table:style-name="Table20.B2" office:value-type="string">
            <text:p text:style-name="P67">Step next source line execution</text:p>
          </table:table-cell>
        </table:table-row>
        <table:table-row table:style-name="Table20.1">
          <table:table-cell table:style-name="Table20.A2" office:value-type="string">
            <text:p text:style-name="P66">ss</text:p>
          </table:table-cell>
          <table:table-cell table:style-name="Table20.B3" office:value-type="string">
            <text:p text:style-name="P67">[n]</text:p>
          </table:table-cell>
          <table:table-cell table:style-name="Table20.B3" office:value-type="string">
            <text:p text:style-name="P67">Step next source line execution silently</text:p>
          </table:table-cell>
        </table:table-row>
        <table:table-row table:style-name="Table20.1">
          <table:table-cell table:style-name="Table20.A2" office:value-type="string">
            <text:p text:style-name="P66">si</text:p>
          </table:table-cell>
          <table:table-cell table:style-name="Table20.B2" office:value-type="string">
            <text:p text:style-name="P67">[n]</text:p>
          </table:table-cell>
          <table:table-cell table:style-name="Table20.B2" office:value-type="string">
            <text:p text:style-name="P67">Step instructions</text:p>
          </table:table-cell>
        </table:table-row>
        <table:table-row table:style-name="Table20.1">
          <table:table-cell table:style-name="Table20.A2" office:value-type="string">
            <text:p text:style-name="P66">sis</text:p>
          </table:table-cell>
          <table:table-cell table:style-name="Table20.B3" office:value-type="string">
            <text:p text:style-name="P67">[n]</text:p>
          </table:table-cell>
          <table:table-cell table:style-name="Table20.B3" office:value-type="string">
            <text:p text:style-name="P67">Step instructions silently</text:p>
          </table:table-cell>
        </table:table-row>
        <table:table-row table:style-name="Table20.1">
          <table:table-cell table:style-name="Table20.A2" office:value-type="string">
            <text:p text:style-name="P66">so</text:p>
          </table:table-cell>
          <table:table-cell table:style-name="Table20.B2" office:value-type="string">
            <text:p text:style-name="P67">[n]</text:p>
          </table:table-cell>
          <table:table-cell table:style-name="Table20.B2" office:value-type="string">
            <text:p text:style-name="P67">Step next source line execution with routine skipover</text:p>
          </table:table-cell>
        </table:table-row>
        <table:table-row table:style-name="Table20.1">
          <table:table-cell table:style-name="Table20.A2" office:value-type="string">
            <text:p text:style-name="P66">sso</text:p>
          </table:table-cell>
          <table:table-cell table:style-name="Table20.B3" office:value-type="string">
            <text:p text:style-name="P67">[n]</text:p>
          </table:table-cell>
          <table:table-cell table:style-name="Table20.B3" office:value-type="string">
            <text:p text:style-name="P67">Step next source line execution silently with routine skipover</text:p>
          </table:table-cell>
        </table:table-row>
        <table:table-row table:style-name="Table20.1">
          <table:table-cell table:style-name="Table20.A2" office:value-type="string">
            <text:p text:style-name="P66">sio</text:p>
          </table:table-cell>
          <table:table-cell table:style-name="Table20.B2" office:value-type="string">
            <text:p text:style-name="P67">[n]</text:p>
          </table:table-cell>
          <table:table-cell table:style-name="Table20.B2" office:value-type="string">
            <text:p text:style-name="P67">Step instructions with routine skipover</text:p>
          </table:table-cell>
        </table:table-row>
        <table:table-row table:style-name="Table20.1">
          <table:table-cell table:style-name="Table20.A2" office:value-type="string">
            <text:p text:style-name="P66">siso</text:p>
          </table:table-cell>
          <table:table-cell table:style-name="Table20.B3" office:value-type="string">
            <text:p text:style-name="P67">[n]</text:p>
          </table:table-cell>
          <table:table-cell table:style-name="Table20.B3" office:value-type="string">
            <text:p text:style-name="P67">Step instructions silently with routine skipover</text:p>
          </table:table-cell>
        </table:table-row>
        <table:table-row table:style-name="Table20.1">
          <table:table-cell table:style-name="Table20.A2" office:value-type="string">
            <text:p text:style-name="P66">ret</text:p>
          </table:table-cell>
          <table:table-cell table:style-name="Table20.B2" office:value-type="string">
            <text:p text:style-name="P81"/>
          </table:table-cell>
          <table:table-cell table:style-name="Table20.B2" office:value-type="string">
            <text:p text:style-name="P67">Return from subroutine</text:p>
          </table:table-cell>
        </table:table-row>
        <table:table-row table:style-name="Table20.1">
          <table:table-cell table:style-name="Table20.A2" office:value-type="string">
            <text:p text:style-name="P66">hs</text:p>
          </table:table-cell>
          <table:table-cell table:style-name="Table20.B3" office:value-type="string">
            <text:p text:style-name="P81"/>
          </table:table-cell>
          <table:table-cell table:style-name="Table20.B3" office:value-type="string">
            <text:p text:style-name="P67">Report heap space</text:p>
          </table:table-cell>
        </table:table-row>
        <table:table-row table:style-name="Table20.1">
          <table:table-cell table:style-name="Table20.A2" office:value-type="string">
            <text:p text:style-name="P66">ti</text:p>
          </table:table-cell>
          <table:table-cell table:style-name="Table20.B2" office:value-type="string">
            <text:p text:style-name="P81"/>
          </table:table-cell>
          <table:table-cell table:style-name="Table20.B2" office:value-type="string">
            <text:p text:style-name="P67">Turn instruction tracing on</text:p>
          </table:table-cell>
        </table:table-row>
        <table:table-row table:style-name="Table20.1">
          <table:table-cell table:style-name="Table20.A2" office:value-type="string">
            <text:p text:style-name="P66">nti</text:p>
          </table:table-cell>
          <table:table-cell table:style-name="Table20.B3" office:value-type="string">
            <text:p text:style-name="P81"/>
          </table:table-cell>
          <table:table-cell table:style-name="Table20.B3" office:value-type="string">
            <text:p text:style-name="P67">Turn instruction tracing off</text:p>
          </table:table-cell>
        </table:table-row>
        <table:table-row table:style-name="Table20.1">
          <table:table-cell table:style-name="Table20.A2" office:value-type="string">
            <text:p text:style-name="P66">tr</text:p>
          </table:table-cell>
          <table:table-cell table:style-name="Table20.B2" office:value-type="string">
            <text:p text:style-name="P81"/>
          </table:table-cell>
          <table:table-cell table:style-name="Table20.B2" office:value-type="string">
            <text:p text:style-name="P67">Turn system routine tracing on</text:p>
          </table:table-cell>
        </table:table-row>
        <table:table-row table:style-name="Table20.1">
          <table:table-cell table:style-name="Table20.A2" office:value-type="string">
            <text:p text:style-name="P66">ntr</text:p>
          </table:table-cell>
          <table:table-cell table:style-name="Table20.B3" office:value-type="string">
            <text:p text:style-name="P81"/>
          </table:table-cell>
          <table:table-cell table:style-name="Table20.B3" office:value-type="string">
            <text:p text:style-name="P67">Turn system routine tracing off</text:p>
          </table:table-cell>
        </table:table-row>
        <table:table-row table:style-name="Table20.1">
          <table:table-cell table:style-name="Table20.A2" office:value-type="string">
            <text:p text:style-name="P66">ts</text:p>
          </table:table-cell>
          <table:table-cell table:style-name="Table20.B2" office:value-type="string">
            <text:p text:style-name="P81"/>
          </table:table-cell>
          <table:table-cell table:style-name="Table20.B2" office:value-type="string">
            <text:p text:style-name="P67">Turn source line tracing on</text:p>
          </table:table-cell>
        </table:table-row>
        <text:soft-page-break/>
        <table:table-row table:style-name="Table20.1">
          <table:table-cell table:style-name="Table20.A2" office:value-type="string">
            <text:p text:style-name="P66">nts</text:p>
          </table:table-cell>
          <table:table-cell table:style-name="Table20.B3" office:value-type="string">
            <text:p text:style-name="P81"/>
          </table:table-cell>
          <table:table-cell table:style-name="Table20.B3" office:value-type="string">
            <text:p text:style-name="P67">Turn source line tracing off</text:p>
          </table:table-cell>
        </table:table-row>
        <table:table-row table:style-name="Table20.1">
          <table:table-cell table:style-name="Table20.A2" office:value-type="string">
            <text:p text:style-name="P66">spf</text:p>
          </table:table-cell>
          <table:table-cell table:style-name="Table20.B2" office:value-type="string">
            <text:p text:style-name="P81"/>
          </table:table-cell>
          <table:table-cell table:style-name="Table20.B2" office:value-type="string">
            <text:p text:style-name="P67">Turn on source level profiling</text:p>
          </table:table-cell>
        </table:table-row>
        <table:table-row table:style-name="Table20.1">
          <table:table-cell table:style-name="Table20.A2" office:value-type="string">
            <text:p text:style-name="P66">nspf</text:p>
          </table:table-cell>
          <table:table-cell table:style-name="Table20.B3" office:value-type="string">
            <text:p text:style-name="P81"/>
          </table:table-cell>
          <table:table-cell table:style-name="Table20.B3" office:value-type="string">
            <text:p text:style-name="P67">Turn off source level profiling</text:p>
          </table:table-cell>
        </table:table-row>
        <table:table-row table:style-name="Table20.1">
          <table:table-cell table:style-name="Table20.A2" office:value-type="string">
            <text:p text:style-name="P66">an</text:p>
          </table:table-cell>
          <table:table-cell table:style-name="Table20.B2" office:value-type="string">
            <text:p text:style-name="P81"/>
          </table:table-cell>
          <table:table-cell table:style-name="Table20.B2" office:value-type="string">
            <text:p text:style-name="P67">Turn on analyzer mode</text:p>
          </table:table-cell>
        </table:table-row>
        <table:table-row table:style-name="Table20.1">
          <table:table-cell table:style-name="Table20.A2" office:value-type="string">
            <text:p text:style-name="P66">nan</text:p>
          </table:table-cell>
          <table:table-cell table:style-name="Table20.B3" office:value-type="string">
            <text:p text:style-name="P81"/>
          </table:table-cell>
          <table:table-cell table:style-name="Table20.B3" office:value-type="string">
            <text:p text:style-name="P67">Turn off analyzer mode</text:p>
          </table:table-cell>
        </table:table-row>
        <table:table-row table:style-name="Table20.1">
          <table:table-cell table:style-name="Table20.A2" office:value-type="string">
            <text:p text:style-name="P66">r</text:p>
          </table:table-cell>
          <table:table-cell table:style-name="Table20.B2" office:value-type="string">
            <text:p text:style-name="P81"/>
          </table:table-cell>
          <table:table-cell table:style-name="Table20.B2" office:value-type="string">
            <text:p text:style-name="P67">Run program from current pc</text:p>
          </table:table-cell>
        </table:table-row>
        <table:table-row table:style-name="Table20.1">
          <table:table-cell table:style-name="Table20.A2" office:value-type="string">
            <text:p text:style-name="P66">ps</text:p>
          </table:table-cell>
          <table:table-cell table:style-name="Table20.B3" office:value-type="string">
            <text:p text:style-name="P81"/>
          </table:table-cell>
          <table:table-cell table:style-name="Table20.B3" office:value-type="string">
            <text:p text:style-name="P67">Print current registers and instruction</text:p>
          </table:table-cell>
        </table:table-row>
        <table:table-row table:style-name="Table20.1">
          <table:table-cell table:style-name="Table20.A2" office:value-type="string">
            <text:p text:style-name="P68">q</text:p>
          </table:table-cell>
          <table:table-cell table:style-name="Table20.B2" office:value-type="string">
            <text:p text:style-name="P81"/>
          </table:table-cell>
          <table:table-cell table:style-name="Table20.B2" office:value-type="string">
            <text:p text:style-name="P67">Quit interpreter</text:p>
          </table:table-cell>
        </table:table-row>
        <table:table-row table:style-name="Table20.1">
          <table:table-cell table:style-name="Table20.A2" office:value-type="string">
            <text:p text:style-name="P66">!</text:p>
          </table:table-cell>
          <table:table-cell table:style-name="Table20.B51" office:value-type="string">
            <text:p text:style-name="P81"/>
          </table:table-cell>
          <table:table-cell table:style-name="Table20.B51" office:value-type="string">
            <text:p text:style-name="P67">Comment (can appear anywhere in the line)</text:p>
          </table:table-cell>
        </table:table-row>
      </table:table>
      <text:h text:style-name="Heading_20_2" text:outline-level="2"><text:bookmark-start text:name="__RefHeading___Toc15590_2478585429"/><text:bookmark-start text:name="_Toc528309110"/>Sample program for debug<text:bookmark-end text:name="__RefHeading___Toc15590_2478585429"/><text:bookmark-end text:name="_Toc528309110"/></text:h>
      <text:p text:style-name="Standard">The following program will be used for reference in the text. The sample run is here:</text:p>
      <text:p text:style-name="Code"/>
      <text:p text:style-name="P35"/>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text:soft-page-break/>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212" text:outline-level="2"><text:bookmark-start text:name="__RefHeading___Toc15592_2478585429"/><text:bookmark-start text:name="_Toc528309111"/>Debug mode invocation<text:bookmark-end text:name="__RefHeading___Toc15592_2478585429"/><text:bookmark-end text:name="_Toc528309111"/></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63">{$w,f}</text:p>
      <text:p text:style-name="P63">program test(output);</text:p>
      <text:p text:style-name="P63"/>
      <text:p text:style-name="P63">...</text:p>
      <text:p text:style-name="P170"/>
      <text:p text:style-name="Standard">Or by specifying:</text:p>
      <text:p text:style-name="Code">$ p6 -–debug -–debugsrc test</text:p>
      <text:p text:style-name="Code"/>
      <text:p text:style-name="Standard">As the command line.</text:p>
      <text:p text:style-name="Standard">As run, it executes:</text:p>
      <text:p text:style-name="Code"/>
      <text:p text:style-name="P35">$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26">pc</text:span>, <text:span text:style-name="T26">sp</text:span>, <text:span text:style-name="T26">mp</text:span> and <text:span text:style-name="T26">np</text:span>.</text:p>
      <text:h text:style-name="Heading_20_2" text:outline-level="2"><text:bookmark-start text:name="__RefHeading___Toc15594_2478585429"/><text:bookmark-start text:name="_Toc528309112"/><text:bookmark-start text:name="_Ref528273764"/><text:soft-page-break/>Debug mode expressions<text:bookmark-end text:name="__RefHeading___Toc15594_2478585429"/><text:bookmark-end text:name="_Toc528309112"/><text:bookmark-end text:name="_Ref528273764"/></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24">Constant</text:p>
          </table:table-cell>
          <table:table-cell table:style-name="Table21.A1" office:value-type="string">
            <text:p text:style-name="P24">Meaning</text:p>
          </table:table-cell>
        </table:table-row>
        <table:table-row table:style-name="Table21.1">
          <table:table-cell table:style-name="Table21.A2" office:value-type="string">
            <text:p text:style-name="P24">123</text:p>
          </table:table-cell>
          <table:table-cell table:style-name="Table21.B2" office:value-type="string">
            <text:p text:style-name="P69">Number</text:p>
          </table:table-cell>
        </table:table-row>
        <table:table-row table:style-name="Table21.1">
          <table:table-cell table:style-name="Table21.A2" office:value-type="string">
            <text:p text:style-name="P24">$ac0</text:p>
          </table:table-cell>
          <table:table-cell table:style-name="Table21.B3" office:value-type="string">
            <text:p text:style-name="P69">hex number</text:p>
          </table:table-cell>
        </table:table-row>
        <table:table-row table:style-name="Table21.1">
          <table:table-cell table:style-name="Table21.A2" office:value-type="string">
            <text:p text:style-name="P24">&amp;654</text:p>
          </table:table-cell>
          <table:table-cell table:style-name="Table21.B2" office:value-type="string">
            <text:p text:style-name="P69">octal number</text:p>
          </table:table-cell>
        </table:table-row>
        <table:table-row table:style-name="Table21.1">
          <table:table-cell table:style-name="Table21.A2" office:value-type="string">
            <text:p text:style-name="P24">%10101</text:p>
          </table:table-cell>
          <table:table-cell table:style-name="Table21.B5" office:value-type="string">
            <text:p text:style-name="P69">binary number</text:p>
          </table:table-cell>
        </table:table-row>
        <table:table-row table:style-name="Table21.1">
          <table:table-cell table:style-name="Table21.A2" office:value-type="string">
            <text:p text:style-name="P24">‘hello’’s’</text:p>
          </table:table-cell>
          <table:table-cell table:style-name="Table21.B2" office:value-type="string">
            <text:p text:style-name="P69">string</text:p>
          </table:table-cell>
        </table:table-row>
        <table:table-row table:style-name="Table21.7">
          <table:table-cell table:style-name="Table21.A2" office:value-type="string">
            <text:list text:style-name="WWNum16">
              <text:list-item>
                <text:list>
                  <text:list-item>
                    <text:p text:style-name="P219"/>
                  </text:list-item>
                </text:list>
              </text:list-item>
            </text:list>
          </table:table-cell>
          <table:table-cell table:style-name="Table21.B7" office:value-type="string">
            <text:p text:style-name="P69">Real</text:p>
          </table:table-cell>
        </table:table-row>
      </table:table>
      <text:p text:style-name="Standard"/>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text:soft-page-break/></text:p>
      <table:table table:name="Table22" table:style-name="Table22">
        <table:table-column table:style-name="Table22.A" table:number-columns-repeated="2"/>
        <table:table-row table:style-name="Table22.1">
          <table:table-cell table:style-name="Table22.A1" office:value-type="string">
            <text:p text:style-name="P19">Code reference</text:p>
          </table:table-cell>
          <table:table-cell table:style-name="Table22.A1" office:value-type="string">
            <text:p text:style-name="P19">Meaning</text:p>
          </table:table-cell>
        </table:table-row>
        <table:table-row table:style-name="Table22.1">
          <table:table-cell table:style-name="Table22.A2" office:value-type="string">
            <text:p text:style-name="P24">a[i]</text:p>
          </table:table-cell>
          <table:table-cell table:style-name="Table22.B2" office:value-type="string">
            <text:p text:style-name="P24">Reference to element I of array a.</text:p>
          </table:table-cell>
        </table:table-row>
        <table:table-row table:style-name="Table22.1">
          <table:table-cell table:style-name="Table22.A2" office:value-type="string">
            <text:p text:style-name="P24">r.f</text:p>
          </table:table-cell>
          <table:table-cell table:style-name="Table22.B3" office:value-type="string">
            <text:p text:style-name="P69">Reference to field f of record r.</text:p>
          </table:table-cell>
        </table:table-row>
        <table:table-row table:style-name="Table22.1">
          <table:table-cell table:style-name="Table22.A2" office:value-type="string">
            <text:p text:style-name="P24">p^</text:p>
          </table:table-cell>
          <table:table-cell table:style-name="Table22.B2" office:value-type="string">
            <text:p text:style-name="P69">Reference to the object p points to.</text:p>
          </table:table-cell>
        </table:table-row>
        <table:table-row table:style-name="Table22.5">
          <table:table-cell table:style-name="Table22.A2" office:value-type="string">
            <text:p text:style-name="P24">*v</text:p>
          </table:table-cell>
          <table:table-cell table:style-name="Table22.B5" office:value-type="string">
            <text:p text:style-name="P69">Address of variable v.</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24">Variable</text:p>
          </table:table-cell>
          <table:table-cell table:style-name="Table23.A1" office:value-type="string">
            <text:p text:style-name="P24">Function</text:p>
          </table:table-cell>
        </table:table-row>
        <table:table-row table:style-name="Table23.1">
          <table:table-cell table:style-name="Table23.A2" office:value-type="string">
            <text:p text:style-name="P24">@pc</text:p>
          </table:table-cell>
          <table:table-cell table:style-name="Table23.B2" office:value-type="string">
            <text:p text:style-name="P69">Current program counter.</text:p>
          </table:table-cell>
        </table:table-row>
        <table:table-row table:style-name="Table23.1">
          <table:table-cell table:style-name="Table23.A2" office:value-type="string">
            <text:p text:style-name="P24">@sp</text:p>
          </table:table-cell>
          <table:table-cell table:style-name="Table23.B3" office:value-type="string">
            <text:p text:style-name="P69">Stack pointer.</text:p>
          </table:table-cell>
        </table:table-row>
        <table:table-row table:style-name="Table23.1">
          <table:table-cell table:style-name="Table23.A2" office:value-type="string">
            <text:p text:style-name="P24">@mp</text:p>
          </table:table-cell>
          <table:table-cell table:style-name="Table23.B2" office:value-type="string">
            <text:p text:style-name="P69">Mark or “frame” pointer.</text:p>
          </table:table-cell>
        </table:table-row>
        <table:table-row table:style-name="Table23.1">
          <table:table-cell table:style-name="Table23.A2" office:value-type="string">
            <text:p text:style-name="P24">@np</text:p>
          </table:table-cell>
          <table:table-cell table:style-name="Table23.B5" office:value-type="string">
            <text:p text:style-name="P69">Top/end of heap.</text:p>
          </table:table-cell>
        </table:table-row>
        <table:table-row table:style-name="Table23.1">
          <table:table-cell table:style-name="Table23.A2" office:value-type="string">
            <text:p text:style-name="P24">@constants</text:p>
          </table:table-cell>
          <table:table-cell table:style-name="Table23.B2" office:value-type="string">
            <text:p text:style-name="P69">Start of constants area.</text:p>
          </table:table-cell>
        </table:table-row>
        <table:table-row table:style-name="Table23.1">
          <table:table-cell table:style-name="Table23.A2" office:value-type="string">
            <text:p text:style-name="P24">@globals</text:p>
          </table:table-cell>
          <table:table-cell table:style-name="Table23.B7" office:value-type="string">
            <text:p text:style-name="P69">Start of globals area.</text:p>
          </table:table-cell>
        </table:table-row>
        <table:table-row table:style-name="Table23.1">
          <table:table-cell table:style-name="Table23.A2" office:value-type="string">
            <text:p text:style-name="P24">@heapbotto</text:p>
          </table:table-cell>
          <table:table-cell table:style-name="Table23.B8" office:value-type="string">
            <text:p text:style-name="P69">Start of heap area.</text:p>
          </table:table-cell>
        </table:table-row>
      </table:table>
      <text:p text:style-name="Standard"/>
      <text:p text:style-name="Standard">Note that setting these special variables can cause the P-Machine to malfunction.</text:p>
      <text:h text:style-name="Heading_20_2" text:outline-level="2"><text:bookmark-start text:name="__RefHeading___Toc15596_2478585429"/><text:bookmark-start text:name="_Toc528309113"/>Executing multiple commands<text:bookmark-end text:name="__RefHeading___Toc15596_2478585429"/><text:bookmark-end text:name="_Toc528309113"/></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text:soft-page-break/>Note that Control-C also qualifies as a fault, so specifying the option <text:span text:style-name="T88">$</text:span>a/<text:span text:style-name="T88">$</text:span>debugflt will cause debug mode to be entered after the program is broken. If no debug mode is active, the program run will simply halt and pint will exit.</text:p>
      <text:h text:style-name="Heading_20_2" text:outline-level="2"><text:bookmark-start text:name="__RefHeading___Toc15596_2478585429_Copy1"/>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212" text:outline-level="2"><text:bookmark-start text:name="__RefHeading___Toc15598_2478585429"/><text:bookmark-start text:name="_Toc528309114"/>Debug mode Command descriptions<text:bookmark-end text:name="__RefHeading___Toc15598_2478585429"/><text:bookmark-end text:name="_Toc528309114"/></text:h>
      <text:h text:style-name="Routine_20_heading_20_3" text:outline-level="3"><text:bookmark-start text:name="__RefHeading___Toc15600_2478585429"/><text:bookmark-start text:name="_Toc528309115"/>h or help<text:tab/>Print help menu<text:bookmark-end text:name="__RefHeading___Toc15600_2478585429"/><text:bookmark-end text:name="_Toc528309115"/></text:h>
      <text:p text:style-name="Standard">The help or h command simply prints the command menu:</text:p>
      <text:p text:style-name="P107">debug&gt; help</text:p>
      <text:p text:style-name="P107"/>
      <text:p text:style-name="P107">Commands:</text:p>
      <text:p text:style-name="P107"/>
      <text:p text:style-name="P107">h|help <text:s text:c="28"/>Help (this command)</text:p>
      <text:p text:style-name="P107">l <text:s text:c="18"/>[m] [s[ e|:l] <text:s/>List source lines</text:p>
      <text:p text:style-name="P107">lc <text:s text:c="17"/>[m] [s[ e|:l] <text:s/>List source and machine lines coordinated</text:p>
      <text:p text:style-name="P107">li <text:s text:c="17"/>[s[ e|:l] <text:s text:c="5"/>List machine instructions</text:p>
      <text:p text:style-name="P107">p <text:s text:c="18"/>v <text:s text:c="13"/>Print expression</text:p>
      <text:p text:style-name="P107">d[b|l][8|16|32|64] <text:s/>[s[ e|:l] <text:s text:c="5"/>Dump memory</text:p>
      <text:p text:style-name="P107">e <text:s text:c="18"/>a v[ v]... <text:s text:c="4"/>Enter byte values to memory address</text:p>
      <text:p text:style-name="P107">st <text:s text:c="17"/>d v <text:s text:c="11"/>Set program variable</text:p>
      <text:p text:style-name="P107">pg <text:s text:c="32"/>Print all globals</text:p>
      <text:p text:style-name="P109">pl <text:s text:c="17"/>[n] <text:s text:c="11"/>print locals for current/number of enclosing blocks</text:p>
      <text:p text:style-name="P107">pp <text:s text:c="17"/>[n] <text:s text:c="11"/>print parameters for current/number of</text:p>
      <text:p text:style-name="P107"><text:s text:c="35"/>enclosing blocks</text:p>
      <text:p text:style-name="P107">ds <text:s text:c="32"/>Dump storage parameters</text:p>
      <text:p text:style-name="P107">dd <text:s text:c="17"/>[n] <text:s text:c="11"/>Dump display frames</text:p>
      <text:p text:style-name="P107">df <text:s text:c="17"/>[n] <text:s text:c="11"/>Dump frames formatted (call trace)</text:p>
      <text:p text:style-name="P107">dst <text:s text:c="16"/>[n] <text:s text:c="11"/>Dump stack words</text:p>
      <text:p text:style-name="P107">b <text:s text:c="18"/>[m] a <text:s text:c="9"/>Place breakpoint at source line</text:p>
      <text:p text:style-name="P107"><text:s text:c="35"/>number/routine</text:p>
      <text:p text:style-name="P107">tp <text:s text:c="17"/>[m] a <text:s text:c="9"/>Place tracepoint at source line</text:p>
      <text:p text:style-name="P107"><text:s text:c="35"/>number/routine</text:p>
      <text:p text:style-name="P107">bi <text:s text:c="17"/>a <text:s text:c="13"/>Place breakpoint at instruction</text:p>
      <text:p text:style-name="P107">tpi <text:s text:c="16"/>a <text:s text:c="13"/>Place tracepoint at instruction</text:p>
      <text:p text:style-name="P107">c <text:s text:c="18"/>[a] <text:s text:c="11"/>Clear breakpoint/all breakpoints</text:p>
      <text:p text:style-name="P107">lb <text:s text:c="32"/>List active breakpoints</text:p>
      <text:p text:style-name="P107">w <text:s text:c="18"/>a <text:s text:c="13"/>Watch variable</text:p>
      <text:p text:style-name="P107">lw <text:s text:c="32"/>List watch table</text:p>
      <text:p text:style-name="P107">cw <text:s text:c="17"/>[n] <text:s text:c="11"/>Clear watch table entry/all watch entries</text:p>
      <text:p text:style-name="P107">lia <text:s text:c="31"/>List instruction analyzer buffer</text:p>
      <text:p text:style-name="P107">lsa <text:s text:c="31"/>List source analyzer buffer</text:p>
      <text:p text:style-name="P107">s <text:s text:c="18"/>[n] <text:s text:c="11"/>Step next source line execution</text:p>
      <text:p text:style-name="P107">ss <text:s text:c="17"/>[n] <text:s text:c="11"/>Step next source line execution silently</text:p>
      <text:p text:style-name="P107">si <text:s text:c="17"/>[n] <text:s text:c="11"/>Step instructions</text:p>
      <text:p text:style-name="P107">sis <text:s text:c="16"/>[n] <text:s text:c="11"/>Step instructions silently</text:p>
      <text:p text:style-name="P107">so <text:s text:c="17"/>[n] <text:s text:c="11"/>Step over next source line execution</text:p>
      <text:p text:style-name="P107">sso <text:s text:c="16"/>[n] <text:s text:c="11"/>Step over next source line execution silently</text:p>
      <text:p text:style-name="P107">sio <text:s text:c="16"/>[n] <text:s text:c="11"/>Step over instructions</text:p>
      <text:p text:style-name="P107">siso <text:s text:c="15"/>[n] <text:s text:c="11"/>Step over instructions silently</text:p>
      <text:p text:style-name="P107">ret <text:s text:c="31"/>Return from subroutine</text:p>
      <text:p text:style-name="P107">hs <text:s text:c="32"/>Report heap space</text:p>
      <text:p text:style-name="P107">ti <text:s text:c="32"/>Turn instruction tracing on</text:p>
      <text:p text:style-name="P107">nti <text:s text:c="31"/>Turn instruction tracing off</text:p>
      <text:p text:style-name="P107">tr <text:s text:c="32"/>Turn system routine tracing on</text:p>
      <text:p text:style-name="P107">ntr <text:s text:c="31"/>Turn system routine tracing off</text:p>
      <text:p text:style-name="P107">ts <text:s text:c="32"/>Turn source line tracing on</text:p>
      <text:p text:style-name="P107">nts <text:s text:c="31"/>Turn source line tracing off</text:p>
      <text:p text:style-name="P107"><text:soft-page-break/>spf <text:s text:c="31"/>Turn on source level profiling</text:p>
      <text:p text:style-name="P107">nspf <text:s text:c="30"/>Turn off source level profiling</text:p>
      <text:p text:style-name="P107">an <text:s text:c="32"/>Turn on analyzer mode</text:p>
      <text:p text:style-name="P107">nan <text:s text:c="31"/>Turn off analyzer mode</text:p>
      <text:p text:style-name="P107">r <text:s text:c="33"/>Run program from current pc</text:p>
      <text:p text:style-name="P107">ps <text:s text:c="32"/>Print current registers and instruction</text:p>
      <text:p text:style-name="P107">q <text:s text:c="33"/>Quit interpreter</text:p>
      <text:p text:style-name="P107"/>
      <text:p text:style-name="P107">! <text:s text:c="33"/>Anywhere in line starts a comment</text:p>
      <text:p text:style-name="P108"/>
      <text:h text:style-name="Routine_20_heading_20_3" text:outline-level="3"><text:bookmark-start text:name="__RefHeading___Toc15602_2478585429"/><text:bookmark-start text:name="_Toc528309116"/>l [m] [s[ e|:l]<text:tab/>List source lines<text:bookmark-end text:name="__RefHeading___Toc15602_2478585429"/><text:bookmark-end text:name="_Toc528309116"/></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5" text:note-class="footnote"><text:note-citation>5</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35">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_RefHeading___Toc15606_2478585429"/><text:bookmark-start text:name="_Toc528309118"/>lc <text:s/>[s[ e|:l] <text:s text:c="5"/>List source and machine lines coordinated<text:bookmark-end text:name="__RefHeading___Toc15606_2478585429"/><text:bookmark-end text:name="_Toc528309118"/></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_RefHeading___Toc15604_2478585429"/><text:bookmark-start text:name="_Toc528309117"/>li <text:s/>[s[ e|:l] <text:s text:c="5"/>List machine instructions<text:bookmark-end text:name="__RefHeading___Toc15604_2478585429"/><text:bookmark-end text:name="_Toc528309117"/></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text:style-name="WWNum17">
        <text:list-item>
          <text:p text:style-name="P220">b,t,*<text:tab/>Gives the break, trace, and current execution status of the line.</text:p>
        </text:list-item>
        <text:list-item>
          <text:p text:style-name="P220">Addr<text:tab/>Address of the instruction.</text:p>
        </text:list-item>
        <text:list-item>
          <text:p text:style-name="P220">Op<text:tab/>Opcode (byte code) of the instruction.</text:p>
        </text:list-item>
        <text:list-item>
          <text:p text:style-name="P220">Ins<text:tab/>Memnonic of the instruction.</text:p>
        </text:list-item>
        <text:list-item>
          <text:p text:style-name="P220">P<text:tab/>P or routine nesting index.</text:p>
        </text:list-item>
        <text:list-item>
          <text:p text:style-name="P220">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_RefHeading___Toc15608_2478585429"/><text:bookmark-start text:name="_Toc528309119"/>p <text:s text:c="2"/>v <text:s text:c="13"/>Print expression<text:bookmark-end text:name="__RefHeading___Toc15608_2478585429"/><text:bookmark-end text:name="_Toc52830911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_RefHeading___Toc15610_2478585429"/><text:bookmark-start text:name="_Toc528309120"/>d[b|l][8|16|32|64] <text:s text:c="2"/>[s[ e|:l] <text:s text:c="5"/>Dump memory<text:bookmark-end text:name="__RefHeading___Toc15610_2478585429"/><text:bookmark-end text:name="_Toc528309120"/></text:h>
      <text:p text:style-name="Standard">Dumps byte machine memory.</text:p>
      <text:p text:style-name="P107">debug&gt; d 0:50</text:p>
      <text:p text:style-name="P107"/>
      <text:p text:style-name="P107">000000: 14 E0 04 00 00 00 00 00 00 15 4E 00 00 00 00 00 <text:s text:c="2"/>..........N.....</text:p>
      <text:p text:style-name="P107">000010: 00 00 3A F2 F2 F2 F2 F2 F2 F2 F2 F2 F2 F2 F2 F2 <text:s text:c="2"/>..:.............</text:p>
      <text:p text:style-name="P107">000020: F2 F2 F2 F2 F2 F2 F2 F2 F2 F2 F2 F2 F2 F2 F2 F2 <text:s text:c="2"/>................</text:p>
      <text:p text:style-name="Code"><text:span text:style-name="T28">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P107">debug&gt; d16 0 20</text:p>
      <text:p text:style-name="P107"/>
      <text:p text:style-name="P107">000000: E014 0004 0000 0000 1500 004E 0000 0000 <text:s text:c="2"/>.. .. .. .. .. .N .. .. </text:p>
      <text:p text:style-name="P107">000010: 0000 F23A F2F2 </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P107">debug&gt; db16 0 20</text:p>
      <text:p text:style-name="P107"/>
      <text:p text:style-name="P107">000000: 14E0 0400 0000 0000 0015 4E00 0000 0000 <text:s text:c="2"/>.. .. .. .. .. .. .. .. </text:p>
      <text:p text:style-name="P107">000010: 0000 3AF2 F2F2</text:p>
      <text:p text:style-name="P107"/>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P107">debug&gt; d64 0 20</text:p>
      <text:p text:style-name="P107"/>
      <text:p text:style-name="P107">000000: 000000000004E014 00000000004E1500 <text:s text:c="2"/>........ .....N.. </text:p>
      <text:p text:style-name="P107">000010: F2F2F2F2F23A0000 </text:p>
      <text:p text:style-name="P107"/>
      <text:p text:style-name="Standard">This is a 64 bit little endian dump.</text:p>
      <text:h text:style-name="Routine_20_heading_20_3" text:outline-level="3"><text:bookmark-start text:name="__RefHeading___Toc15612_2478585429"/><text:bookmark-start text:name="_Toc528309121"/>e <text:s text:c="2"/>a v[ v]... <text:s text:c="4"/>Enter byte values to memory address<text:bookmark-end text:name="__RefHeading___Toc15612_2478585429"/><text:bookmark-end text:name="_Toc528309121"/></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_RefHeading___Toc15614_2478585429"/><text:bookmark-start text:name="_Toc528309122"/>st <text:s/>d v <text:s text:c="11"/>Set program variable<text:bookmark-end text:name="__RefHeading___Toc15614_2478585429"/><text:bookmark-end text:name="_Toc528309122"/></text:h>
      <text:p text:style-name="Standard">Sets a variable in the current context. The first parameter is the variable to set. The second is the value to set the variable to. The variable to set can be any variable <text:s/>reference:</text:p>
      <text:p text:style-name="P107">=== break ===</text:p>
      <text:p text:style-name="P107"/>
      <text:p text:style-name="P107"><text:s text:c="2"/>22: <text:s text:c="4"/>10: <text:s text:c="11"/>a[i] := y(i);</text:p>
      <text:p text:style-name="P107"><text:s text:c="2"/>23: <text:s text:c="5"/>1: b* <text:s text:c="4"/>for i := 10 downto 1 do writeln('Value: ', a[i]);</text:p>
      <text:p text:style-name="P107"><text:s text:c="2"/>24: <text:s text:c="5"/>0:</text:p>
      <text:p text:style-name="P107"/>
      <text:p text:style-name="P107">debug&gt; p a</text:p>
      <text:p text:style-name="P107">array 11, 12, 13, 14, 15, 16, 17, 18, 19, 20 end</text:p>
      <text:p text:style-name="P107">debug&gt; st a[3] 42</text:p>
      <text:p text:style-name="P107">debug&gt; p a</text:p>
      <text:p text:style-name="P107">array 11, 12, 42, 14, 15, 16, 17, 18, 19, 20 end</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11.4</text:bookmark-ref> <text:bookmark-ref text:reference-format="text" text:ref-name="__RefHeading___Toc15594_2478585429">Debug mode expressions</text:bookmark-ref>”</text:p>
      <text:h text:style-name="Routine_20_heading_20_3" text:outline-level="3"><text:bookmark-start text:name="__RefHeading___Toc15616_2478585429"/><text:bookmark-start text:name="_Toc528309123"/>pg <text:s text:c="16"/>Print all globals<text:bookmark-end text:name="__RefHeading___Toc15616_2478585429"/><text:bookmark-end text:name="_Toc528309123"/></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_RefHeading___Toc15618_2478585429"/><text:bookmark-start text:name="_Toc528309124"/>pl <text:s/>[n] <text:s text:c="11"/>print locals for current/number of enclosing blocks<text:bookmark-end text:name="__RefHeading___Toc15618_2478585429"/><text:bookmark-end text:name="_Toc528309124"/></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_RefHeading___Toc15620_2478585429"/><text:bookmark-start text:name="_Toc528309125"/>pp <text:s/>[n] <text:s text:c="11"/>print parameters for current/number of enclosing blocks<text:bookmark-end text:name="__RefHeading___Toc15620_2478585429"/><text:bookmark-end text:name="_Toc528309125"/></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_RefHeading___Toc15622_2478585429"/><text:bookmark-start text:name="_Toc528309126"/>ds <text:s text:c="16"/>Dump storage parameters<text:bookmark-end text:name="__RefHeading___Toc15622_2478585429"/><text:bookmark-end text:name="_Toc528309126"/></text:h>
      <text:p text:style-name="Standard">ds prints the storage areas of the byte machine:</text:p>
      <text:p text:style-name="Standard"/>
      <text:p text:style-name="P50">debug&gt; ds</text:p>
      <text:p text:style-name="Standard">Storage areas occupied</text:p>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_RefHeading___Toc15624_2478585429"/><text:bookmark-start text:name="_Toc528309127"/>dd <text:s/>[n] <text:s text:c="11"/>Dump display frames<text:bookmark-end text:name="__RefHeading___Toc15624_2478585429"/><text:bookmark-end text:name="_Toc528309127"/></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he number, if present, will specify how many stack frames to dump. The default is to dump all active stack frames.</text:p>
      <text:h text:style-name="Routine_20_heading_20_3" text:outline-level="3"><text:bookmark-start text:name="__RefHeading___Toc15626_2478585429"/><text:bookmark-start text:name="_Toc528309128"/><text:soft-page-break/>df <text:s/>[n] <text:s text:c="11"/>Dump frames formatted (call trace)<text:bookmark-end text:name="__RefHeading___Toc15626_2478585429"/><text:bookmark-end text:name="_Toc528309128"/></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P107">debug&gt; b q</text:p>
      <text:p text:style-name="P107">debug&gt; r</text:p>
      <text:p text:style-name="P107"/>
      <text:p text:style-name="P107">=== break ===</text:p>
      <text:p text:style-name="P107"/>
      <text:p text:style-name="P107"><text:s text:c="2"/>15: <text:s text:c="5"/>1: <text:s text:c="3"/></text:p>
      <text:p text:style-name="P107"><text:s text:c="2"/>16: <text:s text:c="5"/>1: b* <text:s text:c="4"/>z := 42;</text:p>
      <text:p text:style-name="P107"><text:s text:c="2"/>17: <text:s text:c="5"/>0: <text:s text:c="3"/></text:p>
      <text:p text:style-name="P107"/>
      <text:p text:style-name="P107">debug&gt; df</text:p>
      <text:p text:style-name="P107"/>
      <text:p text:style-name="P107">q@f_i: addr: 0000010C locals/stack: 00FFFEF8-00FFFF10 (24)</text:p>
      <text:p text:style-name="P107"><text:s text:c="2"/>15: <text:s text:c="5"/>1: <text:s text:c="3"/></text:p>
      <text:p text:style-name="P107"><text:s text:c="2"/>16: <text:s text:c="5"/>1: b* <text:s text:c="4"/>z := 42;</text:p>
      <text:p text:style-name="P107"><text:s text:c="2"/>17: <text:s text:c="5"/>0: <text:s text:c="3"/></text:p>
      <text:p text:style-name="P107"/>
      <text:p text:style-name="P107"/>
      <text:p text:style-name="P107">y@f_i: addr: 000001EB locals/stack: 00FFFF58-00FFFF60 (8)</text:p>
      <text:p text:style-name="P107"><text:s text:c="2"/>25: <text:s text:c="5"/>1: <text:s text:c="4"/></text:p>
      <text:p text:style-name="P107"><text:s text:c="2"/>26: <text:s text:c="5"/>1: <text:s text:c="7"/>result q(add) </text:p>
      <text:p text:style-name="P107"><text:s text:c="2"/>27: <text:s text:c="5"/>0: <text:s text:c="4"/></text:p>
      <text:p text:style-name="P107"/>
      <text:p text:style-name="P107"/>
      <text:p text:style-name="P107">test: addr: 00000308 locals/stack: 00FFFF98-00FFFFB8 (32)</text:p>
      <text:p text:style-name="P107"><text:s text:c="2"/>32: <text:s text:c="5"/>2: <text:s text:c="7"/>for i := 1 to 10 do </text:p>
      <text:p text:style-name="P107"><text:s text:c="2"/>33: <text:s text:c="5"/>1: <text:s text:c="11"/>a[i] := y(i); </text:p>
      <text:p text:style-name="P107"><text:s text:c="2"/>34: <text:s text:c="5"/>0: <text:s text:c="7"/>for i := 10 downto 1 do writeln('Value: ', a[i]);</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text:span text:style-name="T88">D</text:span><text:bookmark-end text:name="_Toc528309129_Copy_2"/><text:span text:style-name="T88">ump stack words</text:span><text:bookmark-end text:name="__RefHeading___Toc15628_2478585429_Copy_"/></text:h>
      <text:p text:style-name="Standard"><text:bookmark-start text:name="__RefHeading___Toc15628_2478585429_Copy1"/>Dump stack words.<text:bookmark-end text:name="__RefHeading___Toc15628_2478585429_Copy1"/></text:p>
      <text:p text:style-name="P107">debug&gt; lc 34:1</text:p>
      <text:p text:style-name="P107"/>
      <text:p text:style-name="P107"><text:s text:c="2"/>34: <text:s text:c="5"/>0: <text:s text:c="7"/>for i := 10 downto 1 do writeln('Value: ', a[i]); </text:p>
      <text:p text:style-name="P107"><text:s text:c="4"/>000366: AE mrkl* <text:s text:c="9"/>0000000000000022</text:p>
      <text:p text:style-name="P107"><text:s text:c="4"/>00036F: 7B ldci <text:s text:c="10"/>000000000000000A</text:p>
      <text:p text:style-name="P107"><text:s text:c="4"/>000378: 02 stri <text:s text:c="7"/>01,FFFFFFFFFFFFFFF0</text:p>
      <text:p text:style-name="P107"><text:s text:c="4"/>000382: 7B ldci <text:s text:c="10"/>0000000000000001</text:p>
      <text:p text:style-name="P107"><text:s text:c="4"/>00038B: 02 stri <text:s text:c="7"/>01,FFFFFFFFFFFFFFE8</text:p>
      <text:p text:style-name="P107"><text:s text:c="4"/>000395: 00 lodi <text:s text:c="7"/>01,FFFFFFFFFFFFFFF0</text:p>
      <text:p text:style-name="P107"><text:s text:c="4"/>00039F: 03 sroi <text:s text:c="10"/>00000000000005A4</text:p>
      <text:p text:style-name="P107"><text:s text:c="4"/>0003A8: AE mrkl* <text:s text:c="9"/>0000000000000022</text:p>
      <text:p text:style-name="P107"><text:s text:c="4"/>0003B1: 01 ldoi <text:s text:c="10"/>00000000000005A4</text:p>
      <text:p text:style-name="P107"><text:s text:c="4"/>0003BA: 00 lodi <text:s text:c="7"/>01,FFFFFFFFFFFFFFE8</text:p>
      <text:p text:style-name="P107"><text:s text:c="4"/>0003C4: 95 geqi <text:s text:c="7"/></text:p>
      <text:p text:style-name="P107"><text:s text:c="4"/>0003C5: 18 fjp <text:s text:c="11"/>0000000000000493</text:p>
      <text:p text:style-name="P107"><text:s text:c="4"/>0003CE: 38 lca <text:s text:c="11"/>00000000000004D4</text:p>
      <text:p text:style-name="P107"><text:soft-page-break/><text:s text:c="4"/>0003D7: 05 lao <text:s text:c="11"/>00000000000004FE</text:p>
      <text:p text:style-name="P107"><text:s text:c="4"/>0003E0: 76 swp <text:s text:c="11"/>0000000000000008</text:p>
      <text:p text:style-name="P107"><text:s text:c="4"/>0003E9: 7B ldci <text:s text:c="10"/>0000000000000007</text:p>
      <text:p text:style-name="P107"><text:s text:c="4"/>0003F2: 76 swp <text:s text:c="11"/>0000000000000008</text:p>
      <text:p text:style-name="P107"><text:s text:c="4"/>0003FB: 7B ldci <text:s text:c="10"/>0000000000000007</text:p>
      <text:p text:style-name="P107"><text:s text:c="4"/>000404: 0F csp <text:s text:c="11"/>0000000000000006</text:p>
      <text:p text:style-name="P107"><text:s text:c="4"/>000406: 05 lao <text:s text:c="11"/>0000000000000554</text:p>
      <text:p text:style-name="P107"><text:s text:c="4"/>00040F: 01 ldoi <text:s text:c="10"/>00000000000005A4</text:p>
      <text:p text:style-name="P107"><text:s text:c="4"/>000418: 1A chki <text:s text:c="10"/>00000000000004C4</text:p>
      <text:p text:style-name="P107"><text:s text:c="4"/>000421: 39 deci <text:s text:c="10"/>0000000000000001</text:p>
      <text:p text:style-name="P107"><text:s text:c="4"/>00042A: 10 ixa <text:s text:c="11"/>0000000000000008</text:p>
      <text:p text:style-name="P107"><text:s text:c="4"/>000433: 09 indi <text:s text:c="10"/>0000000000000000</text:p>
      <text:p text:style-name="P107"><text:s text:c="4"/>00043C: 7B ldci <text:s text:c="10"/>000000000000000B</text:p>
      <text:p text:style-name="P107"><text:s text:c="4"/>000445: 0F csp <text:s text:c="11"/>0000000000000008</text:p>
      <text:p text:style-name="P107"><text:s text:c="4"/>000447: 0F csp <text:s text:c="11"/>0000000000000005</text:p>
      <text:p text:style-name="P107"><text:s text:c="4"/>000449: 75 dmp <text:s text:c="11"/>0000000000000008</text:p>
      <text:p text:style-name="P107"><text:s text:c="4"/>000452: 01 ldoi <text:s text:c="10"/>00000000000005A4</text:p>
      <text:p text:style-name="P107"><text:s text:c="4"/>00045B: 00 lodi <text:s text:c="7"/>01,FFFFFFFFFFFFFFE8</text:p>
      <text:p text:style-name="P107"><text:s text:c="4"/>000465: 89 equi <text:s text:c="7"/></text:p>
      <text:p text:style-name="P107"><text:s text:c="4"/>000466: 77 tjp <text:s text:c="11"/>0000000000000493</text:p>
      <text:p text:style-name="P107"><text:s text:c="4"/>00046F: 01 ldoi <text:s text:c="10"/>00000000000005A4</text:p>
      <text:p text:style-name="P107"><text:s text:c="4"/>000478: 39 deci <text:s text:c="10"/>0000000000000001</text:p>
      <text:p text:style-name="P107"><text:s text:c="4"/>000481: 03 sroi <text:s text:c="10"/>00000000000005A4</text:p>
      <text:p text:style-name="P107"><text:s text:c="4"/>00048A: 17 ujp <text:s text:c="11"/>00000000000003A8</text:p>
      <text:p text:style-name="P107"><text:s text:c="4"/>000493: AE mrkl* <text:s text:c="9"/>0000000000000022</text:p>
      <text:p text:style-name="P107"><text:s text:c="4"/>00049C: 05 lao <text:s text:c="11"/>00000000000005A4</text:p>
      <text:p text:style-name="P107"><text:s text:c="4"/>0004A5: BD inv <text:s text:c="8"/></text:p>
      <text:p text:style-name="P107"><text:s text:c="4"/>0004A6: AE mrkl* <text:s text:c="9"/>0000000000000023</text:p>
      <text:p text:style-name="P107"/>
      <text:p text:style-name="P107">debug&gt; b $445</text:p>
      <text:p text:style-name="P107">*** Invalid source line</text:p>
      <text:p text:style-name="P107">debug&gt; bi $445</text:p>
      <text:p text:style-name="P107">debug&gt; r</text:p>
      <text:p text:style-name="P107">Value: </text:p>
      <text:p text:style-name="P107"/>
      <text:p text:style-name="P107">=== break ===</text:p>
      <text:p text:style-name="P107"/>
      <text:p text:style-name="P107"><text:s text:c="2"/>33: <text:s text:c="4"/>21: <text:s text:c="11"/>a[i] := y(i); </text:p>
      <text:p text:style-name="P107"><text:s text:c="2"/>34: <text:s text:c="5"/>2: b* <text:s text:c="4"/>for i := 10 downto 1 do writeln('Value: ', a[i]); </text:p>
      <text:p text:style-name="P107"><text:s text:c="2"/>35: <text:s text:c="5"/>0: <text:s text:c="4"/></text:p>
      <text:p text:style-name="P107"/>
      <text:p text:style-name="P107">debug&gt; dst</text:p>
      <text:p text:style-name="P107">00FFFFA0: 000000000000000B (11)</text:p>
      <text:p text:style-name="P107">00FFFFA8: 0000000000000014 (20)</text:p>
      <text:p text:style-name="P107">00FFFFB0: 00000000000004FE (1278)</text:p>
      <text:p text:style-name="P107">00FFFFB8: 0000000000000001 (1)</text:p>
      <text:p text:style-name="P107">00FFFFC0: 000000000000000A (10)</text:p>
      <text:p text:style-name="P107">00FFFFC8: 0000000000FFFFD0 (16777168)</text:p>
      <text:p text:style-name="P107">00FFFFD0: 0000000001000000 (16777216)</text:p>
      <text:p text:style-name="P107">00FFFFD8: 0000000000000005 (5)</text:p>
      <text:p text:style-name="P107">00FFFFE0: 0000000000FFFFB8 (16777144)</text:p>
      <text:p text:style-name="P107">00FFFFE8: 0000000000FFFF98 (16777112)</text:p>
      <text:p text:style-name="P107"/>
      <text:p text:style-name="Standard">dst dumps either the specified number of words on the P-machine stack or the default 10 words. The first field is the address of the stack word, the second is the contents of the word in hex, then the contents in decimal.</text:p>
      <text:p text:style-name="Standard"><text:soft-page-break/>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_RefHeading___Toc15628_2478585429"/><text:bookmark-start text:name="_Toc528309129"/>b <text:s text:c="2"/>[m] l|r <text:s text:c="9"/>Place breakpoint at source line number/routine<text:bookmark-end text:name="__RefHeading___Toc15628_2478585429"/><text:bookmark-end text:name="_Toc528309129"/></text:h>
      <text:p text:style-name="Standard">The b or break command places a source line or routine breakpoint. If the program is run, it will stop at that breakpoint.</text:p>
      <text:p text:style-name="P107">debug&gt; b 33</text:p>
      <text:p text:style-name="P107">debug&gt; r</text:p>
      <text:p text:style-name="P107"/>
      <text:p text:style-name="P107">=== break ===</text:p>
      <text:p text:style-name="P107"/>
      <text:p text:style-name="P107"><text:s text:c="2"/>32: <text:s text:c="5"/>2: <text:s text:c="7"/>for i := 1 to 10 do </text:p>
      <text:p text:style-name="P107"><text:s text:c="2"/>33: <text:s text:c="5"/>1: b* <text:s text:c="8"/>a[i] := y(i); </text:p>
      <text:p text:style-name="P107"><text:s text:c="2"/>34: <text:s text:c="5"/>0: <text:s text:c="7"/>for i := 10 downto 1 do writeln('Value: ', a[i]);</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0_2478585429"/><text:bookmark-start text:name="_Toc528309130"/>tp <text:s/>[m] l|r <text:s text:c="9"/>Place tracepoint at source line number/routine<text:bookmark-end text:name="__RefHeading___Toc15630_2478585429"/><text:bookmark-end text:name="_Toc528309130"/></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text:soft-page-break/></text:p>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2_2478585429"/><text:bookmark-start text:name="_Toc528309131"/>bi <text:s/>a <text:s text:c="13"/>Place breakpoint at instruction<text:bookmark-end text:name="__RefHeading___Toc15632_2478585429"/><text:bookmark-end text:name="_Toc528309131"/></text:h>
      <text:p text:style-name="Standard">Places a machine instruction level breakpoint. These breakpoints can be placed anywhere in the program, and thus no module is required.</text:p>
      <text:p text:style-name="P107">debug&gt; lc test 1 1000</text:p>
      <text:p text:style-name="P107"/>
      <text:p text:style-name="P107"><text:s text:c="3"/>1: <text:s text:c="5"/>1: <text:s text:c="3"/>program test(output); </text:p>
      <text:p text:style-name="P107"><text:s text:c="3"/>2: <text:s text:c="5"/>0: <text:s text:c="4"/></text:p>
      <text:p text:style-name="P107"><text:s text:c="4"/>00006A: AE mrkl* <text:s text:c="9"/>0000000000000002</text:p>
      <text:p text:style-name="P107"><text:s text:c="4"/>000073: AE mrkl* <text:s text:c="9"/>0000000000000003</text:p>
      <text:p text:style-name="P107"><text:s text:c="3"/>3: <text:s text:c="5"/>0: <text:s text:c="3"/>var a: array 10 of integer; </text:p>
      <text:p text:style-name="P107"><text:s text:c="4"/>000073: AE mrkl* <text:s text:c="9"/>0000000000000003</text:p>
      <text:p text:style-name="P107"><text:s text:c="4"/>00007C: AE mrkl* <text:s text:c="9"/>0000000000000004</text:p>
      <text:p text:style-name="P107"><text:s text:c="3"/>4: <text:s text:c="5"/>0: <text:s text:c="7"/>i: integer; </text:p>
      <text:p text:style-name="P107"/>
      <text:p text:style-name="P107">...</text:p>
      <text:p text:style-name="P107"/>
      <text:p text:style-name="P107"><text:s text:c="4"/>000353: AE mrkl* <text:s text:c="9"/>0000000000000021</text:p>
      <text:p text:style-name="P107"><text:s text:c="4"/>00035C: 05 lao <text:s text:c="11"/>00000000000005A4</text:p>
      <text:p text:style-name="P107"><text:s text:c="4"/>000365: BD inv <text:s text:c="8"/></text:p>
      <text:p text:style-name="P107"><text:s text:c="4"/>000366: AE mrkl* <text:s text:c="9"/>0000000000000022</text:p>
      <text:p text:style-name="P107"><text:s text:c="2"/>34: <text:s text:c="5"/>0: <text:s text:c="7"/>for i := 10 downto 1 do writeln('Value: ', a[i]); </text:p>
      <text:p text:style-name="P107"><text:s text:c="4"/>000366: AE mrkl* <text:s text:c="9"/>0000000000000022</text:p>
      <text:p text:style-name="P107"><text:s text:c="4"/>00036F: 7B ldci <text:s text:c="10"/>000000000000000A</text:p>
      <text:p text:style-name="P107"><text:s text:c="4"/>000378: 02 stri <text:s text:c="7"/>01,FFFFFFFFFFFFFFF0</text:p>
      <text:p text:style-name="P107"><text:s text:c="4"/>000382: 7B ldci <text:s text:c="10"/>0000000000000001</text:p>
      <text:p text:style-name="P107"><text:s text:c="4"/>00038B: 02 stri <text:s text:c="7"/>01,FFFFFFFFFFFFFFE8</text:p>
      <text:p text:style-name="P107"><text:s text:c="4"/>000395: 00 lodi <text:s text:c="7"/>01,FFFFFFFFFFFFFFF0</text:p>
      <text:p text:style-name="P107"><text:s text:c="4"/>00039F: 03 sroi <text:s text:c="10"/>00000000000005A4</text:p>
      <text:p text:style-name="P107"><text:s text:c="4"/>0003A8: AE mrkl* <text:s text:c="9"/>0000000000000022</text:p>
      <text:p text:style-name="P107"><text:s text:c="4"/>0003B1: 01 ldoi <text:s text:c="10"/>00000000000005A4</text:p>
      <text:p text:style-name="P107"><text:s text:c="4"/>0003BA: 00 lodi <text:s text:c="7"/>01,FFFFFFFFFFFFFFE8</text:p>
      <text:p text:style-name="P107"><text:s text:c="4"/>0003C4: 95 geqi <text:s text:c="7"/></text:p>
      <text:p text:style-name="P107"><text:s text:c="4"/>0003C5: 18 fjp <text:s text:c="11"/>0000000000000493</text:p>
      <text:p text:style-name="P107"/>
      <text:p text:style-name="P107">debug&gt; bi $3c5 </text:p>
      <text:p text:style-name="P107">debug&gt; r</text:p>
      <text:p text:style-name="P107"/>
      <text:p text:style-name="P107">=== break ===</text:p>
      <text:p text:style-name="P107"/>
      <text:p text:style-name="P107"><text:soft-page-break/><text:s text:c="2"/>33: <text:s text:c="4"/>21: <text:s text:c="11"/>a[i] := y(i); </text:p>
      <text:p text:style-name="P107"><text:s text:c="2"/>34: <text:s text:c="5"/>2: b* <text:s text:c="4"/>for i := 10 downto 1 do writeln('Value: ', a[i]); </text:p>
      <text:p text:style-name="P107"><text:s text:c="2"/>35: <text:s text:c="5"/>0: <text:s text:c="4"/></text:p>
      <text:p text:style-name="P107"/>
      <text:p text:style-name="P107">debug&gt; </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_RefHeading___Toc15634_2478585429"/><text:bookmark-start text:name="_Toc528309132"/>tpi a <text:s text:c="13"/>Place tracepoint at instruction<text:bookmark-end text:name="__RefHeading___Toc15634_2478585429"/><text:bookmark-end text:name="_Toc528309132"/></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_RefHeading___Toc15636_2478585429"/><text:bookmark-start text:name="_Toc528309133"/>c <text:s text:c="2"/>[a] <text:s text:c="11"/>Clear breakpoint/all breakpoints<text:bookmark-end text:name="__RefHeading___Toc15636_2478585429"/><text:bookmark-end text:name="_Toc528309133"/></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_RefHeading___Toc15638_2478585429"/><text:bookmark-start text:name="_Toc528309134"/>lb <text:s text:c="16"/>List active breakpoints<text:bookmark-end text:name="__RefHeading___Toc15638_2478585429"/><text:bookmark-end text:name="_Toc528309134"/></text:h>
      <text:p text:style-name="Standard">Lists the breakpoints in the table.</text:p>
      <text:p text:style-name="P107">debug&gt; b test 15</text:p>
      <text:p text:style-name="P107">debug&gt; tp test 18</text:p>
      <text:p text:style-name="P107">debug&gt; bi 5</text:p>
      <text:p text:style-name="P107">debug&gt; tpi 10</text:p>
      <text:p text:style-name="P107">debug&gt; lb</text:p>
      <text:p text:style-name="P107"/>
      <text:p text:style-name="P107">Breakpoints:</text:p>
      <text:p text:style-name="P107"><text:soft-page-break/></text:p>
      <text:p text:style-name="P107">No <text:s/>Src <text:s/>Addr <text:s text:c="2"/>Trc/brk</text:p>
      <text:p text:style-name="P107">=======================</text:p>
      <text:p text:style-name="P107"><text:s/>1: <text:s text:c="2"/>1: 000000 b</text:p>
      <text:p text:style-name="P107"><text:s/>2: <text:s/>15: 000079 b</text:p>
      <text:p text:style-name="P107"><text:s/>3: <text:s/>18: 000096 t</text:p>
      <text:p text:style-name="P107"><text:s/>4:****: 000005 b</text:p>
      <text:p text:style-name="P107"><text:s/>5:****: 00000A t</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_RefHeading___Toc15640_2478585429"/><text:bookmark-start text:name="_Toc528309135"/>w <text:s text:c="2"/>a <text:s text:c="13"/>Watch variable<text:bookmark-end text:name="__RefHeading___Toc15640_2478585429"/><text:bookmark-end text:name="_Toc528309135"/></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text:soft-page-break/>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_RefHeading___Toc15642_2478585429"/><text:bookmark-start text:name="_Toc528309136"/>lw <text:s text:c="16"/>List watch table<text:bookmark-end text:name="__RefHeading___Toc15642_2478585429"/><text:bookmark-end text:name="_Toc528309136"/></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_RefHeading___Toc15644_2478585429"/><text:bookmark-start text:name="_Toc528309137"/>cw <text:s/>[n] <text:s text:c="11"/>Clear watch table entry/all watch entries<text:bookmark-end text:name="__RefHeading___Toc15644_2478585429"/><text:bookmark-end text:name="_Toc528309137"/></text:h>
      <text:p text:style-name="Standard">Clears either a specific watch entry by logical number, or clears the entire watch table.</text:p>
      <text:h text:style-name="Routine_20_heading_20_3" text:outline-level="3"><text:bookmark-start text:name="__RefHeading___Toc15646_2478585429"/><text:bookmark-start text:name="_Toc528309138"/>lia <text:s text:c="15"/>List instruction analyzer buffer<text:bookmark-end text:name="__RefHeading___Toc15646_2478585429"/><text:bookmark-end text:name="_Toc528309138"/></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 text:c="4"/>000017: 0C cup <text:s text:c="8"/>00,00000097</text:p>
      <text:p text:style-name="Code"><text:s text:c="4"/>000015: 0B mst <text:s text:c="8"/>00</text:p>
      <text:p text:style-name="Code"><text:s text:c="4"/>000010: AE mrkl* <text:s text:c="9"/>00000002</text:p>
      <text:p text:style-name="Code"/>
      <text:p text:style-name="Code"><text:soft-page-break/>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_RefHeading___Toc15648_2478585429"/><text:bookmark-start text:name="_Toc528309139"/>lsa <text:s text:c="15"/>List source analyzer buffer<text:bookmark-end text:name="__RefHeading___Toc15648_2478585429"/><text:bookmark-end text:name="_Toc52830913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_RefHeading___Toc15650_2478585429"/><text:bookmark-start text:name="_Toc528309140"/>s <text:s text:c="2"/>[n] <text:s text:c="11"/>Step next source line execution<text:bookmark-end text:name="__RefHeading___Toc15650_2478585429"/><text:bookmark-end text:name="_Toc528309140"/></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text:soft-page-break/>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
      <text:p text:style-name="Code"><text:s text:c="2"/>15: <text:s text:c="5"/>1: <text:s text:c="3"/></text:p>
      <text:p text:style-name="Code"><text:s text:c="2"/>16: <text:s text:c="5"/>1: <text:s/>* <text:s text:c="4"/>z := 42;</text:p>
      <text:p text:style-name="Code"><text:s text:c="2"/>17: <text:s text:c="5"/>0: <text:s text:c="3"/></text:p>
      <text:p text:style-name="Code"><text:soft-page-break/></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2_2478585429"/><text:bookmark-start text:name="_Toc528309141"/>ss <text:s/>[n] <text:s text:c="11"/>Step next source line execution silently<text:bookmark-end text:name="__RefHeading___Toc15652_2478585429"/><text:bookmark-end text:name="_Toc528309141"/></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4_2478585429"/><text:bookmark-start text:name="_Toc528309142"/>si <text:s/>[n] <text:s text:c="11"/>Step instructions<text:bookmark-end text:name="__RefHeading___Toc15654_2478585429"/><text:bookmark-end text:name="_Toc528309142"/></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 text:c="2"/>* 00004E: AE mrkl* <text:s text:c="9"/>0000000000000001</text:p>
      <text:p text:style-name="Code"/>
      <text:p text:style-name="Code">debug&gt; </text:p>
      <text:p text:style-name="Code"/>
      <text:h text:style-name="Routine_20_heading_20_3" text:outline-level="3"><text:bookmark-start text:name="__RefHeading___Toc15656_2478585429"/><text:bookmark-start text:name="_Toc528309143"/><text:soft-page-break/>sis [n] <text:s text:c="11"/>Step instructions silently<text:bookmark-end text:name="__RefHeading___Toc15656_2478585429"/><text:bookmark-end text:name="_Toc528309143"/></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_RefHeading___Toc15650_2478585429_Copy_"/><text:bookmark-start text:name="_Toc528309140_Copy_1"/>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text:soft-page-break/></text:p>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0_2478585429_Copy1"/><text:bookmark-start text:name="_Toc528309140_Copy_1_Copy_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4_2478585429_Copy_"/><text:bookmark-start text:name="_Toc528309142_Copy_1"/>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o</text:p>
      <text:p text:style-name="Code"/>
      <text:p text:style-name="Code">pc: 0002FF sp: FFFFA0 mp: FFFFD0 np: 0005AC</text:p>
      <text:p text:style-name="Code"><text:s text:c="2"/>* 0002FF: F6 cuf <text:s text:c="11"/>000000000000016B</text:p>
      <text:p text:style-name="Code"><text:soft-page-break/></text:p>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6_2478585429_Copy_"/><text:bookmark-start text:name="_Toc528309143_Copy_1"/>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P107"><text:bookmark-start text:name="__RefHeading___Toc15658_2478585429_Copy1"/>P6 debug mode<text:bookmark-end text:name="__RefHeading___Toc15658_2478585429_Copy1"/></text:p>
      <text:p text:style-name="P107"/>
      <text:p text:style-name="P107"><text:s text:c="2"/>31: <text:s text:c="5"/>1: <text:s text:c="4"/></text:p>
      <text:p text:style-name="P107"><text:s text:c="2"/>32: <text:s text:c="5"/>1: <text:s/>* <text:s text:c="4"/>for i := 1 to 10 do </text:p>
      <text:p text:style-name="P107"><text:s text:c="2"/>33: <text:s text:c="5"/>0: <text:s text:c="11"/>a[i] := y(i); </text:p>
      <text:p text:style-name="P107"/>
      <text:p text:style-name="P107">debug&gt; s</text:p>
      <text:p text:style-name="P107"/>
      <text:p text:style-name="P107"><text:s text:c="2"/>32: <text:s text:c="5"/>2: <text:s text:c="7"/>for i := 1 to 10 do </text:p>
      <text:p text:style-name="P107"><text:s text:c="2"/>33: <text:s text:c="5"/>1: <text:s/>* <text:s text:c="8"/>a[i] := y(i); </text:p>
      <text:p text:style-name="P107"><text:s text:c="2"/>34: <text:s text:c="5"/>0: <text:s text:c="7"/>for i := 10 downto 1 do writeln('Value: ', a[i]); </text:p>
      <text:p text:style-name="P107"/>
      <text:p text:style-name="P107">debug&gt; s</text:p>
      <text:p text:style-name="P107"><text:soft-page-break/></text:p>
      <text:p text:style-name="P107"><text:s text:c="2"/>23: <text:s text:c="5"/>1: <text:s text:c="4"/></text:p>
      <text:p text:style-name="P107"><text:s text:c="2"/>24: <text:s text:c="5"/>1: <text:s/>* <text:s text:c="4"/>i := 10; </text:p>
      <text:p text:style-name="P107"><text:s text:c="2"/>25: <text:s text:c="5"/>0: <text:s text:c="4"/></text:p>
      <text:p text:style-name="P107"/>
      <text:p text:style-name="P107">debug&gt; ret</text:p>
      <text:p text:style-name="P107"/>
      <text:p text:style-name="P107"><text:s text:c="2"/>32: <text:s text:c="5"/>2: <text:s text:c="7"/>for i := 1 to 10 do </text:p>
      <text:p text:style-name="P107"><text:s text:c="2"/>33: <text:s text:c="5"/>2: <text:s/>* <text:s text:c="8"/>a[i] := y(i); </text:p>
      <text:p text:style-name="P107"><text:s text:c="2"/>34: <text:s text:c="5"/>0: <text:s text:c="7"/>for i := 10 downto 1 do writeln('Value: ', a[i]); </text:p>
      <text:p text:style-name="P107"/>
      <text:p text:style-name="Code"><text:span text:style-name="T28">debug&gt;</text:span> </text:p>
      <text:h text:style-name="Routine_20_heading_20_3" text:outline-level="3"><text:bookmark-start text:name="__RefHeading___Toc15658_2478585429"/><text:bookmark-start text:name="_Toc528309144"/>hs <text:s text:c="16"/>Report heap space<text:bookmark-end text:name="__RefHeading___Toc15658_2478585429"/><text:bookmark-end text:name="_Toc528309144"/></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_RefHeading___Toc15668_2478585429"/><text:bookmark-start text:name="_Toc528309149"/>ti <text:s text:c="16"/>Turn instruction tracing on<text:bookmark-end text:name="__RefHeading___Toc15668_2478585429"/><text:bookmark-end text:name="_Toc52830914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 text:c="2"/>* 00009C/FFFFD4: AE mrkl* <text:s text:c="9"/>00000012</text:p>
      <text:p text:style-name="Code"><text:soft-page-break/><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text:style-name="WWNum18">
        <text:list-item>
          <text:p text:style-name="P221">A column with space or “b” to indicate that instruction has a breakpoint set.</text:p>
        </text:list-item>
        <text:list-item>
          <text:p text:style-name="P221">A column with space or “*” to indicate that the point of execution is on this instruction. Note that since the instruction is always active when tracing, this is always set.</text:p>
        </text:list-item>
        <text:list-item>
          <text:p text:style-name="P221">The value of the pc register.</text:p>
        </text:list-item>
        <text:list-item>
          <text:p text:style-name="P221">The value of the sp register.</text:p>
        </text:list-item>
        <text:list-item>
          <text:p text:style-name="P221">The bytecode instruction value.</text:p>
        </text:list-item>
        <text:list-item>
          <text:p text:style-name="P221">The memnonic for the instruction.</text:p>
        </text:list-item>
        <text:list-item>
          <text:p text:style-name="P221">The p value for the instruction.</text:p>
        </text:list-item>
        <text:list-item>
          <text:p text:style-name="P221">One or more parameters for the instruction.</text:p>
        </text:list-item>
      </text:list>
      <text:h text:style-name="Routine_20_heading_20_3" text:outline-level="3"><text:bookmark-start text:name="__RefHeading___Toc15670_2478585429"/><text:bookmark-start text:name="_Toc528309150"/>nti <text:s text:c="15"/>Turn instruction tracing off<text:bookmark-end text:name="__RefHeading___Toc15670_2478585429"/><text:bookmark-end text:name="_Toc528309150"/></text:h>
      <text:p text:style-name="Standard">Turns off instruction tracing.</text:p>
      <text:h text:style-name="Routine_20_heading_20_3" text:outline-level="3"><text:bookmark-start text:name="__RefHeading___Toc15672_2478585429"/><text:bookmark-start text:name="_Toc528309151"/>tr <text:s text:c="16"/>Turn system routine tracing on<text:bookmark-end text:name="__RefHeading___Toc15672_2478585429"/><text:bookmark-end text:name="_Toc528309151"/></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 text:c="3"/>400/16777156-&gt; <text:s/>6</text:p>
      <text:p text:style-name="Code"><text:soft-page-break/>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_RefHeading___Toc15674_2478585429"/><text:bookmark-start text:name="_Toc528309152"/>ntr <text:s text:c="15"/>Turn system routine tracing off<text:bookmark-end text:name="__RefHeading___Toc15674_2478585429"/><text:bookmark-end text:name="_Toc528309152"/></text:h>
      <text:p text:style-name="Standard">Turns system routine tracing off.</text:p>
      <text:h text:style-name="Routine_20_heading_20_3" text:outline-level="3"><text:bookmark-start text:name="__RefHeading___Toc15676_2478585429"/><text:bookmark-start text:name="_Toc528309153"/>ts <text:s text:c="16"/>Turn source line tracing on<text:bookmark-end text:name="__RefHeading___Toc15676_2478585429"/><text:bookmark-end text:name="_Toc528309153"/></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_RefHeading___Toc15678_2478585429"/><text:bookmark-start text:name="_Toc528309154"/><text:soft-page-break/>nts <text:s text:c="15"/>Turn source line tracing off<text:bookmark-end text:name="__RefHeading___Toc15678_2478585429"/><text:bookmark-end text:name="_Toc528309154"/></text:h>
      <text:p text:style-name="Standard">Turns off source line tracing.</text:p>
      <text:h text:style-name="Routine_20_heading_20_3" text:outline-level="3"><text:bookmark-start text:name="__RefHeading___Toc15680_2478585429"/><text:bookmark-start text:name="_Toc528309155"/>spf <text:s text:c="15"/>Turn on source level profiling<text:bookmark-end text:name="__RefHeading___Toc15680_2478585429"/><text:bookmark-end text:name="_Toc528309155"/></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oft-page-break/><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_RefHeading___Toc15682_2478585429"/><text:bookmark-start text:name="_Toc528309156"/>nspf <text:s text:c="14"/>Turn off source level profiling<text:bookmark-end text:name="__RefHeading___Toc15682_2478585429"/><text:bookmark-end text:name="_Toc528309156"/></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_RefHeading___Toc15684_2478585429"/><text:bookmark-start text:name="_Toc528309157"/>an <text:s text:c="16"/>Turn on analyzer mode<text:bookmark-end text:name="__RefHeading___Toc15684_2478585429"/><text:bookmark-end text:name="_Toc528309157"/></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_RefHeading___Toc15686_2478585429"/><text:bookmark-start text:name="_Toc528309158"/>nan <text:s text:c="15"/>Turn off analyzer mode<text:bookmark-end text:name="__RefHeading___Toc15686_2478585429"/><text:bookmark-end text:name="_Toc528309158"/></text:h>
      <text:p text:style-name="Standard">Turns off analyzer mode.</text:p>
      <text:h text:style-name="Routine_20_heading_20_3" text:outline-level="3"><text:bookmark-start text:name="__RefHeading___Toc15688_2478585429"/><text:bookmark-start text:name="_Toc528309159"/>r <text:s text:c="17"/>Run program from current pc<text:bookmark-end text:name="__RefHeading___Toc15688_2478585429"/><text:bookmark-end text:name="_Toc528309159"/></text:h>
      <text:p text:style-name="Standard">The byte code interpreter runs from the current pc until a stop or breakpoint is hit.</text:p>
      <text:h text:style-name="Routine_20_heading_20_3" text:outline-level="3"><text:bookmark-start text:name="__RefHeading___Toc15690_2478585429"/><text:bookmark-start text:name="_Toc528309160"/>ps <text:s text:c="16"/>Print current registers and instruction<text:bookmark-end text:name="__RefHeading___Toc15690_2478585429"/><text:bookmark-end text:name="_Toc528309160"/></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debug&gt; r</text:p>
      <text:p text:style-name="Code"/>
      <text:p text:style-name="Code">=== break ===</text:p>
      <text:p text:style-name="Code"/>
      <text:p text:style-name="Code"><text:soft-page-break/>pc: 0000E7 sp: FFFFD4 mp: FFFFFC np: 000298</text:p>
      <text:p text:style-name="Code">b * 0000E7: 05 lao <text:s text:c="11"/>0000026C</text:p>
      <text:p text:style-name="Code"/>
      <text:p text:style-name="Standard">For machine level.</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_RefHeading___Toc15692_2478585429"/><text:bookmark-start text:name="_Toc528309161"/>q <text:s text:c="17"/>Quit interpreter<text:bookmark-end text:name="__RefHeading___Toc15692_2478585429"/><text:bookmark-end text:name="_Toc528309161"/></text:h>
      <text:p text:style-name="Standard">Exits the pint interpreter.</text:p>
      <text:p text:style-name="Standard"/>
      <text:p text:style-name="P50"/>
      <text:h text:style-name="P205" text:outline-level="1"><text:bookmark-start text:name="__RefHeading___Toc15694_2478585429"/><text:bookmark-start text:name="_Toc528309162"/>Different generation and run options: pint, pmach and cmach<text:bookmark-end text:name="_Toc528309162"/>, and pgen<text:bookmark-end text:name="__RefHeading___Toc15694_2478585429"/></text:h>
      <text:p text:style-name="P113">pint<text:span text:style-name="T116">[t|g]</text:span></text:p>
      <text:p text:style-name="P196">pint, the traditional interpreter for the Pascal-P series, can generate a binary deck in Pascal-P6 to be run by a separate byte code machine using the e/<text:span text:style-name="T89">machdeck</text:span> option. See “<text:bookmark-ref text:reference-format="text" text:ref-name="_Ref528132821">Compiler options</text:bookmark-ref>”. <text:span text:style-name="T116">pint also comes in terminal and graphical versions, supporting the full terminal and graphical Ami standards.</text:span></text:p>
      <text:p text:style-name="P196">A separate bye code machine does not have the overhead of assembly or debugging of the intermediate. Thus it can be smaller and (in some cases) faster than pint. There are two alternate byte code machines available:</text:p>
      <text:p text:style-name="Standard">pmach<text:span text:style-name="T116">[t|g]</text:span></text:p>
      <text:p text:style-name="P197">This is the byte machine core from pint, and directly tracks pint. Because it comes from the same code base, it has identical run time. <text:span text:style-name="T116">p</text:span><text:span text:style-name="T117">mach</text:span><text:span text:style-name="T116"> also comes in terminal and graphical versions, supporting the full terminal and graphical Ami standards.</text:span></text:p>
      <text:p text:style-name="Standard">cmach<text:span text:style-name="T117">[t|g]</text:span></text:p>
      <text:p text:style-name="P197">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text:span text:style-name="T117">cmach</text:span><text:span text:style-name="T116"> also comes in terminal and graphical versions, supporting the full terminal and graphical Ami standards.</text:span></text:p>
      <text:p text:style-name="P160">package</text:p>
      <text:p text:style-name="P159">cmach features a “packaged mode”, which enables the generation of executables from a Pascal-P6 source deck. <text:span text:style-name="T117">Package mode as run by pc will automatically select the correct version of cmach according to terminal or graphical mode.</text:span></text:p>
      <text:p text:style-name="P113">pgen</text:p>
      <text:p text:style-name="Standard">Besides the interpretation options, Pascal-P6 can also use the option to directly generate machine code for a particular processor. See “<text:bookmark-ref text:reference-format="number-no-superior" text:ref-name="__RefNumPara__19948_1293392543">15</text:bookmark-ref> <text:bookmark-ref text:reference-format="text" text:ref-name="__RefHeading___Toc15756_2478585429">pgen – AMD64 code generator</text:bookmark-ref>”.</text:p>
      <text:p text:style-name="Standard"><draw:frame draw:style-name="fr2" draw:name="Frame2" text:anchor-type="paragraph" svg:x="0.4807in" svg:y="0.1661in" svg:width="5.5134in" draw:z-index="5"><draw:text-box fo:min-height="3.9516in"><text:p text:style-name="Frame_20_contents"><draw:frame text:anchor-type="paragraph" draw:z-index="6" draw:name="Text Frame 5" draw:style-name="gr9" draw:text-style-name="P249" svg:width="0.9276in" svg:height="0.3906in" svg:x="0.3307in" svg:y="0.1835in"><draw:text-box><text:p text:style-name="P241">pcom</text:p></draw:text-box></draw:frame><draw:frame text:anchor-type="paragraph" draw:z-index="7" draw:name="Text Frame 7" draw:style-name="gr9" draw:text-style-name="P249" svg:width="0.9276in" svg:height="0.3906in" svg:x="1.6965in" svg:y="0.9154in"><draw:text-box><text:p text:style-name="P241">pint</text:p></draw:text-box></draw:frame><draw:frame text:anchor-type="paragraph" draw:z-index="8" draw:name="Text Frame 9" draw:style-name="gr9" draw:text-style-name="P249" svg:width="0.9276in" svg:height="0.3906in" svg:x="1.7453in" svg:y="3.0618in"><draw:text-box><text:p text:style-name="P241">pgen</text:p></draw:text-box></draw:frame><draw:frame text:anchor-type="paragraph" draw:z-index="9" draw:name="Text Frame 10" draw:style-name="gr9" draw:text-style-name="P249" svg:width="0.9276in" svg:height="0.3906in" svg:x="3.1598in" svg:y="1.5984in"><draw:text-box><text:p text:style-name="P241">pmach[t|g</text:p></draw:text-box></draw:frame><draw:frame text:anchor-type="paragraph" draw:z-index="10" draw:name="Text Frame 11" draw:style-name="gr9" draw:text-style-name="P249" svg:width="0.9276in" svg:height="0.3906in" svg:x="3.1602in" svg:y="2.2811in"><draw:text-box><text:p text:style-name="P241">cmach[t|g]</text:p></draw:text-box></draw:frame><draw:line text:anchor-type="paragraph" draw:z-index="11" draw:name="Horizontal line 1" draw:style-name="gr4" draw:text-style-name="P240" svg:x1="1.2575in" svg:y1="0.3299in" svg:x2="1.7693in" svg:y2="0.3299in"><text:p/></draw:line><draw:line text:anchor-type="paragraph" draw:z-index="12" draw:name="Horizontal line 2" draw:style-name="gr4" draw:text-style-name="P240" svg:x1="2.6236in" svg:y1="1.1102in" svg:x2="3.2327in" svg:y2="1.1102in"><text:p/></draw:line><draw:line text:anchor-type="paragraph" draw:z-index="13" draw:name="Vertical line 3" draw:style-name="gr4" draw:text-style-name="P240" svg:x1="3.6228in" svg:y1="1.3055in" svg:x2="3.6228in" svg:y2="1.5984in"><text:p/></draw:line><draw:line text:anchor-type="paragraph" draw:z-index="14" draw:name="Vertical line 4" draw:style-name="gr4" draw:text-style-name="P240" svg:x1="3.6228in" svg:y1="2.1071in" svg:x2="3.6228in" svg:y2="2.2815in"><text:p/></draw:line><draw:line text:anchor-type="paragraph" draw:z-index="15" draw:name="Horizontal line 3" draw:style-name="gr4" draw:text-style-name="P240" svg:x1="2.672in" svg:y1="3.2571in" svg:x2="3.2323in" svg:y2="3.2571in"><text:p/></draw:line><draw:custom-shape text:anchor-type="paragraph" draw:z-index="16" draw:name="Shape 2" draw:style-name="gr8" draw:text-style-name="P247" svg:width="0.7807in" svg:height="0.3906in" svg:x="1.7693in" svg:y="0.1346in"><text:p text:style-name="P248">*.p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1" draw:style-name="gr8" draw:text-style-name="P247" svg:width="0.7807in" svg:height="0.3906in" svg:x="3.2327in" svg:y="0.9154in"><text:p text:style-name="P248">*.p6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 3" draw:style-name="gr8" draw:text-style-name="P247" svg:width="0.7807in" svg:height="0.3906in" svg:x="3.2327in" svg:y="3.0618in"><text:p text:style-name="P248">*.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Vertical line 1" draw:style-name="gr1" draw:text-style-name="P240" svg:x1="2.1217in" svg:y1="0.5252in" svg:x2="2.1217in" svg:y2="0.7413in"><text:p/></draw:line><draw:line text:anchor-type="paragraph" draw:z-index="24" draw:name="Line 2" draw:style-name="gr1" draw:text-style-name="P240" svg:x1="1.3898in" svg:y1="0.7409in" svg:x2="2.1217in" svg:y2="0.7409in"><text:p/></draw:line><draw:line text:anchor-type="paragraph" draw:z-index="25" draw:name="Vertical line 2" draw:style-name="gr4" draw:text-style-name="P240" svg:x1="2.1701in" svg:y1="2.7902in" svg:x2="2.1701in" svg:y2="3.0618in"><text:p/></draw:line><draw:line text:anchor-type="paragraph" draw:z-index="26" draw:name="Line 3" draw:style-name="gr1" draw:text-style-name="P240" svg:x1="1.4382in" svg:y1="2.7902in" svg:x2="1.3898in" svg:y2="0.7409in"><text:p/></draw:line><draw:line text:anchor-type="paragraph" draw:z-index="27" draw:name="Line 4" draw:style-name="gr1" draw:text-style-name="P240" svg:x1="2.1701in" svg:y1="2.7902in" svg:x2="1.4382in" svg:y2="2.7902in"><text:p/></draw:line><draw:line text:anchor-type="paragraph" draw:z-index="28" draw:name="Vertical line 5" draw:style-name="gr4" draw:text-style-name="P240" svg:x1="2.1217in" svg:y1="0.7409in" svg:x2="2.1217in" svg:y2="0.9154in"><text:p/></draw:line><draw:line text:anchor-type="paragraph" draw:z-index="29" draw:name="Horizontal line 4" draw:style-name="gr1" draw:text-style-name="P240" svg:x1="4.3165in" svg:y1="1.4244in" svg:x2="3.6228in" svg:y2="1.4244in"><text:p/></draw:line><draw:line text:anchor-type="paragraph" draw:z-index="30" draw:name="Line 5" draw:style-name="gr1" draw:text-style-name="P240" svg:x1="4.3165in" svg:y1="2.1071in" svg:x2="3.6228in" svg:y2="2.1071in"><text:p/></draw:line><draw:line text:anchor-type="paragraph" draw:z-index="31" draw:name="Vertical line 6" draw:style-name="gr1" draw:text-style-name="P240" svg:x1="4.3165in" svg:y1="1.4244in" svg:x2="4.3165in" svg:y2="2.1071in"><text:p/></draw:line></text:p></draw:text-box></draw:frame><text:soft-page-break/><text:s/></text:p>
      <text:p text:style-name="P136">As shown, pcom produces *.p6 intermediate files as output. This can be fed to pint or pgen. pint can produce a “machine deck” consisting of the object file for the Pascal-P6 “virtual machine”, which pint can either run itself or export to a file, *.p6o (or .p6 “object”). This file can then be run on either pmach or cmach. <text:span text:style-name="T74">p</text:span>gen takes a *.p6 intermediate and generates a *.s assembly file, which is then fed to a compiler/assembler such as gcc to become part of a binary executable.</text:p>
      <text:h text:style-name="Heading_20_2" text:outline-level="2"><text:bookmark-start text:name="__RefHeading___Toc15696_2478585429"/><text:bookmark-start text:name="_Toc528309163"/>Running the different machines<text:bookmark-end text:name="__RefHeading___Toc15696_2478585429"/><text:bookmark-end text:name="_Toc528309163"/></text:h>
      <text:p text:style-name="Standard">The p6 script features flags to optionally run programs on the different machines:</text:p>
      <text:p text:style-name="P113">–pgen<text:tab/><text:tab/>Compile directly to executable binary (the default).</text:p>
      <text:p text:style-name="P113">--pint<text:tab/><text:tab/>Run on the pint interpreter.</text:p>
      <text:p text:style-name="Standard">--pmach<text:tab/>Run on the pmach machine.</text:p>
      <text:p text:style-name="Standard">--cmach<text:tab/>Run on the cmach machine.</text:p>
      <text:p text:style-name="Standard">–<text:span text:style-name="T51">package<text:tab/>Run in packaged mode.</text:span></text:p>
      <text:p text:style-name="Standard">Example:</text:p>
      <text:p text:style-name="Code">p6 –pmach test</text:p>
      <text:p text:style-name="Code"/>
      <text:p text:style-name="Standard">To run program test on the pmach machine.</text:p>
      <text:h text:style-name="Heading_20_2" text:outline-level="2"><text:bookmark-start text:name="__RefHeading___Toc15698_2478585429"/><text:bookmark-start text:name="_Toc528309164"/><text:soft-page-break/>Difference between different <text:bookmark-end text:name="_Toc528309164"/><text:span text:style-name="T89">generation modes</text:span><text:bookmark-end text:name="__RefHeading___Toc15698_2478585429"/></text:h>
      <text:p text:style-name="Standard">The differences between the number of source code lines and run times for different machines are detailed (at current writing, and using the “prime.pas” test in the sample_programs directory):</text:p>
      <text:p text:style-name="Standard"/>
      <table:table table:name="Table24" table:style-name="Table24" table:template-name="mytable5">
        <table:table-column table:style-name="Table24.A"/>
        <table:table-column table:style-name="Table24.B"/>
        <table:table-row table:style-name="Table24.1">
          <table:table-cell table:style-name="Table24.A1" office:value-type="string">
            <text:p text:style-name="P11">Machine</text:p>
          </table:table-cell>
          <table:table-cell table:style-name="Table24.A1" office:value-type="string">
            <text:p text:style-name="P11">Run time for “prime.pas”/100 iterations</text:p>
          </table:table-cell>
        </table:table-row>
        <table:table-row table:style-name="Table24.1">
          <table:table-cell table:style-name="Table24.A2" office:value-type="string">
            <text:p text:style-name="P11">pint</text:p>
          </table:table-cell>
          <table:table-cell table:style-name="Table24.B2" office:value-type="string">
            <text:p text:style-name="P67">28.726s</text:p>
          </table:table-cell>
        </table:table-row>
        <table:table-row table:style-name="Table24.1">
          <table:table-cell table:style-name="Table24.A2" office:value-type="string">
            <text:p text:style-name="P11">pmach</text:p>
          </table:table-cell>
          <table:table-cell table:style-name="Table24.B3" office:value-type="string">
            <text:p text:style-name="P67">27.319s</text:p>
          </table:table-cell>
        </table:table-row>
        <table:table-row table:style-name="Table24.1">
          <table:table-cell table:style-name="Table24.A2" office:value-type="string">
            <text:p text:style-name="P11">cmach</text:p>
          </table:table-cell>
          <table:table-cell table:style-name="Table24.B2" office:value-type="string">
            <text:p text:style-name="P67">2.208s</text:p>
          </table:table-cell>
        </table:table-row>
        <table:table-row table:style-name="Table24.1">
          <table:table-cell table:style-name="Table24.A2" office:value-type="string">
            <text:p text:style-name="P13">package</text:p>
          </table:table-cell>
          <table:table-cell table:style-name="Table24.B3" office:value-type="string">
            <text:p text:style-name="P81">2.298s</text:p>
          </table:table-cell>
        </table:table-row>
        <table:table-row table:style-name="Table24.6">
          <table:table-cell table:style-name="Table24.A2" office:value-type="string">
            <text:p text:style-name="P16">pgen</text:p>
          </table:table-cell>
          <table:table-cell table:style-name="Table24.B2" office:value-type="string">
            <text:p text:style-name="P75"><text:span text:style-name="T14">0.01</text:span><text:span text:style-name="T15">3</text:span><text:span text:style-name="T14">s</text:span></text:p>
          </table:table-cell>
        </table:table-row>
        <table:table-row table:style-name="Table24.6">
          <table:table-cell table:style-name="Table24.A2" office:value-type="string">
            <text:p text:style-name="P14">gcc<text:span text:style-name="T92">(C)</text:span></text:p>
          </table:table-cell>
          <table:table-cell table:style-name="Table24.B3" office:value-type="string">
            <text:p text:style-name="P83">0.006s</text:p>
          </table:table-cell>
        </table:table-row>
        <table:table-row table:style-name="Table24.6">
          <table:table-cell table:style-name="Table24.A2" office:value-type="string">
            <text:p text:style-name="P15">gpc</text:p>
          </table:table-cell>
          <table:table-cell table:style-name="Table24.B8" office:value-type="string">
            <text:p text:style-name="P84">0.010s</text:p>
          </table:table-cell>
        </table:table-row>
      </table:table>
      <text:p text:style-name="Standard"/>
      <text:p text:style-name="P114">Note that for pint, pmach and cmach modes, the total time includes loading time for the intermediate. For pgen and package, it does not, since they are executables.</text:p>
      <text:h text:style-name="Heading_20_2" text:outline-level="2"><text:bookmark-start text:name="__RefHeading___Toc15700_2478585429"/><text:bookmark-start text:name="_Toc528309165"/>Setting machine options on pmach and cmach<text:bookmark-end text:name="__RefHeading___Toc15700_2478585429"/><text:bookmark-end text:name="_Toc528309165"/></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able:table table:name="Table41" table:style-name="Table41" table:template-name="mytable5">
        <table:table-column table:style-name="Table41.A" table:number-columns-repeated="3"/>
        <text:soft-page-break/>
        <table:table-row>
          <table:table-cell table:style-name="Table41.A1" office:value-type="string">
            <text:p text:style-name="P18">Option name</text:p>
          </table:table-cell>
          <table:table-cell table:style-name="Table41.A1" office:value-type="string">
            <text:p text:style-name="P18">Char</text:p>
          </table:table-cell>
          <table:table-cell table:style-name="Table41.A1" office:value-type="string">
            <text:p text:style-name="P18">Function</text:p>
          </table:table-cell>
        </table:table-row>
        <table:table-row table:style-name="Table41.2">
          <table:table-cell table:style-name="Table41.A2" office:value-type="string">
            <text:p text:style-name="P18">WRDSIZ16</text:p>
          </table:table-cell>
          <table:table-cell table:style-name="Table41.B2" office:value-type="string">
            <text:p text:style-name="P77">-</text:p>
          </table:table-cell>
          <table:table-cell table:style-name="Table41.B2" office:value-type="string">
            <text:p text:style-name="P77">Sets 16 bit word size.</text:p>
          </table:table-cell>
        </table:table-row>
        <table:table-row table:style-name="Table41.2">
          <table:table-cell table:style-name="Table41.A2" office:value-type="string">
            <text:p text:style-name="P18">WRDSIZ32</text:p>
          </table:table-cell>
          <table:table-cell table:style-name="Table41.B3" office:value-type="string">
            <text:p text:style-name="P77">-</text:p>
          </table:table-cell>
          <table:table-cell table:style-name="Table41.B3" office:value-type="string">
            <text:p text:style-name="P77">Sets 32 bit word size.</text:p>
          </table:table-cell>
        </table:table-row>
        <table:table-row>
          <table:table-cell table:style-name="Table41.A2" office:value-type="string">
            <text:p text:style-name="P18">WRDSIZ64</text:p>
          </table:table-cell>
          <table:table-cell table:style-name="Table41.B2" office:value-type="string">
            <text:p text:style-name="P77">-</text:p>
          </table:table-cell>
          <table:table-cell table:style-name="Table41.B2" office:value-type="string">
            <text:p text:style-name="P77">Sets 64 bit word size.</text:p>
          </table:table-cell>
        </table:table-row>
        <table:table-row>
          <table:table-cell table:style-name="Table41.A2" office:value-type="string">
            <text:p text:style-name="P18">DOCHKOVF</text:p>
          </table:table-cell>
          <table:table-cell table:style-name="Table41.B3" office:value-type="string">
            <text:p text:style-name="P77">$o/<text:span text:style-name="T89">$chkoverflo</text:span></text:p>
          </table:table-cell>
          <table:table-cell table:style-name="Table41.B3" office:value-type="string">
            <text:p text:style-name="P77">Check arithmetic overflow.</text:p>
          </table:table-cell>
        </table:table-row>
        <table:table-row>
          <table:table-cell table:style-name="Table41.A2" office:value-type="string">
            <text:p text:style-name="P18">DOSRCLIN</text:p>
          </table:table-cell>
          <table:table-cell table:style-name="Table41.B2" office:value-type="string">
            <text:p text:style-name="P77">$h/<text:span text:style-name="T89">$sourceset</text:span></text:p>
          </table:table-cell>
          <table:table-cell table:style-name="Table41.B2" office:value-type="string">
            <text:p text:style-name="P77">Add source line sets to code.</text:p>
          </table:table-cell>
        </table:table-row>
        <table:table-row>
          <table:table-cell table:style-name="Table41.A2" office:value-type="string">
            <text:p text:style-name="P18">DORECYCL</text:p>
          </table:table-cell>
          <table:table-cell table:style-name="Table41.B3" office:value-type="string">
            <text:p text:style-name="P77">$n/<text:span text:style-name="T89">$recycle</text:span></text:p>
          </table:table-cell>
          <table:table-cell table:style-name="Table41.B3" office:value-type="string">
            <text:p text:style-name="P77">Obey heap space recycle requests.</text:p>
          </table:table-cell>
        </table:table-row>
        <table:table-row>
          <table:table-cell table:style-name="Table41.A2" office:value-type="string">
            <text:p text:style-name="P18">DOCHKRPT</text:p>
          </table:table-cell>
          <table:table-cell table:style-name="Table41.B2" office:value-type="string">
            <text:p text:style-name="P77">$p/<text:span text:style-name="T90">$chkresuse</text:span></text:p>
          </table:table-cell>
          <table:table-cell table:style-name="Table41.B2" office:value-type="string">
            <text:p text:style-name="P77">Check reuse after dispose attempts.</text:p>
          </table:table-cell>
        </table:table-row>
        <table:table-row>
          <table:table-cell table:style-name="Table41.A2" office:value-type="string">
            <text:p text:style-name="P18">DONORECPAR</text:p>
          </table:table-cell>
          <table:table-cell table:style-name="Table41.B3" office:value-type="string">
            <text:p text:style-name="P77">$m/<text:span text:style-name="T90">$breakheap</text:span></text:p>
          </table:table-cell>
          <table:table-cell table:style-name="Table41.B3" office:value-type="string">
            <text:p text:style-name="P77">Do not recycle second part of disposed entries.</text:p>
          </table:table-cell>
        </table:table-row>
        <table:table-row>
          <table:table-cell table:style-name="Table41.A2" office:value-type="string">
            <text:p text:style-name="P18">DOCHKDEF</text:p>
          </table:table-cell>
          <table:table-cell table:style-name="Table41.B2" office:value-type="string">
            <text:p text:style-name="P77">$q/<text:span text:style-name="T90">$chkundef</text:span></text:p>
          </table:table-cell>
          <table:table-cell table:style-name="Table41.B2" office:value-type="string">
            <text:p text:style-name="P77">Check undefined variable accesses.</text:p>
          </table:table-cell>
        </table:table-row>
        <table:table-row>
          <table:table-cell table:style-name="Table41.A2" office:value-type="string">
            <text:p text:style-name="P17">ISO7185</text:p>
          </table:table-cell>
          <table:table-cell table:style-name="Table41.B11" office:value-type="string">
            <text:p text:style-name="P78">$s/<text:span text:style-name="T90">$iso7185</text:span></text:p>
          </table:table-cell>
          <table:table-cell table:style-name="Table41.B11" office:value-type="string">
            <text:p text:style-name="P78">Check strict adherence to the ISO 7185 Pascal standard.</text:p>
          </table:table-cell>
        </table:table-row>
      </table:table>
      <text:p text:style-name="Standard"/>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h text:style-name="Heading_20_2" text:outline-level="2"><text:bookmark-start text:name="__RefHeading___Toc15702_2478585429"/><text:bookmark-start text:name="_Toc528309166"/>Packaged application mode<text:bookmark-end text:name="__RefHeading___Toc15702_2478585429"/><text:bookmark-end text:name="_Toc528309166"/></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6" text:note-class="footnote"><text:note-citation>6</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text:soft-page-break/>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text:span text:style-name="T91">$machdeck</text:span>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text:style-name="WWNum15">
        <text:list-item>
          <text:p text:style-name="P222">Start code, the character “:”.</text:p>
        </text:list-item>
        <text:list-item>
          <text:p text:style-name="P222">Byte count, two hex digits or 8 bits, indicating the length of the data in the record. If the byte count is zero, this is the last record in the file, and terminates the file.</text:p>
        </text:list-item>
        <text:list-item>
          <text:p text:style-name="P222">Address, 16 hex digits or 64 bits in big endian or most significant byte to least significant byte order. This carries the address the data in the record is to be loaded to. It is all zeros on the last or “stop” record.</text:p>
        </text:list-item>
        <text:list-item>
          <text:p text:style-name="P222">Data, 2 hex digits or 8 bits for each of the data record bytes specified by the byte count.</text:p>
        </text:list-item>
        <text:list-item>
          <text:p text:style-name="P222">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_RefHeading___Toc15704_2478585429"/><text:bookmark-start text:name="_Toc528309167"/>Using packaged mode to port to a machine not supported by a Pascal compiler<text:bookmark-end text:name="__RefHeading___Toc15704_2478585429"/><text:bookmark-end text:name="_Toc528309167"/></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text:soft-page-break/>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P161">Running pint via cmach works, but should be avoided since it is slow. The better option is to simply run intermediates via cmach.</text:p>
      <text:p text:style-name="Standard"/>
      <text:h text:style-name="P205" text:outline-level="1"><text:bookmark-start text:name="__RefHeading___Toc26333_2374308661"/>Output Decks<text:bookmark-end text:name="__RefHeading___Toc26333_2374308661"/></text:h>
      <text:p text:style-name="P40">Pascal-P6 has two formats to carry machine independent code to the program that will <text:span text:style-name="T52">compile or </text:span>execute it, the intermediate deck and the binary deck.</text:p>
      <text:h text:style-name="Heading_20_2" text:outline-level="2"><text:bookmark-start text:name="__RefHeading___Toc15706_2478585429"/><text:bookmark-start text:name="_Toc528309168"/>Portability of intermediate decks<text:bookmark-end text:name="__RefHeading___Toc15706_2478585429"/><text:bookmark-end text:name="_Toc528309168"/></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p>
      <text:p text:style-name="Standard">However, modern microprocessors have very similar designs, and such things as byte addressability, object alignment and other concerns are standard across machines. Pascal-P6 does not even have endian dependencies.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155">16 bit intermediate</text:p>
          </table:table-cell>
          <table:table-cell table:style-name="Table25.A1" office:value-type="string">
            <text:p text:style-name="P155">Covers 8 and 16 bit microprocessors.</text:p>
          </table:table-cell>
        </table:table-row>
        <table:table-row table:style-name="Table25.1">
          <table:table-cell table:style-name="Table25.A2" office:value-type="string">
            <text:p text:style-name="P155">32 bit intermediate</text:p>
          </table:table-cell>
          <table:table-cell table:style-name="Table25.A2" office:value-type="string">
            <text:p text:style-name="P148">Covers 32 bit microprocessors.</text:p>
          </table:table-cell>
        </table:table-row>
        <table:table-row table:style-name="Table25.1">
          <table:table-cell table:style-name="Table25.A3" office:value-type="string">
            <text:p text:style-name="P155">64 bit intermediate</text:p>
          </table:table-cell>
          <table:table-cell table:style-name="Table25.B3" office:value-type="string">
            <text:p text:style-name="P148">Covers 64 bit microprocessors.</text:p>
          </table:table-cell>
        </table:table-row>
      </table:table>
      <text:h text:style-name="Heading_20_2" text:outline-level="2"><text:bookmark-start text:name="__RefHeading___Toc15708_2478585429"/><text:bookmark-start text:name="_Toc528309169"/>Portability of hex/binary decks<text:bookmark-end text:name="__RefHeading___Toc15708_2478585429"/><text:bookmark-end text:name="_Toc528309169"/></text:h>
      <text:p text:style-name="Standard">The portability of hex/binary decks emitted by pint using the $e/<text:span text:style-name="T52">$machdeck </text:span>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30">Word size</text:p>
          </table:table-cell>
          <table:table-cell table:style-name="Table26.A1" office:value-type="string">
            <text:p text:style-name="P30">Endiam mode</text:p>
          </table:table-cell>
          <table:table-cell table:style-name="Table26.A1" office:value-type="string">
            <text:p text:style-name="P30">Description</text:p>
          </table:table-cell>
        </table:table-row>
        <table:table-row table:style-name="Table26.1">
          <table:table-cell table:style-name="Table26.A2" office:value-type="string">
            <text:p text:style-name="P154">16 bit hex/binary</text:p>
          </table:table-cell>
          <table:table-cell table:style-name="Table26.B2" office:value-type="string">
            <text:p text:style-name="P149">Little endian</text:p>
          </table:table-cell>
          <table:table-cell table:style-name="Table26.C2" office:value-type="string">
            <text:p text:style-name="P149">Covers 8 and 16 bit microprocessors.</text:p>
          </table:table-cell>
        </table:table-row>
        <table:table-row table:style-name="Table26.1">
          <table:table-cell table:style-name="Table26.A3" office:value-type="string">
            <text:p text:style-name="P154">16 bit hex/binary</text:p>
          </table:table-cell>
          <table:table-cell table:style-name="Table26.B3" office:value-type="string">
            <text:p text:style-name="P149">Big endian</text:p>
          </table:table-cell>
          <table:table-cell table:style-name="Table26.C3" office:value-type="string">
            <text:p text:style-name="P149">Covers 8 and 16 bit microprocessors.</text:p>
          </table:table-cell>
        </table:table-row>
        <table:table-row table:style-name="Table26.1">
          <table:table-cell table:style-name="Table26.A2" office:value-type="string">
            <text:p text:style-name="P154">32 bit hex/binary</text:p>
          </table:table-cell>
          <table:table-cell table:style-name="Table26.B2" office:value-type="string">
            <text:p text:style-name="P149">Little endian</text:p>
          </table:table-cell>
          <table:table-cell table:style-name="Table26.C2" office:value-type="string">
            <text:p text:style-name="P149">Covers 32 bit microprocessors.</text:p>
          </table:table-cell>
        </table:table-row>
        <table:table-row table:style-name="Table26.1">
          <table:table-cell table:style-name="Table26.A5" office:value-type="string">
            <text:p text:style-name="P154">32 bit hex/binary</text:p>
          </table:table-cell>
          <table:table-cell table:style-name="Table26.B5" office:value-type="string">
            <text:p text:style-name="P149">Big endian</text:p>
          </table:table-cell>
          <table:table-cell table:style-name="Table26.C5" office:value-type="string">
            <text:p text:style-name="P149">Covers 32 bit microprocessors.</text:p>
          </table:table-cell>
        </table:table-row>
        <table:table-row table:style-name="Table26.1">
          <table:table-cell table:style-name="Table26.A2" office:value-type="string">
            <text:p text:style-name="P154">64 bit intermediate</text:p>
          </table:table-cell>
          <table:table-cell table:style-name="Table26.B2" office:value-type="string">
            <text:p text:style-name="P149">Little endian</text:p>
          </table:table-cell>
          <table:table-cell table:style-name="Table26.C2" office:value-type="string">
            <text:p text:style-name="P149">Covers 64 bit microprocessors.</text:p>
          </table:table-cell>
        </table:table-row>
        <table:table-row table:style-name="Table26.1">
          <table:table-cell table:style-name="Table26.A7" office:value-type="string">
            <text:p text:style-name="P154">64 bit intermediate</text:p>
          </table:table-cell>
          <table:table-cell table:style-name="Table26.B7" office:value-type="string">
            <text:p text:style-name="P149">Big endian</text:p>
          </table:table-cell>
          <table:table-cell table:style-name="Table26.C7" office:value-type="string">
            <text:p text:style-name="P149">Covers 64 bit microprocessors.</text:p>
          </table:table-cell>
        </table:table-row>
      </table:table>
      <text:h text:style-name="P207" text:outline-level="1"/>
      <text:h text:style-name="P208" text:outline-level="1"><text:bookmark-start text:name="__RefHeading___Toc15742_2478585429"/><text:bookmark-start text:name="_Toc528309186"/>Building the Pascal-P6 system<text:bookmark-end text:name="__RefHeading___Toc15742_2478585429"/><text:bookmark-end text:name="_Toc528309186"/></text:h>
      <text:h text:style-name="Heading_20_2" text:outline-level="2"><text:bookmark-start text:name="__RefHeading___Toc15744_2478585429"/><text:bookmark-start text:name="_Toc528309187"/><text:bookmark-start text:name="_Toc320481279"/><text:bookmark text:name="_Toc320481119"/>Compiling and running Pascal-P6<text:bookmark-end text:name="__RefHeading___Toc15744_2478585429"/><text:bookmark-end text:name="_Toc528309187"/><text:bookmark-end text:name="_Toc320481279"/></text:h>
      <text:p text:style-name="P115">You do not need to compile Pascal-P6 unless you are using an alternative compiler or installation. The current Passcal-P6 has been compiled and run <text:span text:style-name="T53">with its own code generator, pgen.</text:span></text:p>
      <text:p text:style-name="P116">However, if you are doing development work on the compiler, you can compile Pascal-P6 by simply executing:</text:p>
      <text:p text:style-name="P116">$ <text:span text:style-name="T117">build</text:span></text:p>
      <text:p text:style-name="P116">In the main directory. This will also install the binaries in the ./bin directory.</text:p>
      <text:p text:style-name="P198">The build components are divided into make, for C and assembly level components, and build, which compiles the Pascaline components with pc. To rebuild each component from scratch you use:</text:p>
      <text:p text:style-name="P198">$ build “-B” “-r”</text:p>
      <text:p text:style-name="P198">Which passes the -B or “remake completely” option to make, and -r or “rebuild completely” option to pc.</text:p>
      <text:p text:style-name="P90"/>
      <text:h text:style-name="P205" text:outline-level="1"><text:bookmark-start text:name="__RefNumPara__19948_1293392543"/><text:bookmark-start text:name="__RefHeading___Toc15756_2478585429"/>pgen – AMD64 code generator<text:bookmark-end text:name="__RefNumPara__19948_1293392543"/><text:bookmark-end text:name="__RefHeading___Toc15756_2478585429"/></text:h>
      <text:p text:style-name="P117">pgen is the program that takes the intermediate files, *.p6, and generates an equivalent *.s assembly file that will give you a final binary.</text:p>
      <text:p text:style-name="P117">The naming convention for pgen is:</text:p>
      <text:p text:style-name="P117">pgen_&lt;c compiler&gt;_&lt;machine model&gt;</text:p>
      <text:p text:style-name="P117">Currently the C compiler is gcc. The machine model is AMD64, the 64 bit extended x86 processor model. Pgen generates assembly files that gcc can accept, and Pascal-P6 can call both C routines and Pascaline routines.</text:p>
      <text:p text:style-name="Standard"><text:bookmark-start text:name="__RefHeading___Toc15758_2478585429"/><text:span text:style-name="T54">p</text:span>gen, specifically pgen_gcc_amd64, is a code generator for 64 bit AMD/Intel CPUs. It is also dependent on gcc/gas (the GNU C compiler and GNU assembler for AMD64 cpus<text:note text:id="ftn7" text:note-class="footnote"><text:note-citation>7</text:note-citation><text:note-body><text:p text:style-name="Footnote">You may also use LLVM compiler/assembler, which is compatible.</text:p></text:note-body></text:note>). pgen is executed as:<text:bookmark-end text:name="__RefHeading___Toc15758_2478585429"/></text:p>
      <text:p text:style-name="Code"><text:bookmark-start text:name="__RefHeading___Toc15760_2478585429"/><text:span text:style-name="T43">$</text:span> pgen &lt;input file&gt; &lt;output file&gt; &lt;<text:span text:style-name="T43">options&gt;</text:span><text:bookmark-end text:name="__RefHeading___Toc15760_2478585429"/></text:p>
      <text:p text:style-name="Code"/>
      <text:p text:style-name="Standard"><text:bookmark-start text:name="__RefHeading___Toc15762_2478585429"/><text:span text:style-name="T54">p</text:span>gen translates Pascal-P6 intermediate files to gas assembly files, which are then assembled, along with C language support files, into target programs. An example run is:<text:bookmark-end text:name="__RefHeading___Toc15762_2478585429"/></text:p>
      <text:p text:style-name="P107"><text:bookmark-start text:name="__RefHeading___Toc15764_2478585429"/><text:span text:style-name="T43">$</text:span> pcom hello.pas hello.p6<text:bookmark-end text:name="__RefHeading___Toc15764_2478585429"/></text:p>
      <text:p text:style-name="P107"><text:bookmark-start text:name="__RefHeading___Toc15766_2478585429"/><text:span text:style-name="T43">$</text:span> pgen hello.p6 hello.s<text:bookmark-end text:name="__RefHeading___Toc15766_2478585429"/></text:p>
      <text:p text:style-name="P107"><text:bookmark-start text:name="__RefHeading___Toc15768_2478585429"/><text:span text:style-name="T43">$</text:span> gcc source/psystem.c source/psystem.s main.s hello.s -o hello -lm<text:bookmark-end text:name="__RefHeading___Toc15768_2478585429"/></text:p>
      <text:p text:style-name="Code"/>
      <text:p text:style-name="P199">This is much more convienently run via the pc compiler shell:</text:p>
      <text:p text:style-name="P199">$ pc hello</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he C runtime support library for Pascal-P6<text:bookmark-end text:name="__RefHeading___Toc15776_2478585429"/></text:p>
      <text:p text:style-name="Standard"><text:bookmark-start text:name="__RefHeading___Toc15778_2478585429"/>psystem.<text:span text:style-name="T54">asm</text:span><text:tab/>The assembly language runtime support library for Pascal-P6<text:bookmark-end text:name="__RefHeading___Toc15778_2478585429"/></text:p>
      <text:p text:style-name="Standard"><text:bookmark-start text:name="__RefHeading___Toc15780_2478585429"/>main.s<text:tab/><text:tab/>The startup card for Pascal-P6, defines the location of “main”.<text:bookmark-end text:name="__RefHeading___Toc15780_2478585429"/></text:p>
      <text:p text:style-name="Standard"><text:bookmark-start text:name="__RefHeading___Toc15782_2478585429"/>hello.s<text:tab/><text:tab/>The assembly code generated by pgen.<text:bookmark-end text:name="__RefHeading___Toc15782_2478585429"/></text:p>
      <text:p text:style-name="Standard"><text:bookmark-start text:name="__RefHeading___Toc15784_2478585429"/>hello<text:tab/><text:tab/>The output executable file.<text:bookmark-end text:name="__RefHeading___Toc15784_2478585429"/></text:p>
      <text:p text:style-name="Standard"><text:bookmark-start text:name="__RefHeading___Toc15786_2478585429"/>-lm<text:tab/><text:tab/>Links the C math library.<text:bookmark-end text:name="__RefHeading___Toc15786_2478585429"/></text:p>
      <text:p text:style-name="Standard"/>
      <text:p text:style-name="P90"><draw:frame draw:style-name="fr1" draw:name="Frame4" text:anchor-type="char" svg:width="4.5362in" draw:z-index="32"><draw:text-box fo:min-height="4.6744in"><text:p text:style-name="Frame_20_contents"><draw:custom-shape text:anchor-type="paragraph" draw:z-index="33" draw:name="Shape 5" draw:style-name="gr3" draw:text-style-name="P244" svg:width="1.7567in" svg:height="0.7323in" svg:x="2.1736in" svg:y="3.2957in"><text:p text:style-name="P243"><text:span text:style-name="T125">libc</text:span></text:p><draw:enhanced-geometry svg:viewBox="0 0 21600 21600" draw:type="rectangle" draw:enhanced-path="M 0 0 L 21600 0 21600 21600 0 21600 0 0 Z N"/></draw:custom-shape><draw:custom-shape text:anchor-type="paragraph" draw:z-index="34" draw:name="Shape 6" draw:style-name="gr3" draw:text-style-name="P244" svg:width="1.7567in" svg:height="0.7323in" svg:x="2.1736in" svg:y="2.5638in"><text:p text:style-name="P243"><text:span text:style-name="T125">psystem.asm</text:span></text:p><draw:enhanced-geometry svg:viewBox="0 0 21600 21600" draw:type="rectangle" draw:enhanced-path="M 0 0 L 21600 0 21600 21600 0 21600 0 0 Z N"/></draw:custom-shape><draw:custom-shape text:anchor-type="paragraph" draw:z-index="35" draw:name="Shape 7" draw:style-name="gr3" draw:text-style-name="P244" svg:width="1.7567in" svg:height="0.7323in" svg:x="2.1736in" svg:y="1.8319in"><text:p text:style-name="P243"><text:span text:style-name="T125">psystem.c</text:span></text:p><draw:enhanced-geometry svg:viewBox="0 0 21600 21600" draw:type="rectangle" draw:enhanced-path="M 0 0 L 21600 0 21600 21600 0 21600 0 0 Z N"/></draw:custom-shape><draw:custom-shape text:anchor-type="paragraph" draw:z-index="36" draw:name="Shape 8" draw:style-name="gr3" draw:text-style-name="P244" svg:width="1.7567in" svg:height="0.7323in" svg:x="2.1736in" svg:y="1.1in"><text:p text:style-name="P243"><text:span text:style-name="T125">main.s</text:span></text:p><draw:enhanced-geometry svg:viewBox="0 0 21600 21600" draw:type="rectangle" draw:enhanced-path="M 0 0 L 21600 0 21600 21600 0 21600 0 0 Z N"/></draw:custom-shape><draw:custom-shape text:anchor-type="paragraph" draw:z-index="37" draw:name="Shape 9" draw:style-name="gr3" draw:text-style-name="P244" svg:width="1.7567in" svg:height="0.7323in" svg:x="2.1736in" svg:y="0.3689in"><text:p text:style-name="P243"><text:span text:style-name="T125">Hello.s</text:span></text:p><draw:enhanced-geometry svg:viewBox="0 0 21600 21600" draw:type="rectangle" draw:enhanced-path="M 0 0 L 21600 0 21600 21600 0 21600 0 0 Z N"/></draw:custom-shape><draw:frame text:anchor-type="paragraph" draw:z-index="38" draw:name="Text Frame 8" draw:style-name="gr2" draw:text-style-name="P242" svg:width="0.7807in" svg:height="0.537in" svg:x="0.9055in" svg:y="0.8563in"><draw:text-box><text:p text:style-name="P241">pgen system</text:p></draw:text-box></draw:frame><draw:frame text:anchor-type="paragraph" draw:z-index="39" draw:name="Text Frame 13" draw:style-name="gr2" draw:text-style-name="P242" svg:width="0.7807in" svg:height="0.537in" svg:x="0.9055in" svg:y="2.6618in"><draw:text-box><text:p text:style-name="P241">gcc system</text:p></draw:text-box></draw:frame><draw:line text:anchor-type="paragraph" draw:z-index="40" draw:name="Horizontal line 5" draw:style-name="gr1" draw:text-style-name="P240" svg:x1="0.6126in" svg:y1="1.8319in" svg:x2="2.0764in" svg:y2="1.8319in"><text:p/></draw:line></text:p></draw:text-box></draw:frame><text:s/></text:p>
      <text:p text:style-name="P162">The bottom level components, psystem.c/.asm, libc, are in the gcc system of initialization, using pragmas. The top level components, main.s, and hello.s and any other pgen modules, are in the pgen system of initialization.</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text:span text:style-name="T118">is compatible with</text:span> the System V AMD64 ABI register based calling convention. In this convention the following register assignments are used:<text:bookmark-end text:name="__RefHeading___Toc15790_2478585429"/></text:p>
      <text:p text:style-name="Standard"><text:bookmark-start text:name="__RefHeading___Toc15792_2478585429"/>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P199"><text:bookmark-start text:name="__RefHeading___Toc15800_2478585429"/>The only differences between the SVSV AMD64 calling conventions to watch for with Pascal-P6 are:<text:bookmark-end text:name="__RefHeading___Toc15800_2478585429"/></text:p>
      <text:p text:style-name="P199"/>
      <text:list text:style-name="L1">
        <text:list-item>
          <text:p text:style-name="P232"><text:soft-page-break/>“wide pointers” (double register parameters) are either passed <text:span text:style-name="T119">in registers or on stack, but never divided across both. </text:span><text:span text:style-name="T120">If only one register is left and a double register argument is passed, the last register is unused (unlike SVSV AMD64 calling convention).</text:span></text:p>
        </text:list-item>
        <text:list-item>
          <text:p text:style-name="P233">Records (structures in C) are not register passed even if they fit in a register. Rather they are passed as pointers.</text:p>
        </text:list-item>
      </text:list>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44_2478585429"/>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text:soft-page-break/>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string address with a length following. If what is wanted is a zero terminated string, a simple translation can be used:</text:p>
      <text:p text:style-name="P39">void wrapmyfunction(char s[], int l)</text:p>
      <text:p text:style-name="Code"/>
      <text:p text:style-name="Code">{</text:p>
      <text:p text:style-name="Code"/>
      <text:p text:style-name="Code"><text:tab/>char buffer[100];</text:p>
      <text:p text:style-name="Code"><text:tab/>char* p;</text:p>
      <text:p text:style-name="Code"/>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Pointers an<text:span text:style-name="T120">d</text:sp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text:soft-page-break/>mymodule_myfunction</text:p>
      <text:p text:style-name="P200">Different external declarations:</text:p>
      <text:p text:style-name="P201">external<text:tab/>Just a Pascaline routine that is external to the current module. Its main use is to suppress any parameter reference checking or return value assignment. Used in header files. <text:span text:style-name="T121">Needs and external module.</text:span></text:p>
      <text:p text:style-name="P202">mexternal<text:tab/>Same as external at present. Indicates “module external”. <text:span text:style-name="T121">Needs an external module.</text:span></text:p>
      <text:p text:style-name="P202"><text:span text:style-name="T121">c</text:span>external<text:tab/>Supresses module coining of routine name. Used to directly access external C routines. <text:span text:style-name="T121">Does not need and external module.</text:span></text:p>
      <text:p text:style-name="Standard">If an external function lines up with the SVSV AMD64 calling convention (typically a C function) and <text:span text:style-name="T121">whose parameters correspond to the Pascaline parameters, it can be directly called with cexternal. For example:</text:span></text:p>
      <text:p text:style-name="P191">function getpid: integer; cexternal;</text:p>
      <text:p text:style-name="P191"/>
      <text:p text:style-name="P192">Can be called directly from Pascaline since the parameter and function returns are compatible.</text:p>
      <text:p text:style-name="P192">If the parameters or function result of an external routione don’t directly correspond to Pascaline conventions,<text:span text:style-name="T122"> an assembly language wrapper must be used.</text:span></text:p>
      <text:p text:style-name="Standard">Such a wrapper can also be used for translations as required, for example conversion to and from C “zero terminated” string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zation block, then returns to mod1, etc. Thus:</text:p>
      <text:p text:style-name="Standard">1. All “startup” blocks are executed in series before the program starts.</text:p>
      <text:p text:style-name="Standard">2. All “finalization” blocks are executed in reverse series after the program ends.</text:p>
      <text:p text:style-name="Standard">The modules should always be stacked in dependence order. That is, if mod2 uses mod1, it must appear in the sequence <text:span text:style-name="T24">after</text:span> mod1. Since the program uses both mod1 and mod2, it must appear after them both. This means that a module or program that uses another module, must not access the data for that module unless that module has had a chance to initialize itself.</text:p>
      <text:p text:style-name="Standard"><text:soft-page-break/>Non-Pascal-P6 modules <text:span text:style-name="T24">must not </text:span>be inserted in the Pascal-P6 module chain. This will cause a crash, since Pascal-P6 modules will attempt to execute the non-Pascal-P6 module in the chain. The place for non-Pascal-P6 modules is before or after the entire Pascal-P6 module chain.</text:p>
      <text:h text:style-name="Heading_20_2" text:outline-level="2"><text:bookmark-start text:name="__RefHeading___Toc30938_3822401252"/>Writing wrappers for C external calls<text:bookmark-end text:name="__RefHeading___Toc30938_3822401252"/></text:h>
      <text:p text:style-name="P118">Considering all of the factors in calling C discussed above, a sample call will illustrate what is needed to create a wrapper for calls to C. In this example, the Linux function getpid() is used, which returns an integer representing the process identifier for the current program. <text:span text:style-name="T55">The external module is declared in Pascaline as:</text:span></text:p>
      <text:p text:style-name="Code">module external_c_call;</text:p>
      <text:p text:style-name="Code"/>
      <text:p text:style-name="Code">function getpid: integer; external;</text:p>
      <text:p text:style-name="Code"/>
      <text:p text:style-name="Code">begin</text:p>
      <text:p text:style-name="Code">end.</text:p>
      <text:p text:style-name="Code"/>
      <text:p text:style-name="P121">This module is then the target of a <text:span text:style-name="reference">uses</text:span> or <text:span text:style-name="reference">joins</text:span> statement in <text:span text:style-name="T56">a Pascaline program. </text:span><text:span text:style-name="T57">This satisfies the definition of the function. The actual contents of the external module can then be created by an assembly file:</text:span></text:p>
      <text:p text:style-name="Code"><text:s text:c="8"/>.text</text:p>
      <text:p text:style-name="Code"/>
      <text:p text:style-name="Code"><text:s text:c="8"/>jmp <text:s text:c="4"/>1f <text:s text:c="9"/># skip stack sequence</text:p>
      <text:p text:style-name="Code"/>
      <text:p text:style-name="Code"><text:s text:c="8"/>.globl <text:s text:c="2"/><text:span text:style-name="T123">external_c_call</text:span>.getpid$f</text:p>
      <text:p text:style-name="Code"><text:s text:c="8"/>.type <text:s text:c="3"/><text:span text:style-name="T123">external_c_call</text:span>.getpid$f@function</text:p>
      <text:p text:style-name="Code"/>
      <text:p text:style-name="Code"><text:span text:style-name="T123">external_c_call</text:span>.getpid$f: </text:p>
      <text:p text:style-name="Code"><text:s text:c="8"/><text:span text:style-name="T123">jmp</text:span> <text:s text:c="3"/>getpid</text:p>
      <text:p text:style-name="Code">1:</text:p>
      <text:p text:style-name="Code"/>
      <text:p text:style-name="P120">The .s or .asm<text:note text:id="ftn8" text:note-class="footnote"><text:note-citation>8</text:note-citation><text:note-body><text:p text:style-name="P119">The .asm extension is used to make sure that the file is not overwritten <text:span text:style-name="T93">or erased by cleanup processes</text:span>.</text:p></text:note-body></text:note> file for this is then substituted in the final link phase for the .s from the Pascaline compile.</text:p>
      <text:p text:style-name="P120">There are several features of this file that should be explained:</text:p>
      <text:list text:style-name="L2">
        <text:list-item>
          <text:p text:style-name="P234">The assembly file starts with a jump over the body of the code. This satisfies the module stacking requirement.</text:p>
        </text:list-item>
        <text:list-item>
          <text:p text:style-name="P234">The Pascaline symbol for the function is <text:span text:style-name="T123">external_c_call</text:span>.getpid$f, which is coined by the module name, <text:span text:style-name="T123">extrernal_c_call</text:span>, and has a type function, $f. The C name for the function is getpid. <text:span text:style-name="T93">Symbol types are discussed in </text:span><text:span text:style-name="T93"><text:bookmark-ref text:reference-format="number" text:ref-name="__RefHeading___Toc15928_2478585429">16.2.11</text:bookmark-ref></text:span><text:span text:style-name="T93"><text:s/>“</text:span><text:span text:style-name="T93"><text:bookmark-ref text:reference-format="text" text:ref-name="__RefHeading___Toc15928_2478585429">Symbols</text:bookmark-ref></text:span><text:span text:style-name="T93">”.</text:span></text:p>
        </text:list-item>
      </text:list>
      <text:h text:style-name="Heading_20_2" text:outline-level="2"><text:bookmark-start text:name="__RefHeading___Toc30940_3822401252"/>Debugging Pascaline assembly code<text:bookmark-end text:name="__RefHeading___Toc30940_3822401252"/></text:h>
      <text:p text:style-name="P101">Using gdb, gdbtui (the assembly language version of gdb), <text:span text:style-name="T123">or lldb</text:span> you can easily debug Pascal-P6 assembly language files. <text:span text:style-name="T123">A</text:span><text:span text:style-name="T44">ll of the lines of the Pascal-P6 source code and the intermediate code is included into the assembly .s source files as comments of the form:</text:span></text:p>
      <text:p text:style-name="P102"><text:soft-page-break/># comment</text:p>
      <text:p text:style-name="P102">pgen also places running commentary for both the intermediate code and the generated assembly code in the file. The intermediate code contains line markers of the form:</text:p>
      <text:p text:style-name="P102">:&lt;line number&gt;</text:p>
      <text:p text:style-name="P102">That show where the original source lines were parsed during intermediate generation.</text:p>
      <text:p text:style-name="P102">The assembly generated symbols in the file are of the form:</text:p>
      <text:p text:style-name="P102">&lt;module&gt;.&lt;routine&gt;.&lt;variable&gt;</text:p>
      <text:p text:style-name="P102">The module name is the same as the file name in most cases. The routine name(s) can be nested to any level, and then this is followed by the variable name. <text:span text:style-name="T45">Pascal-P6 does not need label names to do its work. Instead, labels are generated as “compiler labels”, which are a series of numbered labels in the file of the form:</text:span></text:p>
      <text:p text:style-name="P102">&lt;<text:span text:style-name="T45">module&gt;.&lt;number&gt;</text:span></text:p>
      <text:p text:style-name="P103">The only case where the compiler must use named labels is to link to other modules.</text:p>
      <text:p text:style-name="P103">Where possible, pgen replaces the compiler numeric labels with the original symbolic labels of the program.</text:p>
      <text:h text:style-name="Heading_20_2" text:outline-level="2"><text:bookmark-start text:name="__RefHeading___Toc30942_3822401252"/>Overloads<text:bookmark-end text:name="__RefHeading___Toc30942_3822401252"/></text:h>
      <text:p text:style-name="P103">pgen accounts for overloaded routines. Each overload is counted in the order of encounter, and also by type. The type is output with “type spaghetti” of the form:</text:p>
      <text:p text:style-name="P103">&lt;routine name&gt;$f_i</text:p>
      <text:p text:style-name="P104">In this case it is a function (“f”) with a single integer argument (“I”). <text:span text:style-name="T93">This is covered in </text:span><text:span text:style-name="T93"><text:bookmark-ref text:reference-format="number" text:ref-name="__RefHeading___Toc15928_2478585429">16.2.11</text:bookmark-ref></text:span><text:span text:style-name="T93"><text:s/>“</text:span><text:span text:style-name="T93"><text:bookmark-ref text:reference-format="text" text:ref-name="__RefHeading___Toc15928_2478585429">Symbols</text:bookmark-ref></text:span><text:span text:style-name="T93">”. </text:span>The enumerated routines appear as:</text:p>
      <text:p text:style-name="P103">&lt;routine name&gt;$1</text:p>
      <text:p text:style-name="P103">&lt;routine name&gt;$2</text:p>
      <text:p text:style-name="P103">…</text:p>
      <text:p text:style-name="P103">The instance #1 of the outine is also output in shorthand as the “prime” instance of the overload, so just:</text:p>
      <text:p text:style-name="P103">&lt;routine name&gt;</text:p>
      <text:p text:style-name="P103">Can be used to refer to the routine.</text:p>
      <text:p text:style-name="P105">A debug example</text:p>
      <text:p text:style-name="P105">For the Pascal source:</text:p>
      <text:p text:style-name="Code">program test(output);</text:p>
      <text:p text:style-name="Code"/>
      <text:p text:style-name="Code">begin</text:p>
      <text:p text:style-name="Code"/>
      <text:p text:style-name="Code"><text:s text:c="4"/>writeln('Hello, world')</text:p>
      <text:p text:style-name="Code"><text:soft-page-break/></text:p>
      <text:p text:style-name="Code">end.</text:p>
      <text:p text:style-name="Code"/>
      <text:p text:style-name="P105">An abbreviated .s file for this is:</text:p>
      <text:p text:style-name="P93"># <text:s text:c="5"/>0: <text:s text:c="5"/>1: <text:s/>!</text:p>
      <text:p text:style-name="P93"># <text:s text:c="5"/>0: <text:s text:c="5"/>2: <text:s/>! Pascal intermediate file Generated by P6 Pascal compiler vs. 0.2</text:p>
      <text:p text:style-name="P93"># <text:s text:c="5"/>0: <text:s text:c="5"/>3: <text:s/>!</text:p>
      <text:p text:style-name="P93"># <text:s text:c="5"/>0: <text:s text:c="5"/>4: <text:s/>o prtlab</text:p>
      <text:p text:style-name="P93"># <text:s text:c="5"/>0: <text:s text:c="5"/>5: <text:s/>! program test(output);</text:p>
      <text:p text:style-name="P93"># <text:s text:c="5"/>1: <text:s text:c="5"/>6: <text:s/>:1</text:p>
      <text:p text:style-name="P93"># <text:s text:c="5"/>1: <text:s text:c="5"/>7: <text:s/>!</text:p>
      <text:p text:style-name="P93"># <text:s text:c="5"/>1: <text:s text:c="5"/>8: <text:s/>! Program test</text:p>
      <text:p text:style-name="P93"># <text:s text:c="5"/>1: <text:s text:c="5"/>9: <text:s/>!</text:p>
      <text:p text:style-name="P93"><text:s text:c="8"/>.globl <text:s/>main</text:p>
      <text:p text:style-name="P93"><text:s text:c="8"/>.type <text:s text:c="2"/>main, @function</text:p>
      <text:p text:style-name="P93">main:</text:p>
      <text:p text:style-name="P93"># Align stack</text:p>
      <text:p text:style-name="P93"><text:s text:c="8"/>pushq <text:s text:c="2"/>%rax</text:p>
      <text:p text:style-name="P93"># Set up default files</text:p>
      <text:p text:style-name="P93"><text:s text:c="8"/>movb <text:s text:c="3"/>$inputfn,globals_start+inputoff(%rip)</text:p>
      <text:p text:style-name="P93"><text:s text:c="8"/>movb <text:s text:c="3"/>$outputfn,globals_start+outputoff(%rip)</text:p>
      <text:p text:style-name="P93"><text:s text:c="8"/>movb <text:s text:c="3"/>$prdfn,globals_start+prdoff(%rip)</text:p>
      <text:p text:style-name="P93"><text:s text:c="8"/>movb <text:s text:c="3"/>$prrfn,globals_start+prroff(%rip)</text:p>
      <text:p text:style-name="P93"><text:s text:c="8"/>movb <text:s text:c="3"/>$errorfn,globals_start+erroroff(%rip)</text:p>
      <text:p text:style-name="P93"><text:s text:c="8"/>movb <text:s text:c="3"/>$listfn,globals_start+listoff(%rip)</text:p>
      <text:p text:style-name="P93"><text:s text:c="8"/>movb <text:s text:c="3"/>$commandfn,globals_start+commandoff(%rip)</text:p>
      <text:p text:style-name="P93"><text:s text:c="8"/>call <text:s text:c="3"/>1f</text:p>
      <text:p text:style-name="P93"><text:s text:c="8"/>popq <text:s text:c="3"/>%rax</text:p>
      <text:p text:style-name="P93"><text:s text:c="8"/>sub <text:s text:c="4"/>%rax,%rax</text:p>
      <text:p text:style-name="P93"><text:s text:c="8"/>ret</text:p>
      <text:p text:style-name="P93">1:</text:p>
      <text:p text:style-name="P93"># <text:s text:c="5"/>1: <text:s text:c="4"/>10: <text:s/>b p test</text:p>
      <text:p text:style-name="P93">test:</text:p>
      <text:p text:style-name="P93"># <text:s text:c="5"/>1: <text:s text:c="4"/>11: 245: sfr <text:s text:c="4"/>l test.6 <text:s text:c="15"/>! Set function result</text:p>
      <text:p text:style-name="P93"># <text:s text:c="5"/>1: <text:s text:c="4"/>12: <text:s/>l test.6=0</text:p>
      <text:p text:style-name="P93">test.6 = 0</text:p>
      <text:p text:style-name="P93"># <text:s text:c="5"/>1: <text:s text:c="4"/>13: <text:s/>12: cup <text:s text:c="4"/>l test.3 0 <text:s text:c="13"/>! Call user procedure</text:p>
      <text:p text:style-name="P93"># assigning: <text:s text:c="6"/>1: <text:s text:c="4"/>13: <text:s/>12: cup <text:s/>0 rs: [] ~rf: []</text:p>
      <text:p text:style-name="P93"># assigning~: <text:s text:c="5"/>1: <text:s text:c="4"/>13: <text:s/>12: cup <text:s/>0 rs: [] ~rf: []</text:p>
      <text:p text:style-name="P93"># <text:s text:c="3"/>expr:</text:p>
      <text:p text:style-name="P93"># <text:s text:c="6"/>1: <text:s text:c="4"/>13: <text:s/>12: cup <text:s/>0 rs: []</text:p>
      <text:p text:style-name="P93"># <text:s/>call start:</text:p>
      <text:p text:style-name="P93"># <text:s text:c="6"/>1: <text:s text:c="4"/>11: 245: sfr <text:s/>0 rs: []</text:p>
      <text:p text:style-name="P93"># generating: <text:s text:c="6"/>1: <text:s text:c="4"/>13: <text:s/>12: cup <text:s/>0 rs: []</text:p>
      <text:p text:style-name="P93"># generating: <text:s text:c="6"/>1: <text:s text:c="4"/>11: 245: sfr <text:s/>0 rs: []</text:p>
      <text:p text:style-name="P93"><text:s text:c="8"/>subq <text:s text:c="3"/>$test.6,%rsp <text:s text:c="11"/># allocate function result on stack</text:p>
      <text:p text:style-name="P93"># generating~: <text:s text:c="5"/>1: <text:s text:c="4"/>11: 245: sfr <text:s/>0 rs: []</text:p>
      <text:p text:style-name="P93"><text:s text:c="8"/>call <text:s text:c="3"/>test.3 <text:s text:c="17"/># call user procedure</text:p>
      <text:p text:style-name="P93"># generating~: <text:s text:c="5"/>1: <text:s text:c="4"/>13: <text:s/>12: cup <text:s/>0 rs: []</text:p>
      <text:p text:style-name="P93"># <text:s text:c="5"/>1: <text:s text:c="4"/>14: <text:s/>22: ret <text:s text:c="28"/>! Return code strip</text:p>
      <text:p text:style-name="P93"><text:s text:c="8"/>ret <text:s text:c="4"/></text:p>
      <text:p text:style-name="P93"># <text:s text:c="5"/>1: <text:s text:c="4"/>15: <text:s/>!</text:p>
      <text:p text:style-name="P93"># <text:s text:c="5"/>1: <text:s text:c="4"/>16: <text:s/>! begin</text:p>
      <text:p text:style-name="P93"># <text:s text:c="5"/>1: <text:s text:c="4"/>17: <text:s/>!</text:p>
      <text:p text:style-name="P93"># <text:s text:c="5"/>1: <text:s text:c="4"/>18: <text:s/>l test.3</text:p>
      <text:p text:style-name="P93">test.3:</text:p>
      <text:p text:style-name="P93"># <text:s text:c="5"/>2: <text:s text:c="4"/>19: <text:s/>:2</text:p>
      <text:p text:style-name="P93"># <text:s text:c="5"/>3: <text:s text:c="4"/>20: <text:s/>:3</text:p>
      <text:p text:style-name="P93"># <text:s text:c="5"/>3: <text:s text:c="4"/>21: <text:s/>:3</text:p>
      <text:p text:style-name="P93"># <text:s text:c="5"/>3: <text:s text:c="4"/>22: <text:s/>11: mst <text:s text:c="4"/>0 l test.7 l test.8 <text:s text:c="4"/>! Mark(frame) stack</text:p>
      <text:p text:style-name="P93"># generating: <text:s/>11: mst <text:s text:c="6"/></text:p>
      <text:p text:style-name="P93"><text:s text:c="8"/>pushq <text:s text:c="2"/>$0 <text:s text:c="21"/># place current ep</text:p>
      <text:p text:style-name="P93"><text:s text:c="8"/>pushq <text:s text:c="2"/>$0 <text:s text:c="21"/># place bottom of stack</text:p>
      <text:p text:style-name="P93"><text:s text:c="8"/>pushq <text:s text:c="2"/>$0 <text:s text:c="21"/># place previous ep</text:p>
      <text:p text:style-name="P93"><text:s text:c="8"/>enterq <text:s/>$0,$1 <text:s text:c="18"/># enter frame</text:p>
      <text:p text:style-name="P93"><text:s text:c="8"/>movq <text:s text:c="3"/>%rsp,%rax <text:s text:c="14"/># copy sp</text:p>
      <text:p text:style-name="P93"><text:s text:c="8"/>subq <text:s text:c="3"/>$test.7+test$_tmpspc,%rax # find sp-locals</text:p>
      <text:p text:style-name="P93">1: <text:s text:c="13"/></text:p>
      <text:p text:style-name="P93"><text:soft-page-break/><text:s text:c="8"/>cmpq <text:s text:c="3"/>%rax,%rsp <text:s text:c="14"/># check have reached stack</text:p>
      <text:p text:style-name="P93"><text:s text:c="8"/>je <text:s text:c="5"/>2f <text:s text:c="21"/># skip if so</text:p>
      <text:p text:style-name="P93"><text:s text:c="8"/>pushq <text:s text:c="2"/>$0 <text:s text:c="21"/># push 0 word for locals</text:p>
      <text:p text:style-name="P93"><text:s text:c="8"/>jmp <text:s text:c="4"/>1b <text:s text:c="21"/># loop</text:p>
      <text:p text:style-name="P93">2: <text:s text:c="13"/></text:p>
      <text:p text:style-name="P93"><text:s text:c="8"/>movq <text:s text:c="3"/>%rsp,16(%rbp) <text:s text:c="10"/># set bottom of stack</text:p>
      <text:p text:style-name="P93"><text:s text:c="8"/>andq <text:s text:c="3"/>$0xfffffffffffffff0,%rsp # align stack</text:p>
      <text:p text:style-name="P93"><text:s text:c="8"/>pushq <text:s text:c="2"/>%rbx <text:s text:c="19"/># save protected registers and keep aligned</text:p>
      <text:p text:style-name="P93"><text:s text:c="8"/>pushq <text:s text:c="2"/>%r12 <text:s text:c="57"/></text:p>
      <text:p text:style-name="P93"><text:s text:c="8"/>pushq <text:s text:c="2"/>%r13 <text:s text:c="57"/></text:p>
      <text:p text:style-name="P93"><text:s text:c="8"/>pushq <text:s text:c="2"/>%r14 <text:s text:c="57"/></text:p>
      <text:p text:style-name="P93"><text:s text:c="8"/>pushq <text:s text:c="2"/>%r15 <text:s text:c="57"/></text:p>
      <text:p text:style-name="P93"><text:s text:c="8"/>pushq <text:s text:c="2"/>%r15 <text:s text:c="19"/># second push aligns</text:p>
      <text:p text:style-name="P93"># <text:s text:c="5"/>3: <text:s text:c="4"/>23: <text:s/>! <text:s text:c="4"/>writeln('Hello, world')</text:p>
      <text:p text:style-name="P93"># <text:s text:c="5"/>4: <text:s text:c="4"/>24: <text:s/>:4</text:p>
      <text:p text:style-name="P93"># <text:s text:c="5"/>5: <text:s text:c="4"/>25: <text:s/>:5</text:p>
      <text:p text:style-name="P93"># <text:s text:c="5"/>5: <text:s text:c="4"/>27: <text:s/>!</text:p>
      <text:p text:style-name="P93"># <text:s text:c="5"/>5: <text:s text:c="4"/>28: <text:s/>56: lca <text:s text:c="4"/>12 "Hello, world" <text:s text:c="6"/>! Load constant string address</text:p>
      <text:p text:style-name="P93"># <text:s text:c="5"/>5: <text:s text:c="4"/>29: <text:s text:c="2"/>5: lao <text:s text:c="4"/>2 <text:s text:c="22"/>! Load global address</text:p>
      <text:p text:style-name="P93"># <text:s text:c="5"/>5: <text:s text:c="4"/>30: 118: swp <text:s text:c="4"/>8 <text:s text:c="22"/>! Swap tos with sos</text:p>
      <text:p text:style-name="P93"># <text:s text:c="5"/>5: <text:s text:c="4"/>31: 123: ldci <text:s text:c="3"/>12 <text:s text:c="21"/>! Load constant(t)</text:p>
      <text:p text:style-name="P93"># <text:s text:c="5"/>5: <text:s text:c="4"/>32: 118: swp <text:s text:c="4"/>8 <text:s text:c="22"/>! Swap tos with sos</text:p>
      <text:p text:style-name="P93"># <text:s text:c="5"/>5: <text:s text:c="4"/>33: 123: ldci <text:s text:c="3"/>12 <text:s text:c="21"/>! Load constant(t)</text:p>
      <text:p text:style-name="P93"># <text:s text:c="5"/>5: <text:s text:c="4"/>34: <text:s/>15: csp <text:s text:c="4"/>wrs <text:s text:c="20"/>! Call system procedure/function: Write string to text file</text:p>
      <text:p text:style-name="P93"># assigning: <text:s text:c="6"/>5: <text:s text:c="4"/>34: <text:s/>15: csp <text:s/>6: wrs <text:s/>rs: [] ~rf: []</text:p>
      <text:p text:style-name="P93"># assigning: <text:s text:c="6"/>5: <text:s text:c="4"/>29: <text:s text:c="2"/>5: lao <text:s/>2 dr1: rdi rs: [] ~rf: [rdi]</text:p>
      <text:p text:style-name="P93"># assigning~: <text:s text:c="5"/>5: <text:s text:c="4"/>29: <text:s text:c="2"/>5: lao <text:s/>2 r1: rdi rs: [] ~rf: [rdi]</text:p>
      <text:p text:style-name="P93"># assigning: <text:s text:c="6"/>5: <text:s text:c="4"/>31: 123: ldci 12 dr1: rsi rs: [] ~rf: [rsi, rdi]</text:p>
      <text:p text:style-name="P93"># assigning~: <text:s text:c="5"/>5: <text:s text:c="4"/>31: 123: ldci 12 r1: rsi rs: [] ~rf: [rsi, rdi]</text:p>
      <text:p text:style-name="P93"># assigning: <text:s text:c="6"/>5: <text:s text:c="4"/>28: <text:s/>56: lca <text:s/>0 dr1: rdx rs: [] ~rf: [rdx, rsi, rdi]</text:p>
      <text:p text:style-name="P93"># assigning~: <text:s text:c="5"/>5: <text:s text:c="4"/>28: <text:s/>56: lca <text:s/>0 r1: rdx rs: [] ~rf: [rdx, rsi, rdi]</text:p>
      <text:p text:style-name="P93"># assigning: <text:s text:c="6"/>5: <text:s text:c="4"/>33: 123: ldci 12 dr1: rcx rs: [] ~rf: [rcx, rdx, rsi, rdi]</text:p>
      <text:p text:style-name="P93"># assigning~: <text:s text:c="5"/>5: <text:s text:c="4"/>33: 123: ldci 12 r1: rcx rs: [] ~rf: [rcx, rdx, rsi, rdi]</text:p>
      <text:p text:style-name="P93"># assigning~: <text:s text:c="5"/>5: <text:s text:c="4"/>34: <text:s/>15: csp <text:s/>6: wrs <text:s/>rs: [] ~rf: [rcx, rdx, rsi, rdi]</text:p>
      <text:p text:style-name="P93"># <text:s text:c="3"/>expr:</text:p>
      <text:p text:style-name="P93"># <text:s text:c="6"/>5: <text:s text:c="4"/>34: <text:s/>15: csp <text:s/>6: wrs <text:s/>rs: []</text:p>
      <text:p text:style-name="P93"># <text:s/>Parameter:</text:p>
      <text:p text:style-name="P93"># <text:s text:c="6"/>5: <text:s text:c="4"/>29: <text:s text:c="2"/>5: lao <text:s/>2 r1: rdi rs: []</text:p>
      <text:p text:style-name="P93"># <text:s/>Parameter:</text:p>
      <text:p text:style-name="P93"># <text:s text:c="6"/>5: <text:s text:c="4"/>31: 123: ldci 12 r1: rsi rs: []</text:p>
      <text:p text:style-name="P93"># <text:s/>Parameter:</text:p>
      <text:p text:style-name="P93"># <text:s text:c="6"/>5: <text:s text:c="4"/>28: <text:s/>56: lca <text:s/>0 r1: rdx rs: []</text:p>
      <text:p text:style-name="P93"># <text:s/>Parameter:</text:p>
      <text:p text:style-name="P93"># <text:s text:c="6"/>5: <text:s text:c="4"/>33: 123: ldci 12 r1: rcx rs: []</text:p>
      <text:p text:style-name="P93"># generating: <text:s text:c="6"/>5: <text:s text:c="4"/>34: <text:s/>15: csp <text:s/>6: wrs <text:s/>rs: []</text:p>
      <text:p text:style-name="P93"># generating: <text:s text:c="6"/>5: <text:s text:c="4"/>29: <text:s text:c="2"/>5: lao <text:s/>2 r1: rdi rs: []</text:p>
      <text:p text:style-name="P93"><text:s text:c="8"/>leaq <text:s text:c="3"/>globals_start+2(%rip),%rdi # load address of global</text:p>
      <text:p text:style-name="P93"># generating~: <text:s text:c="5"/>5: <text:s text:c="4"/>29: <text:s text:c="2"/>5: lao <text:s/>2 r1: rdi rs: []</text:p>
      <text:p text:style-name="P93"># generating: <text:s text:c="6"/>5: <text:s text:c="4"/>31: 123: ldci 12 r1: rsi rs: []</text:p>
      <text:p text:style-name="P93"><text:s text:c="8"/>movq <text:s text:c="3"/>$12,%rsi <text:s text:c="15"/># load quad constant</text:p>
      <text:p text:style-name="P93"># generating~: <text:s text:c="5"/>5: <text:s text:c="4"/>31: 123: ldci 12 r1: rsi rs: []</text:p>
      <text:p text:style-name="P93"># generating: <text:s text:c="6"/>5: <text:s text:c="4"/>28: <text:s/>56: lca <text:s/>0 r1: rdx rs: []</text:p>
      <text:p text:style-name="P93"><text:s text:c="8"/>leaq <text:s text:c="3"/>string1(%rip),%rdx <text:s text:c="5"/># load string constant address</text:p>
      <text:p text:style-name="P93"># generating~: <text:s text:c="5"/>5: <text:s text:c="4"/>28: <text:s/>56: lca <text:s/>0 r1: rdx rs: []</text:p>
      <text:p text:style-name="P93"># generating: <text:s text:c="6"/>5: <text:s text:c="4"/>33: 123: ldci 12 r1: rcx rs: []</text:p>
      <text:p text:style-name="P93"><text:s text:c="8"/>movq <text:s text:c="3"/>$12,%rcx <text:s text:c="15"/># load quad constant</text:p>
      <text:p text:style-name="P93"># generating~: <text:s text:c="5"/>5: <text:s text:c="4"/>33: 123: ldci 12 r1: rcx rs: []</text:p>
      <text:p text:style-name="P93"><text:s text:c="8"/>call <text:s text:c="3"/>psystem_wrs <text:s text:c="12"/># call system procedure/function</text:p>
      <text:p text:style-name="P93"># generating~: <text:s text:c="5"/>5: <text:s text:c="4"/>34: <text:s/>15: csp <text:s/>6: wrs <text:s/>rs: []</text:p>
      <text:p text:style-name="P93"># <text:s text:c="5"/>5: <text:s text:c="4"/>35: <text:s/>! end.</text:p>
      <text:p text:style-name="P93"># <text:s text:c="5"/>5: <text:s text:c="4"/>36: <text:s/>15: csp <text:s text:c="4"/>wln <text:s text:c="20"/>! Call system procedure/function: Write next line to text file</text:p>
      <text:p text:style-name="P93"># assigning: <text:s text:c="6"/>5: <text:s text:c="4"/>36: <text:s/>15: csp <text:s/>5: wln <text:s/>rs: [] ~rf: []</text:p>
      <text:p text:style-name="P93"># assigning: <text:s text:c="6"/>5: <text:s text:c="4"/>29: <text:s text:c="2"/>5: lao <text:s/>2 dr1: rdi rs: [] ~rf: [rdi]</text:p>
      <text:p text:style-name="P93"># assigning~: <text:s text:c="5"/>5: <text:s text:c="4"/>29: <text:s text:c="2"/>5: lao <text:s/>2 r1: rdi rs: [] ~rf: [rdi]</text:p>
      <text:p text:style-name="P93"># assigning~: <text:s text:c="5"/>5: <text:s text:c="4"/>36: <text:s/>15: csp <text:s/>5: wln <text:s/>rs: [] ~rf: [rdi]</text:p>
      <text:p text:style-name="P93"># <text:s text:c="3"/>expr:</text:p>
      <text:p text:style-name="P93"># <text:s text:c="6"/>5: <text:s text:c="4"/>36: <text:s/>15: csp <text:s/>5: wln <text:s/>rs: []</text:p>
      <text:p text:style-name="P93"># <text:s/>Parameter:</text:p>
      <text:p text:style-name="P93"># <text:s text:c="6"/>5: <text:s text:c="4"/>29: <text:s text:c="2"/>5: lao <text:s/>2 r1: rdi rs: []</text:p>
      <text:p text:style-name="P93"><text:soft-page-break/># generating: <text:s text:c="6"/>5: <text:s text:c="4"/>36: <text:s/>15: csp <text:s/>5: wln <text:s/>rs: []</text:p>
      <text:p text:style-name="P93"># generating: <text:s text:c="6"/>5: <text:s text:c="4"/>29: <text:s text:c="2"/>5: lao <text:s/>2 r1: rdi rs: []</text:p>
      <text:p text:style-name="P93"><text:s text:c="8"/>leaq <text:s text:c="3"/>globals_start+2(%rip),%rdi # load address of global</text:p>
      <text:p text:style-name="P93"># generating~: <text:s text:c="5"/>5: <text:s text:c="4"/>29: <text:s text:c="2"/>5: lao <text:s/>2 r1: rdi rs: []</text:p>
      <text:p text:style-name="P93"><text:s text:c="8"/>call <text:s text:c="3"/>psystem_wln <text:s text:c="12"/># call system procedure/function</text:p>
      <text:p text:style-name="P93"># generating~: <text:s text:c="5"/>5: <text:s text:c="4"/>36: <text:s/>15: csp <text:s/>5: wln <text:s/>rs: []</text:p>
      <text:p text:style-name="P93"># <text:s text:c="5"/>5: <text:s text:c="4"/>37: 117: dmp <text:s text:c="4"/>8 <text:s text:c="22"/>! Dump tos</text:p>
      <text:p text:style-name="P93"># <text:s text:c="5"/>6: <text:s text:c="4"/>38: <text:s/>:6</text:p>
      <text:p text:style-name="P93"># <text:s text:c="5"/>7: <text:s text:c="4"/>39: <text:s/>:7</text:p>
      <text:p text:style-name="P93"># <text:s text:c="5"/>7: <text:s text:c="4"/>40: <text:s/>!</text:p>
      <text:p text:style-name="P93"># <text:s text:c="5"/>7: <text:s text:c="4"/>41: <text:s/>14: retp <text:s text:c="3"/>0 <text:s text:c="22"/>! Return from procedure/function(t)</text:p>
      <text:p text:style-name="P93"># generating: <text:s/>14: retp <text:s text:c="5"/></text:p>
      <text:p text:style-name="P93"><text:s text:c="8"/>popq <text:s text:c="3"/>%r15 <text:s text:c="19"/># undo alignment push</text:p>
      <text:p text:style-name="P93"><text:s text:c="8"/>popq <text:s text:c="3"/>%r15 <text:s text:c="19"/># restore protected registers</text:p>
      <text:p text:style-name="P93"><text:s text:c="8"/>popq <text:s text:c="3"/>%r14 <text:s text:c="58"/></text:p>
      <text:p text:style-name="P93"><text:s text:c="8"/>popq <text:s text:c="3"/>%r13 <text:s text:c="58"/></text:p>
      <text:p text:style-name="P93"><text:s text:c="8"/>popq <text:s text:c="3"/>%r12 <text:s text:c="58"/></text:p>
      <text:p text:style-name="P93"><text:s text:c="8"/>popq <text:s text:c="3"/>%rbx <text:s text:c="58"/></text:p>
      <text:p text:style-name="P93"><text:s text:c="8"/>leave <text:s text:c="26"/># undo frame</text:p>
      <text:p text:style-name="P93"><text:s text:c="8"/>addq <text:s text:c="3"/>$24,%rsp <text:s text:c="15"/># remove frame data</text:p>
      <text:p text:style-name="P93"><text:s text:c="8"/>popq <text:s text:c="3"/>%rax <text:s text:c="19"/># get return address</text:p>
      <text:p text:style-name="P93"><text:s text:c="8"/>addq <text:s text:c="3"/>$0,%rsp <text:s text:c="16"/># remove caller parameters</text:p>
      <text:p text:style-name="P93"><text:s text:c="8"/>pushq <text:s text:c="2"/>%rax <text:s text:c="19"/># replace return address</text:p>
      <text:p text:style-name="P93"><text:s text:c="8"/>ret <text:s text:c="28"/># return to caller</text:p>
      <text:p text:style-name="P105"/>
      <text:p text:style-name="P105">Executing debug on this file:</text:p>
      <text:p text:style-name="P105">$ gdb<text:span text:style-name="T47">tui</text:span> ./test</text:p>
      <text:p text:style-name="P105">(gdb) b main</text:p>
      <text:p text:style-name="P105">Breakpoint 1 at 0x7cfe: file test.s, line 188.</text:p>
      <text:p text:style-name="P105">(gdb) r</text:p>
      <text:p text:style-name="P105">Starting program: /home/samiam/projects/pascal/pascal-p6/test</text:p>
      <text:p text:style-name="P105">Breakpoint 1, main () at test.s:188</text:p>
      <text:p text:style-name="P105">(gdb) </text:p>
      <text:p text:style-name="P93">│ <text:s text:c="2"/>186 <text:s text:c="8"/>main: <text:s text:c="112"/>│</text:p>
      <text:p text:style-name="P93">│ <text:s text:c="2"/>187 <text:s text:c="8"/># Align stack</text:p>
      <text:p text:style-name="P93">B+&gt;188 <text:s text:c="16"/>pushq <text:s text:c="2"/>%rax <text:s text:c="97"/>│</text:p>
      <text:p text:style-name="P93">│ <text:s text:c="2"/>189 <text:s text:c="8"/># Set up default files <text:s text:c="95"/>│</text:p>
      <text:p text:style-name="P93">│ <text:s text:c="2"/>190 <text:s text:c="16"/>movb <text:s text:c="3"/>$inputfn,globals_start+inputoff(%rip) <text:s text:c="64"/>│</text:p>
      <text:p text:style-name="P93">│ <text:s text:c="2"/>191 <text:s text:c="16"/>movb <text:s text:c="3"/>$outputfn,globals_start+outputoff(%rip) <text:s text:c="62"/>│</text:p>
      <text:p text:style-name="P93">│ <text:s text:c="2"/>192 <text:s text:c="16"/>movb <text:s text:c="3"/>$prdfn,globals_start+prdoff(%rip) <text:s text:c="68"/>│</text:p>
      <text:p text:style-name="P93">│ <text:s text:c="2"/>193 <text:s text:c="16"/>movb <text:s text:c="3"/>$prrfn,globals_start+prroff(%rip) <text:s text:c="68"/>│</text:p>
      <text:p text:style-name="P93">│ <text:s text:c="2"/>194 <text:s text:c="16"/>movb <text:s text:c="3"/>$errorfn,globals_start+erroroff(%rip) <text:s text:c="64"/>│</text:p>
      <text:p text:style-name="P93">│ <text:s text:c="2"/>195 <text:s text:c="16"/>movb <text:s text:c="3"/>$listfn,globals_start+listoff(%rip) <text:s text:c="66"/>│</text:p>
      <text:p text:style-name="P93">│ <text:s text:c="2"/>196 <text:s text:c="16"/>movb <text:s text:c="3"/>$commandfn,globals_start+commandoff(%rip) <text:s text:c="60"/>│</text:p>
      <text:p text:style-name="P93">│ <text:s text:c="2"/>197 <text:s text:c="16"/>call <text:s text:c="3"/>1f <text:s text:c="99"/>│</text:p>
      <text:p text:style-name="P93"><text:soft-page-break/>│ <text:s text:c="2"/>198 <text:s text:c="16"/>popq <text:s text:c="3"/>%rax <text:s text:c="97"/>│</text:p>
      <text:p text:style-name="P93">│ <text:s text:c="2"/>199 <text:s text:c="16"/>sub <text:s text:c="4"/>%rax,%rax <text:s text:c="92"/>│</text:p>
      <text:p text:style-name="P93">│ <text:s text:c="2"/>200 <text:s text:c="16"/>ret <text:s text:c="106"/>│</text:p>
      <text:p text:style-name="P93">│ <text:s text:c="2"/>201 <text:s text:c="8"/>1: <text:s text:c="115"/>│</text:p>
      <text:p text:style-name="P93">│ <text:s text:c="2"/>202 <text:s text:c="8"/># <text:s text:c="5"/>1: <text:s text:c="4"/>10: <text:s/>b p test <text:s text:c="90"/>│</text:p>
      <text:p text:style-name="P93">│ <text:s text:c="2"/>203 <text:s text:c="8"/>test: <text:s text:c="112"/>│</text:p>
      <text:p text:style-name="P93">│ <text:s text:c="2"/>204 <text:s text:c="8"/># <text:s text:c="5"/>1: <text:s text:c="4"/>11: 245: sfr <text:s text:c="4"/>l test.6 <text:s text:c="15"/>! Set function result <text:s text:c="41"/>│</text:p>
      <text:p text:style-name="P93">│ <text:s text:c="2"/>205 <text:s text:c="8"/># <text:s text:c="5"/>1: <text:s text:c="4"/>12: <text:s/>l test.6=0 <text:s text:c="88"/>│</text:p>
      <text:p text:style-name="P93">│ <text:s text:c="2"/>206 <text:s text:c="8"/>test.6 = 0 <text:s text:c="107"/>│</text:p>
      <text:p text:style-name="Code"><text:span text:style-name="T46">│ <text:s text:c="2"/>207 <text:s text:c="8"/># <text:s text:c="5"/>1: <text:s text:c="4"/>13: <text:s/>12: cup <text:s text:c="4"/>l test.3 0 <text:s text:c="13"/>! Call user procedure <text:s text:c="6"/></text:span><text:s/></text:p>
      <text:p text:style-name="P105"/>
      <text:p text:style-name="P106">Here we broke out of the code at main, the start of the program. The line numbers on the left for the .s file can be used as breakpoints as well:</text:p>
      <text:p text:style-name="P106">(gdb) b 285</text:p>
      <text:p text:style-name="P106">Breakpoint 2 at 0x55555555bd73: file test.s, line 285.</text:p>
      <text:p text:style-name="P106">(gdb) c</text:p>
      <text:p text:style-name="P106">Continuing.</text:p>
      <text:p text:style-name="P93">Breakpoint 2, test () at test.s:285</text:p>
      <text:p text:style-name="P93"><text:s text:c="3"/>283 <text:s text:c="8"/># generating: <text:s text:c="6"/>5: <text:s text:c="4"/>34: <text:s/>15: csp <text:s/>6: wrs <text:s/>rs: [] <text:s text:c="62"/>│</text:p>
      <text:p text:style-name="P93">│ <text:s text:c="2"/>284 <text:s text:c="8"/># generating: <text:s text:c="6"/>5: <text:s text:c="4"/>29: <text:s text:c="2"/>5: lao <text:s/>2 r1: rdi rs: [] <text:s text:c="60"/>│</text:p>
      <text:p text:style-name="P93">│B+&gt;285 <text:s text:c="16"/>leaq <text:s text:c="3"/>globals_start+2(%rip),%rdi # load address of global <text:s text:c="50"/>│</text:p>
      <text:p text:style-name="P93">│ <text:s text:c="2"/>286 <text:s text:c="8"/># generating~: <text:s text:c="5"/>5: <text:s text:c="4"/>29: <text:s text:c="2"/>5: lao <text:s/>2 r1: rdi rs: [] <text:s text:c="60"/>│</text:p>
      <text:p text:style-name="P93">│ <text:s text:c="2"/>287 <text:s text:c="8"/># generating: <text:s text:c="6"/>5: <text:s text:c="4"/>31: 123: ldci 12 r1: rsi rs: [] <text:s text:c="59"/>│</text:p>
      <text:p text:style-name="P93">│ <text:s text:c="2"/>288 <text:s text:c="16"/>movq <text:s text:c="3"/>$12,%rsi <text:s text:c="15"/># load quad constant</text:p>
      <text:p text:style-name="P106"/>
      <text:p text:style-name="P156">To find a source line in the assembly code, search for a source line marker in the .s file such as “:100”, then you can find where to breakpoint by the .s line number.</text:p>
      <text:p text:style-name="P90"/>
      <text:p text:style-name="Standard"/>
      <text:p text:style-name="P90"/>
      <text:h text:style-name="P205" text:outline-level="1"><text:bookmark-start text:name="__RefHeading___Toc15910_2478585429"/><text:bookmark-start text:name="_Toc528309206"/><text:bookmark text:name="_Toc3204811191"/>The intermediate language<text:bookmark-end text:name="__RefHeading___Toc15910_2478585429"/><text:bookmark-end text:name="_Toc528309206"/></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_RefHeading___Toc15912_2478585429"/><text:bookmark-start text:name="_Toc528309207"/>Format of intermediate<text:bookmark-end text:name="__RefHeading___Toc15912_2478585429"/><text:bookmark-end text:name="_Toc528309207"/></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47">mst <text:s text:c="10"/>0</text:p>
      <text:p text:style-name="P45">cup <text:s text:c="2"/>0 <text:s text:c="2"/>l <text:s text:c="2"/>3</text:p>
      <text:p text:style-name="P45">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28">Character</text:p>
          </table:table-cell>
          <table:table-cell table:style-name="Table28.A1" office:value-type="string">
            <text:p text:style-name="P28">Parameter(s)</text:p>
          </table:table-cell>
          <table:table-cell table:style-name="Table28.A1" office:value-type="string">
            <text:p text:style-name="P28">Description</text:p>
          </table:table-cell>
        </table:table-row>
        <table:table-row table:style-name="Table28.1">
          <table:table-cell table:style-name="Table28.A2" office:value-type="string">
            <text:p text:style-name="P152">!</text:p>
          </table:table-cell>
          <table:table-cell table:style-name="Table28.B2" office:value-type="string">
            <text:p text:style-name="P147">&lt;arbitrary characters&gt;</text:p>
          </table:table-cell>
          <table:table-cell table:style-name="Table28.C2" office:value-type="string">
            <text:p text:style-name="P147">Indicates a comment, the rest of the line is discarded.</text:p>
          </table:table-cell>
        </table:table-row>
        <table:table-row table:style-name="Table28.1">
          <table:table-cell table:style-name="Table28.A3" office:value-type="string">
            <text:p text:style-name="P152">l</text:p>
          </table:table-cell>
          <table:table-cell table:style-name="Table28.B3" office:value-type="string">
            <text:p text:style-name="P147">&lt;number&gt;</text:p>
          </table:table-cell>
          <table:table-cell table:style-name="Table28.C3" office:value-type="string">
            <text:p text:style-name="P147">A label. Used to establish jump locations in the code.</text:p>
          </table:table-cell>
        </table:table-row>
        <table:table-row table:style-name="Table28.1">
          <table:table-cell table:style-name="Table28.A2" office:value-type="string">
            <text:p text:style-name="P152">q</text:p>
          </table:table-cell>
          <table:table-cell table:style-name="Table28.B2" office:value-type="string">
            <text:p text:style-name="P147"/>
          </table:table-cell>
          <table:table-cell table:style-name="Table28.C2" office:value-type="string">
            <text:p text:style-name="P147">Marks the end of the main code or startup code section.</text:p>
          </table:table-cell>
        </table:table-row>
        <table:table-row table:style-name="Table28.1">
          <table:table-cell table:style-name="Table28.A5" office:value-type="string">
            <text:p text:style-name="P152">(blank)</text:p>
          </table:table-cell>
          <table:table-cell table:style-name="Table28.B5" office:value-type="string">
            <text:p text:style-name="P147"/>
          </table:table-cell>
          <table:table-cell table:style-name="Table28.C5" office:value-type="string">
            <text:p text:style-name="P147">An intermediate instruction.</text:p>
          </table:table-cell>
        </table:table-row>
        <table:table-row table:style-name="Table28.1">
          <table:table-cell table:style-name="Table28.A2" office:value-type="string">
            <text:p text:style-name="P152">:</text:p>
          </table:table-cell>
          <table:table-cell table:style-name="Table28.B2" office:value-type="string">
            <text:p text:style-name="P147">&lt;number&gt;</text:p>
          </table:table-cell>
          <table:table-cell table:style-name="Table28.C2" office:value-type="string">
            <text:p text:style-name="P147">A source line marker.</text:p>
          </table:table-cell>
        </table:table-row>
        <table:table-row table:style-name="Table28.1">
          <table:table-cell table:style-name="Table28.A7" office:value-type="string">
            <text:p text:style-name="P152">o</text:p>
          </table:table-cell>
          <table:table-cell table:style-name="Table28.B7" office:value-type="string">
            <text:p text:style-name="P147">&lt;options&gt;</text:p>
          </table:table-cell>
          <table:table-cell table:style-name="Table28.C7" office:value-type="string">
            <text:p text:style-name="P147">Passes the settings of all options to the backend.</text:p>
          </table:table-cell>
        </table:table-row>
        <table:table-row table:style-name="Table28.1">
          <table:table-cell table:style-name="Table28.A2" office:value-type="string">
            <text:p text:style-name="P152">g</text:p>
          </table:table-cell>
          <table:table-cell table:style-name="Table28.B2" office:value-type="string">
            <text:p text:style-name="P147">&lt;number&gt;</text:p>
          </table:table-cell>
          <table:table-cell table:style-name="Table28.C2" office:value-type="string">
            <text:p text:style-name="P147">Passes the total size of globals to the back end.</text:p>
          </table:table-cell>
        </table:table-row>
        <table:table-row table:style-name="Table28.1">
          <table:table-cell table:style-name="Table28.A9" office:value-type="string">
            <text:p text:style-name="P152">v</text:p>
          </table:table-cell>
          <table:table-cell table:style-name="Table28.B9" office:value-type="string">
            <text:p text:style-name="P147">l&lt;label&gt; &lt;size&gt;</text:p>
            <text:p text:style-name="P147">&lt;logical variant numbers&gt;</text:p>
          </table:table-cell>
          <table:table-cell table:style-name="Table28.C9" office:value-type="string">
            <text:p text:style-name="P147">Passes a “logical variant table” to the backend. Size indicates the number of logical variant numbers that will appear.</text:p>
          </table:table-cell>
        </table:table-row>
        <table:table-row table:style-name="Table28.1">
          <table:table-cell table:style-name="Table28.A2" office:value-type="string">
            <text:p text:style-name="P152">f</text:p>
          </table:table-cell>
          <table:table-cell table:style-name="Table28.B2" office:value-type="string">
            <text:p text:style-name="P147">f &lt;number&gt;</text:p>
          </table:table-cell>
          <table:table-cell table:style-name="Table28.C2" office:value-type="string">
            <text:p text:style-name="P147">Number of source code errors found by pcom.</text:p>
          </table:table-cell>
        </table:table-row>
        <table:table-row table:style-name="Table28.1">
          <table:table-cell table:style-name="Table28.A11" office:value-type="string">
            <text:p text:style-name="P152">b</text:p>
          </table:table-cell>
          <table:table-cell table:style-name="Table28.B11" office:value-type="string">
            <text:p text:style-name="P147">b &lt;type&gt;</text:p>
          </table:table-cell>
          <table:table-cell table:style-name="Table28.C11" office:value-type="string">
            <text:p text:style-name="P147">Block start.</text:p>
          </table:table-cell>
        </table:table-row>
        <table:table-row table:style-name="Table28.1">
          <table:table-cell table:style-name="Table28.A2" office:value-type="string">
            <text:p text:style-name="P152">e</text:p>
          </table:table-cell>
          <table:table-cell table:style-name="Table28.B2" office:value-type="string">
            <text:p text:style-name="P147">e &lt;type&gt;</text:p>
          </table:table-cell>
          <table:table-cell table:style-name="Table28.C2" office:value-type="string">
            <text:p text:style-name="P147">Block end.</text:p>
          </table:table-cell>
        </table:table-row>
        <table:table-row table:style-name="Table28.1">
          <table:table-cell table:style-name="Table28.A13" office:value-type="string">
            <text:p text:style-name="P152">s</text:p>
          </table:table-cell>
          <table:table-cell table:style-name="Table28.B13" office:value-type="string">
            <text:p text:style-name="P147">s &lt;name&gt; &lt;offset&gt; &lt;digest&gt;</text:p>
          </table:table-cell>
          <table:table-cell table:style-name="Table28.C13" office:value-type="string">
            <text:p text:style-name="P147">Symbol.</text:p>
          </table:table-cell>
        </table:table-row>
        <table:table-row table:style-name="Table28.1">
          <table:table-cell table:style-name="Table28.A2" office:value-type="string">
            <text:p text:style-name="P152">t</text:p>
          </table:table-cell>
          <table:table-cell table:style-name="Table28.B2" office:value-type="string">
            <text:p text:style-name="P147">&lt;label&gt; &lt;number of dimentions&gt; &lt;dimension1&gt; [&lt;dimentionn&gt;]…</text:p>
          </table:table-cell>
          <table:table-cell table:style-name="Table28.C2" office:value-type="string">
            <text:p text:style-name="P147">Fixed array template.</text:p>
          </table:table-cell>
        </table:table-row>
        <table:table-row table:style-name="Table28.1">
          <table:table-cell table:style-name="Table28.A15" office:value-type="string">
            <text:p text:style-name="P152">n</text:p>
          </table:table-cell>
          <table:table-cell table:style-name="Table28.B15" office:value-type="string">
            <text:p text:style-name="P147">&lt;label&gt; &lt;length&gt;</text:p>
          </table:table-cell>
          <table:table-cell table:style-name="Table28.C15" office:value-type="string">
            <text:p text:style-name="P147">Constant table begin.</text:p>
          </table:table-cell>
        </table:table-row>
        <table:table-row table:style-name="Table28.1">
          <table:table-cell table:style-name="Table28.A2" office:value-type="string">
            <text:p text:style-name="P152">c</text:p>
          </table:table-cell>
          <table:table-cell table:style-name="Table28.B2" office:value-type="string">
            <text:p text:style-name="P147">&lt;type&gt; &lt;value&gt;</text:p>
          </table:table-cell>
          <table:table-cell table:style-name="Table28.C2" office:value-type="string">
            <text:p text:style-name="P147">Constant table entry.</text:p>
          </table:table-cell>
        </table:table-row>
        <table:table-row table:style-name="Table28.1">
          <table:table-cell table:style-name="Table28.A17" office:value-type="string">
            <text:p text:style-name="P153">x</text:p>
          </table:table-cell>
          <table:table-cell table:style-name="Table28.B17" office:value-type="string">
            <text:p text:style-name="P148"/>
          </table:table-cell>
          <table:table-cell table:style-name="Table28.C17" office:value-type="string">
            <text:p text:style-name="P148">Constant table end.</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Where n is the logical program count.</text:p>
      <text:h text:style-name="Heading_20_3" text:outline-level="3"><text:bookmark-start text:name="__RefHeading___Toc15918_2478585429"/><text:bookmark-start text:name="_Toc528309208"/>Label<text:bookmark-end text:name="__RefHeading___Toc15918_2478585429"/><text:bookmark-end text:name="_Toc528309208"/></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ext:soft-page-break/>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5</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soft-page-break/><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text:soft-page-break/>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soft-page-break/><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soft-page-break/><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51"><text:tab/>r(a:0:i,b:8:c)</text:p>
      <text:p text:style-name="P51">If a variant appears in the record, it has the special notation:</text:p>
      <text:p text:style-name="P51"><text:tab/>&lt;tag name&gt;:&lt;offset&gt;:type(&lt;tag constant&gt;(&lt;field&gt;)[&lt;tag constant&gt;(&lt;field&gt;)]…</text:p>
      <text:p text:style-name="P51">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6.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ext:soft-page-break/>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50">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s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24">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37"><text:tab/>vector<text:tab/><text:tab/>The current exception variable as thrown.</text:p>
      <text:p text:style-name="P37"><text:tab/>expmrk<text:tab/><text:tab/>The mark address of the exception handler.</text:p>
      <text:p text:style-name="P37"><text:tab/>expstk<text:tab/><text:tab/>The stack address of the exception handler.</text:p>
      <text:p text:style-name="P37"><text:tab/>expadr<text:tab/><text:tab/>The address of the current/topmost exception handler.</text:p>
      <text:p text:style-name="P37"/>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56"><text:s text:c="5"/>+------------------------+</text:p>
      <text:p text:style-name="P57"><text:s text:c="5"/>| Dummy function result <text:s/>| This varies in size by the size of the function</text:p>
      <text:p text:style-name="P57"><text:s text:c="5"/>| <text:s text:c="23"/>| result, but is aligned to stack.</text:p>
      <text:p text:style-name="P57"><text:s text:c="5"/>+------------------------+</text:p>
      <text:p text:style-name="P57"><text:s text:c="5"/>| Parameters <text:s text:c="12"/>| Each parameter is evaluated and left on stack in</text:p>
      <text:p text:style-name="P57"><text:s text:c="5"/>| <text:s text:c="23"/>| turn.</text:p>
      <text:p text:style-name="P57"><text:s text:c="5"/>+------------------------+</text:p>
      <text:p text:style-name="P57"><text:s text:c="5"/>| Return address <text:s text:c="8"/>| The return address is pushed to stack.</text:p>
      <text:p text:style-name="P57"><text:s text:c="5"/>+------------------------+</text:p>
      <text:p text:style-name="P57"><text:s text:c="5"/>| Mark <text:s text:c="18"/>| Mark bookkeeping information</text:p>
      <text:p text:style-name="P57"><text:s text:c="5"/>| <text:s text:c="23"/>|</text:p>
      <text:p text:style-name="P57"><text:s text:c="5"/>+------------------------+</text:p>
      <text:p text:style-name="P57"><text:s text:c="5"/>| Saved MP <text:s text:c="14"/>| The caller MP is saved.</text:p>
      <text:p text:style-name="P57">MP-&gt; +------------------------+</text:p>
      <text:p text:style-name="P57"><text:s text:c="5"/>| Display <text:s text:c="15"/>| Level number of MPs are copied.</text:p>
      <text:p text:style-name="P57"><text:s text:c="5"/>| <text:s text:c="23"/>|</text:p>
      <text:p text:style-name="P57"><text:s text:c="5"/>+------------------------+</text:p>
      <text:p text:style-name="P57"><text:s text:c="5"/>| Locals <text:s text:c="16"/>| Local variables</text:p>
      <text:p text:style-name="P57"><text:s text:c="5"/>| <text:s text:c="23"/>|</text:p>
      <text:p text:style-name="P57">SP-&gt; +------------------------+</text:p>
      <text:p text:style-name="P58"/>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text:style-name="WWNum19">
        <text:list-item>
          <text:p text:style-name="P235">Maximum frame size (ep)</text:p>
        </text:list-item>
        <text:list-item>
          <text:p text:style-name="P235">Stack bottom</text:p>
        </text:list-item>
        <text:list-item>
          <text:p text:style-name="P235">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6.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P58">MP-&gt; +------------------------+</text:p>
      <text:p text:style-name="P58"><text:s text:c="5"/>| Test mp <text:s text:c="15"/>|</text:p>
      <text:p text:style-name="P58"><text:s text:c="5"/>+-------------------------</text:p>
      <text:p text:style-name="P58"><text:s text:c="5"/>| a mp <text:s text:c="18"/>|</text:p>
      <text:p text:style-name="P58"><text:s text:c="5"/>+------------------------+</text:p>
      <text:p text:style-name="P58"><text:s text:c="5"/>| b mp <text:s text:c="18"/>|</text:p>
      <text:p text:style-name="P58"><text:s text:c="5"/>+------------------------+</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212" text:outline-level="2"><text:bookmark-start text:name="__RefHeading___Toc15948_2478585429"/><text:bookmark-start text:name="_Toc320481272"/><text:bookmark-start text:name="_Toc528309210"/>I<text:bookmark-end text:name="_Toc320481272"/><text:bookmark-end text:name="_Toc528309210"/>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37"><text:tab/>i <text:tab/>Integer (2/4/8 bytes)</text:p>
      <text:p text:style-name="P37"><text:tab/>x<text:tab/>Byte (1 byte)</text:p>
      <text:p text:style-name="P41"><text:tab/>r<text:tab/>Real (8 bytes)</text:p>
      <text:p text:style-name="P41"><text:tab/>s<text:tab/>Set (32 bytes)</text:p>
      <text:p text:style-name="P41"><text:tab/>b<text:tab/>Boolean (1 byte)</text:p>
      <text:p text:style-name="P41"><text:tab/>a<text:tab/>Address (2/4/8 bytes)</text:p>
      <text:p text:style-name="P41"><text:tab/>m<text:tab/>Memory (or memory block)</text:p>
      <text:p text:style-name="P37"><text:tab/>c<text:tab/>Character (1 byte)</text:p>
      <text:p text:style-name="P37"/>
      <text:p text:style-name="Standard">Note that all boolean, <text:s/>character and byte values are extended to <text:span text:style-name="T94">2/</text:span>4/<text:span text:style-name="T94">8</text:span>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37">Word size N (bytes)<text:tab/>Bit size B</text:p>
      <text:p text:style-name="P37">2<text:tab/><text:tab/><text:tab/>16</text:p>
      <text:p text:style-name="P37">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P131">Some instructions use a result type code. These are:</text:p>
      <text:p text:style-name="P132">1<text:tab/>Real type</text:p>
      <text:p text:style-name="P132">2<text:tab/>Set</text:p>
      <text:p text:style-name="P131">3<text:tab/>Structured return types (array, record, etc.)</text:p>
      <text:p text:style-name="P141">Note that some instructions and/or features of instructions are only designed to direct pgen how to generate code for the intermediate, and have no function in the interpreter(s).</text:p>
      <text:p text:style-name="Standard">This list of instructions is in alphabetical order.</text:p>
      <text:p text:style-name="Standard"/>
      <text:p text:style-name="P36">Instruction<text:tab/><text:tab/>Opcode<text:tab/>Stack in<text:tab/><text:tab/>Stack out</text:p>
      <text:p text:style-name="No_20_Spacing"><text:span text:style-name="T13">abi</text:span><text:span text:style-name="T29"> <text:s text:c="2"/><text:tab/><text:tab/><text:tab/>40<text:tab/><text:tab/>integer<text:tab/><text:tab/><text:tab/>integer</text:span></text:p>
      <text:p text:style-name="No_20_Spacing"><text:span text:style-name="T13">abr</text:span><text:span text:style-name="T29"> <text:s text:c="2"/><text:tab/><text:tab/><text:tab/>41<text:tab/><text:tab/>real<text:tab/><text:tab/><text:tab/>real</text:span></text:p>
      <text:p text:style-name="P171"/>
      <text:p text:style-name="Standard">Find absolute value of integer or real on top of stack.</text:p>
      <text:p text:style-name="table_20_header1">Instruction<text:tab/><text:tab/>Opcode<text:tab/>Stack in<text:tab/><text:tab/>Stack out</text:p>
      <text:p text:style-name="No_20_Spacing"><text:span text:style-name="T11">adi</text:span> <text:s text:c="2"/><text:tab/><text:tab/><text:tab/>28<text:tab/><text:tab/>integer integer<text:tab/><text:tab/>integer</text:p>
      <text:p text:style-name="No_20_Spacing"><text:span text:style-name="T11">adr</text:span> <text:s text:c="2"/><text:tab/><text:tab/><text:tab/>29<text:tab/><text:tab/>real real<text:tab/><text:tab/><text:tab/>real</text:p>
      <text:p text:style-name="P170"/>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170"/>
      <text:p text:style-name="Standard">Find logical ‘and’ of the top two Booleans on stack, and replace with result.</text:p>
      <text:p text:style-name="table_20_header1">Instruction<text:tab/><text:tab/>Opcode<text:tab/>Stack in<text:tab/><text:tab/>Stack out</text:p>
      <text:p text:style-name="P61">apc lvl size<text:tab/><text:tab/>210 qn qn<text:tab/>sadr stmp dadr dtmp</text:p>
      <text:p text:style-name="P61"/>
      <text:p text:style-name="P61">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p>
      <text:p text:style-name="table_20_header1">Instruction<text:tab/><text:tab/>Opcode<text:tab/>Stack in<text:tab/><text:tab/>Stack out</text:p>
      <text:p text:style-name="No_20_Spacing"><text:span text:style-name="T11">aps</text:span> size<text:tab/><text:tab/><text:tab/>178<text:tab/><text:tab/>addr int addr int<text:tab/></text:p>
      <text:p text:style-name="P170"/>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P61">bge eadr<text:tab/><text:tab/>207<text:tab/><text:tab/><text:tab/><text:tab/><text:tab/>eadr sadr madr vec</text:p>
      <text:p text:style-name="P61"/>
      <text:p text:style-name="P61">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p>
      <text:p text:style-name="table_20_header1">Instruction<text:tab/><text:tab/>Opcode<text:tab/>Stack in<text:tab/><text:tab/>Stack out</text:p>
      <text:p text:style-name="P61">brk<text:tab/><text:tab/><text:tab/>19</text:p>
      <text:p text:style-name="P61"/>
      <text:p text:style-name="P61">Break execution. Used by pint only. Stops execution and enters the debugger, if enabled.</text:p>
      <text:p text:style-name="P38"/>
      <text:p text:style-name="P38">Instruction<text:tab/><text:tab/>Opcode<text:tab/>Stack in<text:tab/><text:tab/>Stack out</text:p>
      <text:p text:style-name="P61">cal adr<text:tab/><text:tab/><text:tab/>21 qn<text:tab/><text:tab/><text:tab/><text:tab/><text:tab/>raddr</text:p>
      <text:p text:style-name="P61"/>
      <text:p text:style-name="P61">Call initalizer code strip. The current address is pushed onto the stack, and the address of the specified location called.</text:p>
      <text:p text:style-name="table_20_header1"><text:soft-page-break/>Instruction<text:tab/><text:tab/>Opcode<text:tab/>Stack in<text:tab/><text:tab/>Stack out</text:p>
      <text:p text:style-name="P61">ccs lvl siz<text:tab/><text:tab/>223<text:tab/><text:tab/>dadr tadr<text:tab/><text:tab/>dadr tadr</text:p>
      <text:p text:style-name="P61"/>
      <text:p text:style-name="P61">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p>
      <text:p text:style-name="table_20_header1">Instruction<text:tab/><text:tab/>Opcode<text:tab/>Stack in<text:tab/><text:tab/>Stack out</text:p>
      <text:p text:style-name="No_20_Spacing"><text:span text:style-name="T11">chka</text:span> low high <text:tab/><text:tab/>95 qn<text:tab/><text:tab/>address<text:tab/><text:tab/><text:tab/>address</text:p>
      <text:p text:style-name="No_20_Spacing"><text:span text:style-name="T11">chkb</text:span> low high <text:tab/><text:tab/>98 qn<text:tab/><text:tab/>boolean<text:tab/><text:tab/><text:tab/>boolean</text:p>
      <text:p text:style-name="No_20_Spacing"><text:span text:style-name="T11">chkc</text:span> low high <text:tab/><text:tab/>99 qn<text:tab/><text:tab/>char<text:tab/><text:tab/><text:tab/>char</text:p>
      <text:p text:style-name="No_20_Spacing"><text:span text:style-name="T11">chki</text:span> low high<text:tab/><text:tab/>26 qn<text:tab/><text:tab/>integer<text:tab/><text:tab/><text:tab/>integer</text:p>
      <text:p text:style-name="No_20_Spacing">chkx low high<text:tab/><text:tab/>199 qn<text:tab/><text:tab/>integer<text:tab/><text:tab/><text:tab/>integer</text:p>
      <text:p text:style-name="No_20_Spacing"><text:span text:style-name="T11">chks</text:span> low high <text:tab/><text:tab/>97 qn<text:tab/><text:tab/><text:span text:style-name="T63">set<text:tab/><text:tab/><text:tab/>set</text:span></text:p>
      <text:p text:style-name="P170"/>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46">0<text:tab/>Pointer is not being dereferenced</text:p>
      <text:p text:style-name="P46">1<text:tab/>Pointer is being dereferenced</text:p>
      <text:p text:style-name="P46"/>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11">chr</text:span> <text:s text:c="2"/><text:tab/><text:tab/><text:tab/>60<text:tab/><text:tab/>integer<text:tab/><text:tab/><text:tab/>character</text:p>
      <text:p text:style-name="P170"/>
      <text:p text:style-name="Standard">Find character from integer. Finds the character value of an integer on stack top. At present, this is a no-op.</text:p>
      <text:p text:style-name="P38">Instruction<text:tab/><text:tab/>Opcode<text:tab/>Stack in<text:tab/><text:tab/>Stack out</text:p>
      <text:p text:style-name="No_20_Spacing"><text:span text:style-name="T11">cif</text:span> <text:span text:style-name="T63">pn rslt</text:span><text:tab/><text:tab/>247<text:tab/><text:tab/>address</text:p>
      <text:p text:style-name="P170"/>
      <text:p text:style-name="P37">Call indirect function. <text:span text:style-name="T63">The number of parameters is indicated by pn. </text:span><text:span text:style-name="T64">The result type is given in rslt. </text:span>The top of stack has the address of a <text:span text:style-name="T11">mp</text:span>/address pair pushed by <text:span text:style-name="T11">lpa</text:span>. The current mp is replaced by the new mp, the current address is saved on stack, and the address in the pair is jumped to. The <text:span text:style-name="T11">mp</text:span>/ad address is removed from stack. Note that since this instruction destroys the current mp, it must be restored after the call by a rip instruction.</text:p>
      <text:p text:style-name="P37"/>
      <text:p text:style-name="P37"/>
      <text:p text:style-name="P38"><text:soft-page-break/>Instruction<text:tab/><text:tab/>Opcode<text:tab/>Stack in<text:tab/><text:tab/>Stack out</text:p>
      <text:p text:style-name="No_20_Spacing"><text:span text:style-name="T11">cip</text:span> <text:span text:style-name="T65">pn</text:span><text:tab/><text:tab/><text:tab/>113<text:tab/><text:tab/>address</text:p>
      <text:p text:style-name="P170"/>
      <text:p text:style-name="Standard">Call indirect procedure. <text:span text:style-name="T65">The number of parameters is given in pn. </text:span>The top of stack has the address of a <text:span text:style-name="T11">mp</text:span>/address pair pushed by <text:span text:style-name="T11">lpa</text:span>. The current mp is replaced by the new mp, the current address is saved on stack, and the address in the pair is jumped to. The <text:span text:style-name="T11">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P61">cjp lval hval adr<text:tab/><text:tab/>8 qn qn qn<text:tab/>val</text:p>
      <text:p text:style-name="P61"/>
      <text:p text:style-name="P61">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p>
      <text:p text:style-name="table_20_header1">Instruction<text:tab/><text:tab/>Opcode<text:tab/>Stack in<text:tab/><text:tab/>Stack out</text:p>
      <text:p text:style-name="No_20_Spacing"><text:span text:style-name="T11">cke</text:span> <text:s/><text:tab/><text:tab/><text:tab/>188<text:tab/><text:tab/>boolean tagcst</text:p>
      <text:p text:style-name="P170"/>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11">ckla</text:span> low high<text:tab/><text:tab/>190<text:tab/><text:tab/>address<text:tab/><text:tab/><text:tab/>address</text:p>
      <text:p text:style-name="P170"/>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11">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11">ckvb</text:span> val<text:tab/><text:tab/>179 qn<text:tab/><text:tab/>boolean tagval<text:tab/><text:tab/>boolean tagval</text:p>
      <text:p text:style-name="No_20_Spacing"><text:span text:style-name="T11">ckvc</text:span> val<text:tab/><text:tab/>180 qn<text:tab/><text:tab/>boolean tagval<text:tab/><text:tab/>boolean tagval</text:p>
      <text:p text:style-name="P70">ckvi val<text:tab/><text:tab/><text:tab/>175 qn<text:tab/><text:tab/>boolean tagval<text:tab/><text:tab/>boolean tagval</text:p>
      <text:p text:style-name="Standard"><text:span text:style-name="T11">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11">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P130">Instruction<text:tab/><text:tab/>Opcode <text:tab/>Stack in<text:tab/><text:tab/>Stack out</text:p>
      <text:p text:style-name="P129"><text:span text:style-name="T11">cp</text:span><text:span text:style-name="T19">l</text:span><text:tab/><text:tab/><text:tab/><text:span text:style-name="T77">251</text:span><text:tab/><text:tab/><text:span text:style-name="T77">d</text:span>adr/<text:span text:style-name="T77">len</text:span><text:tab/><text:tab/><text:span text:style-name="T77">len d</text:span>adr/len</text:p>
      <text:p text:style-name="P129"/>
      <text:p text:style-name="P146">Duplicate length from complex pointer. Expects a data address/length pair on stack. The length is duplicated and is place on stack at tos.</text:p>
      <text:p text:style-name="table_20_header1">Instruction<text:tab/><text:tab/>Opcode<text:tab/>Stack in<text:tab/><text:tab/>Stack out</text:p>
      <text:p text:style-name="P61">cpp poff psiz<text:tab/><text:tab/>239 qn qn<text:tab/><text:tab/><text:tab/><text:tab/>par</text:p>
      <text:p text:style-name="P61"/>
      <text:p text:style-name="P61">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p>
      <text:p text:style-name="table_20_header1">Instruction<text:tab/><text:tab/>Opcode<text:tab/>Stack in<text:tab/><text:tab/>Stack out</text:p>
      <text:p text:style-name="P61">cpr rsiz roff<text:tab/><text:tab/>240 qn qn<text:tab/><text:tab/><text:tab/><text:tab/>fres</text:p>
      <text:p text:style-name="P61"/>
      <text:p text:style-name="P61">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p>
      <text:p text:style-name="table_20_header1">Instruction<text:tab/><text:tab/>Opcode <text:tab/>Stack in<text:tab/><text:tab/>Stack out</text:p>
      <text:p text:style-name="No_20_Spacing"><text:span text:style-name="T11">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11">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Standard"/>
      <text:p text:style-name="P92">Instruction<text:tab/><text:tab/>Opcode <text:tab/>Stack in<text:tab/><text:tab/>Stack out</text:p>
      <text:p text:style-name="Standard"><text:span text:style-name="T11">cta</text:span> <text:s/>off lvl lv<text:span text:style-name="T65">t</text:spa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Instruction<text:tab/><text:tab/>Opcode <text:tab/>Stack in<text:tab/><text:tab/>Stack out</text:p>
      <text:p text:style-name="Standard">ctb len off <text:s/><text:tab/><text:tab/>238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pan text:style-name="T65">pn rslt</text:span><text:tab/>246 qn</text:p>
      <text:p text:style-name="Standard">Call user function. The instruction contains the address of the procedure to call, <text:span text:style-name="T65">the number of parameters, and the result type</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pan text:style-name="T65">pn</text:span> <text:s/><text:tab/><text:tab/>12 qn</text:p>
      <text:p text:style-name="Standard">Call user procedure. The instruction contains the address of the procedure to call, <text:span text:style-name="T65">and the number of parameters</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P134">Instruction<text:tab/><text:tab/>Opcode <text:tab/>Stack in<text:tab/><text:tab/>Stack out</text:p>
      <text:p text:style-name="P133">cuv l addr <text:span text:style-name="T65">pn</text:span> <text:s/><text:tab/><text:tab/>27 qn</text:p>
      <text:p text:style-name="P133">Call user virtual procedure vector. The instruction contains the address of the vector to the procedure to call, <text:span text:style-name="T65">and the number of parameters</text:span>. The current pc is saved on stack, and the address at the given address is jumped to (vectored).</text:p>
      <text:p text:style-name="Standard"/>
      <text:p text:style-name="P92">Instruction<text:tab/><text:tab/>Opcode <text:tab/>Stack in<text:tab/><text:tab/>Stack out</text:p>
      <text:p text:style-name="P37"><text:span text:style-name="T11">cvbi off size lvn</text:span><text:span text:style-name="T16">t</text:span><text:span text:style-name="T11"><text:tab/>100 qn qn qn<text:tab/>ntagval tagaddr<text:tab/><text:tab/>ntagval tagaddr</text:span></text:p>
      <text:p text:style-name="P37"><text:span text:style-name="T11">cvbx off size lv</text:span><text:span text:style-name="T16">t</text:span><text:span text:style-name="T11"><text:tab/><text:tab/>115 qn qn qn<text:tab/>ntagval tagaddr<text:tab/><text:tab/>ntagval tagaddr</text:span></text:p>
      <text:p text:style-name="P37"><text:span text:style-name="T11">cvbb off size lv</text:span><text:span text:style-name="T16">t</text:span><text:span text:style-name="T11"><text:tab/><text:tab/>116 qn qn qn<text:tab/>ntagval tagaddr<text:tab/><text:tab/>ntagval tagaddr</text:span></text:p>
      <text:p text:style-name="Standard"><text:span text:style-name="T11">cvbc</text:span> off size lv<text:span text:style-name="T67">t</text:span><text:tab/><text:tab/>121 qn qn qn<text:tab/>n<text:span text:style-name="T11">tagval tagaddr</text:span><text:tab/><text:tab/>n<text:span text:style-name="T11">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P134">Instruction<text:tab/><text:tab/>Opcode <text:tab/>Stack in<text:tab/><text:tab/>Stack out</text:p>
      <text:p text:style-name="P133">c<text:span text:style-name="T65">vf</text:span> l addr <text:span text:style-name="T65">pn rslt</text:span><text:tab/>249 qn</text:p>
      <text:p text:style-name="P133">Call user virtual procedure/function vector. The instruction contains the address of the vector to the <text:span text:style-name="T66">function</text:span> to call, <text:span text:style-name="T66">the number of parameters, and the result type</text:span>. The current pc is saved on stack, and the address at the given address is jumped to (vectored).</text:p>
      <text:p text:style-name="table_20_header1">Instruction<text:tab/><text:tab/>Opcode<text:tab/>Stack in<text:tab/><text:tab/>Stack out</text:p>
      <text:p text:style-name="P61">cxc lvl siz<text:tab/><text:tab/>212<text:tab/><text:tab/>inx dadr tadr<text:tab/><text:tab/>dadr tadr</text:p>
      <text:p text:style-name="P61"/>
      <text:p text:style-name="P61">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p>
      <text:p text:style-name="P38"/>
      <text:p text:style-name="P38">Instruction<text:tab/><text:tab/>Opcode<text:tab/>Stack in<text:tab/><text:tab/>Stack out</text:p>
      <text:p text:style-name="P61">cxs siz<text:tab/><text:tab/><text:tab/>211 qn<text:tab/><text:tab/>inx adr len<text:tab/><text:tab/>adr</text:p>
      <text:p text:style-name="P61"/>
      <text:p text:style-name="P61">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p>
      <text:p text:style-name="Standard"/>
      <text:p text:style-name="P92">Instruction<text:tab/><text:tab/>Opcode <text:tab/>Stack in<text:tab/><text:tab/>Stack out</text:p>
      <text:p text:style-name="No_20_Spacing"><text:span text:style-name="T11">decb</text:span> cnt<text:tab/><text:tab/>103 qn<text:tab/><text:tab/>boolean<text:tab/><text:tab/><text:tab/>boolean</text:p>
      <text:p text:style-name="No_20_Spacing"><text:span text:style-name="T11">decc</text:span> cnt<text:tab/><text:tab/>104 qn<text:tab/><text:tab/>character<text:tab/><text:tab/>character</text:p>
      <text:p text:style-name="No_20_Spacing"><text:span text:style-name="T11">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11">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11">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44"><text:span text:style-name="T11">dupa</text:span> <text:tab/><text:tab/><text:tab/>182<text:tab/><text:tab/>address<text:tab/><text:tab/><text:tab/>address address</text:p>
      <text:p text:style-name="P44"><text:span text:style-name="T11">dupb</text:span> <text:tab/><text:tab/><text:tab/>185<text:tab/><text:tab/>boolean<text:tab/><text:tab/><text:tab/>boolean boolean</text:p>
      <text:p text:style-name="P44"><text:span text:style-name="T11">dupc</text:span> <text:tab/><text:tab/><text:tab/>186<text:tab/><text:tab/>character<text:tab/><text:tab/>character character</text:p>
      <text:p text:style-name="P44"><text:span text:style-name="T11">dupi</text:span> <text:tab/><text:tab/><text:tab/>181<text:tab/><text:tab/>integer<text:tab/><text:tab/><text:tab/>integer integer</text:p>
      <text:p text:style-name="P44"><text:span text:style-name="T11">dupr</text:span> <text:tab/><text:tab/><text:tab/>183<text:tab/><text:tab/>real<text:tab/><text:tab/><text:tab/>real real</text:p>
      <text:p text:style-name="Standard"><text:span text:style-name="T11">dups</text:span> <text:tab/><text:tab/><text:tab/>184<text:tab/><text:tab/>set<text:tab/><text:tab/><text:tab/>set set</text:p>
      <text:p text:style-name="Standard">Duplicate stack top. The top value on the stack is copied to a new stack top value according to type.</text:p>
      <text:p text:style-name="table_20_header1">Instruction<text:tab/><text:tab/>Opcode <text:tab/>Stack in<text:tab/><text:tab/>Stack out</text:p>
      <text:p text:style-name="No_20_Spacing"><text:span text:style-name="T11">dvi</text:span> <text:s text:c="2"/><text:tab/><text:tab/><text:tab/>53<text:tab/><text:tab/>integer integer<text:tab/><text:tab/>integer</text:p>
      <text:p text:style-name="No_20_Spacing"><text:span text:style-name="T11">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38"/>
      <text:p text:style-name="P38">Instruction<text:tab/><text:tab/>Opcode<text:tab/>Stack in<text:tab/><text:tab/>Stack out</text:p>
      <text:p text:style-name="P61">ede<text:tab/><text:tab/><text:tab/>208<text:tab/><text:tab/>eadr sadr madr vec</text:p>
      <text:p text:style-name="P61"/>
      <text:p text:style-name="P61">End exception frame. Expects an exception handler address, stack address, mark address, and vector variable on stack. Removes all and continues. This instruction is used after the exception has been successfully handled.</text:p>
      <text:p text:style-name="Standard"/>
      <text:p text:style-name="P92">Instruction<text:tab/><text:tab/>Opcode <text:tab/>Stack in<text:tab/><text:tab/>Stack out</text:p>
      <text:p text:style-name="No_20_Spacing"><text:span text:style-name="T11">equa</text:span> <text:s/><text:tab/><text:tab/><text:tab/>17<text:tab/><text:tab/>address address<text:tab/><text:tab/>boolean</text:p>
      <text:p text:style-name="No_20_Spacing"><text:span text:style-name="T11">equb</text:span> <text:tab/><text:tab/><text:tab/>139<text:tab/><text:tab/>boolean<text:tab/> Boolean<text:tab/>boolean</text:p>
      <text:p text:style-name="No_20_Spacing"><text:span text:style-name="T11">equc</text:span> <text:tab/><text:tab/><text:tab/>141<text:tab/><text:tab/>character character<text:tab/>boolean</text:p>
      <text:p text:style-name="No_20_Spacing"><text:span text:style-name="T11">equi</text:span> <text:tab/><text:tab/><text:tab/>137<text:tab/><text:tab/>integer integer<text:tab/><text:tab/>boolean</text:p>
      <text:p text:style-name="No_20_Spacing"><text:span text:style-name="T11">equm</text:span> size<text:tab/><text:tab/>142 qn<text:tab/><text:tab/>address address<text:tab/><text:tab/>boolean<text:tab/></text:p>
      <text:p text:style-name="No_20_Spacing"><text:span text:style-name="T11">equr</text:span> <text:tab/><text:tab/><text:tab/>138<text:tab/><text:tab/>real real<text:tab/><text:tab/><text:tab/>boolean</text:p>
      <text:p text:style-name="No_20_Spacing"><text:span text:style-name="T11">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38"/>
      <text:p text:style-name="P38">Instruction<text:tab/><text:tab/>Opcode<text:tab/>Stack in<text:tab/><text:tab/>Stack out</text:p>
      <text:p text:style-name="P61">equv<text:tab/><text:tab/><text:tab/>215<text:tab/><text:tab/>sadr len sadr len<text:tab/><text:tab/>boolean</text:p>
      <text:p text:style-name="P61"/>
      <text:p text:style-name="P61">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p>
      <text:p text:style-name="table_20_header1">Instruction<text:tab/><text:tab/>Opcode<text:tab/>Stack in<text:tab/><text:tab/>Stack out</text:p>
      <text:p text:style-name="P61">eext<text:tab/><text:tab/><text:tab/>242</text:p>
      <text:p text:style-name="P61"/>
      <text:p text:style-name="P61">Execute external. This is a pint internal instruction. It is used to execute an externally defined routine. A table in pint is filled with eext instructions, and the address of the instruction determines which external routine is executed.</text:p>
      <text:p text:style-name="table_20_header1">Instruction<text:tab/><text:tab/>Opcode <text:tab/>Stack in<text:tab/><text:tab/>Stack out</text:p>
      <text:p text:style-name="Standard"><text:span text:style-name="T11">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table_20_header1">Instruction<text:tab/><text:tab/>Opcode <text:tab/>Stack in<text:tab/><text:tab/>Stack out</text:p>
      <text:p text:style-name="No_20_Spacing"><text:span text:style-name="T11">flo</text:span> <text:s text:c="2"/><text:tab/><text:tab/><text:tab/>34<text:tab/><text:tab/>integer real<text:tab/><text:tab/>real real</text:p>
      <text:p text:style-name="No_20_Spacing"><text:span text:style-name="T11">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Standard"/>
      <text:p text:style-name="P92">Instruction<text:tab/><text:tab/>Opcode <text:tab/>Stack in<text:tab/><text:tab/>Stack out</text:p>
      <text:p text:style-name="No_20_Spacing"><text:span text:style-name="T11">geqb</text:span> <text:tab/><text:tab/><text:tab/>151<text:tab/><text:tab/>boolean<text:tab/> boolean<text:tab/>boolean</text:p>
      <text:p text:style-name="No_20_Spacing"><text:span text:style-name="T11">geqc</text:span> <text:tab/><text:tab/><text:tab/>153<text:tab/><text:tab/>character character<text:tab/>boolean</text:p>
      <text:p text:style-name="No_20_Spacing"><text:span text:style-name="T11">geqi</text:span> <text:tab/><text:tab/><text:tab/>149<text:tab/><text:tab/>integer integer<text:tab/><text:tab/>boolean</text:p>
      <text:p text:style-name="No_20_Spacing"><text:span text:style-name="T11">geqm</text:span> size<text:tab/><text:tab/>154 qn<text:tab/><text:tab/>address address<text:tab/><text:tab/>boolean</text:p>
      <text:p text:style-name="No_20_Spacing"><text:span text:style-name="T11">geqr</text:span> <text:tab/><text:tab/><text:tab/>150<text:tab/><text:tab/>real real<text:tab/><text:tab/><text:tab/>boolean</text:p>
      <text:p text:style-name="No_20_Spacing"><text:span text:style-name="T11">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38"/>
      <text:p text:style-name="P38">Instruction<text:tab/><text:tab/>Opcode<text:tab/>Stack in<text:tab/><text:tab/>Stack out</text:p>
      <text:p text:style-name="P61">geqv<text:tab/><text:tab/><text:tab/>220<text:tab/><text:tab/>sadr len sadr len<text:tab/><text:tab/>boolean</text:p>
      <text:p text:style-name="P61"/>
      <text:p text:style-name="P61">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p>
      <text:p text:style-name="table_20_header1">Instruction<text:tab/><text:tab/>Opcode <text:tab/>Stack in<text:tab/><text:tab/>Stack out</text:p>
      <text:p text:style-name="No_20_Spacing"><text:span text:style-name="T11">grtb</text:span> <text:tab/><text:tab/><text:tab/>157<text:tab/><text:tab/>boolean<text:tab/> boolean<text:tab/>boolean</text:p>
      <text:p text:style-name="No_20_Spacing"><text:span text:style-name="T11">grtc</text:span> <text:tab/><text:tab/><text:tab/>159<text:tab/><text:tab/>character character<text:tab/>boolean</text:p>
      <text:p text:style-name="No_20_Spacing"><text:span text:style-name="T11">grti</text:span> <text:tab/><text:tab/><text:tab/>155<text:tab/><text:tab/>integer integer<text:tab/><text:tab/>boolean</text:p>
      <text:p text:style-name="No_20_Spacing"><text:span text:style-name="T11">grtm size</text:span><text:tab/><text:tab/>160 qn<text:tab/><text:tab/>address address<text:tab/><text:tab/>boolean</text:p>
      <text:p text:style-name="No_20_Spacing"><text:span text:style-name="T11">grtr</text:span> <text:tab/><text:tab/><text:tab/>156<text:tab/><text:tab/>real real<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1">grtv<text:tab/><text:tab/><text:tab/>218<text:tab/><text:tab/>sadr len sadr len<text:tab/><text:tab/>boolean</text:p>
      <text:p text:style-name="P61"/>
      <text:p text:style-name="P61">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p>
      <text:p text:style-name="Standard"/>
      <text:p text:style-name="P92">Instruction<text:tab/><text:tab/>Opcode <text:tab/>Stack in<text:tab/><text:tab/>Stack out</text:p>
      <text:p text:style-name="No_20_Spacing"><text:span text:style-name="T11">inca</text:span> <text:s/>cnt <text:tab/><text:tab/>90 qn<text:tab/><text:tab/>address<text:tab/><text:tab/><text:tab/>address</text:p>
      <text:p text:style-name="No_20_Spacing"><text:span text:style-name="T11">incb</text:span> <text:s/>cnt<text:tab/><text:tab/>93 qn<text:tab/><text:tab/>boolean<text:tab/><text:tab/><text:tab/>boolean<text:tab/></text:p>
      <text:p text:style-name="No_20_Spacing"><text:span text:style-name="T11">incc</text:span> <text:s/>cnt<text:tab/><text:tab/>94 qn<text:tab/><text:tab/>character<text:tab/><text:tab/>character</text:p>
      <text:p text:style-name="No_20_Spacing"><text:span text:style-name="T11">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38"/>
      <text:p text:style-name="P38">Instruction<text:tab/><text:tab/>Opcode <text:tab/>Stack in<text:tab/><text:tab/>Stack out</text:p>
      <text:p text:style-name="No_20_Spacing"><text:span text:style-name="T11">inda</text:span> <text:s/>off<text:tab/><text:tab/>85 qn<text:tab/><text:tab/>address<text:tab/><text:tab/><text:tab/>address</text:p>
      <text:p text:style-name="No_20_Spacing"><text:span text:style-name="T11">indb</text:span> <text:s/>off<text:tab/><text:tab/>88 qn<text:tab/><text:tab/>address<text:tab/><text:tab/><text:tab/>boolean</text:p>
      <text:p text:style-name="No_20_Spacing"><text:span text:style-name="T11">indc</text:span> <text:s/>off<text:tab/><text:tab/>89 qn<text:tab/><text:tab/>address<text:tab/><text:tab/><text:tab/>character</text:p>
      <text:p text:style-name="No_20_Spacing"><text:span text:style-name="T11">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11">indr</text:span> <text:s/>off<text:tab/><text:tab/>86 qn<text:tab/><text:tab/>address<text:tab/><text:tab/><text:tab/>real</text:p>
      <text:p text:style-name="No_20_Spacing"><text:span text:style-name="T11">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11">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11">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11">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11">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38">Instruction<text:tab/><text:tab/>Opcode <text:tab/>Stack in<text:tab/><text:tab/>Stack out</text:p>
      <text:p text:style-name="P70">ivti off size lvt<text:tab/><text:tab/>192 qn qn<text:tab/>newtagval tagaddr<text:tab/>newtagval tagaddr</text:p>
      <text:p text:style-name="P70">ivtx off size lvt<text:tab/><text:tab/>101 qn qn<text:tab/>newtagval tagaddr<text:tab/>newtagval tagaddr</text:p>
      <text:p text:style-name="P70">ivtb off size lvt <text:tab/><text:tab/>102 qn qn<text:tab/>newtagval tagaddr<text:tab/>newtagval tagaddr</text:p>
      <text:p text:style-name="P37"><text:span text:style-name="T11">ivtc</text:span> off size lvt <text:tab/><text:tab/>111 qn qn<text:tab/>newtagval tagaddr<text:tab/>newtagval tagaddr</text:p>
      <text:p text:style-name="P37"/>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11">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11">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11">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11">lcp</text:span><text:tab/><text:tab/><text:tab/>135<text:tab/><text:tab/>addr<text:tab/><text:tab/><text:tab/>addr integer/<text:span text:style-name="T68">addr</text:span></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11">lda</text:span> p <text:span text:style-name="T68">off</text:span>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11">ldcb</text:span> bool <text:tab/><text:tab/>126 q8<text:tab/><text:tab/><text:tab/><text:tab/><text:tab/>boolean</text:p>
      <text:p text:style-name="No_20_Spacing"><text:span text:style-name="T11">ldcc</text:span> char <text:tab/><text:tab/>127 q8<text:tab/><text:tab/><text:tab/><text:tab/><text:tab/>character</text:p>
      <text:p text:style-name="No_20_Spacing"><text:span text:style-name="T11">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11">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11">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11">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text:soft-page-break/>Instruction<text:tab/><text:tab/>Opcode <text:tab/>Stack in<text:tab/><text:tab/>Stack out</text:p>
      <text:p text:style-name="No_20_Spacing"><text:span text:style-name="T11">ldoa</text:span> off<text:tab/><text:tab/><text:tab/>65 qn<text:tab/><text:tab/><text:tab/><text:tab/><text:tab/>address</text:p>
      <text:p text:style-name="No_20_Spacing"><text:span text:style-name="T11">ldob</text:span> off <text:tab/><text:tab/>68 qn<text:tab/><text:tab/><text:tab/><text:tab/><text:tab/>boolean</text:p>
      <text:p text:style-name="No_20_Spacing"><text:span text:style-name="T11">ldoc</text:span> off <text:tab/><text:tab/>69 a32<text:tab/><text:tab/><text:tab/><text:tab/><text:tab/>character</text:p>
      <text:p text:style-name="No_20_Spacing"><text:span text:style-name="T11">ldoi</text:span> <text:s/>off <text:tab/><text:tab/>1 qn<text:tab/><text:tab/><text:tab/><text:tab/><text:tab/>integer</text:p>
      <text:p text:style-name="No_20_Spacing">ldox off<text:tab/><text:tab/><text:tab/>194 qn<text:tab/><text:tab/><text:tab/><text:tab/><text:tab/>integer</text:p>
      <text:p text:style-name="No_20_Spacing"><text:span text:style-name="T11">ldor</text:span> off <text:tab/><text:tab/>66 qn<text:tab/><text:tab/><text:tab/><text:tab/><text:tab/>real</text:p>
      <text:p text:style-name="No_20_Spacing"><text:span text:style-name="T11">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38"/>
      <text:p text:style-name="P38">Instruction<text:tab/><text:tab/>Opcode<text:tab/>Stack in<text:tab/><text:tab/>Stack out</text:p>
      <text:p text:style-name="No_20_Spacing"><text:span text:style-name="T11">ldp<text:tab/><text:tab/><text:tab/>225<text:tab/><text:tab/>adr<text:tab/><text:tab/><text:tab/>adr </text:span><text:span text:style-name="T17">taddr</text:span></text:p>
      <text:p text:style-name="P61"/>
      <text:p text:style-name="No_20_Spacing"><text:span text:style-name="T11">Load complex pointer. Expects the address of the complex pointer as a address/length pair. Loads the complex pointer with the address first on stack, followed by the </text:span><text:span text:style-name="T17">template</text:span><text:span text:style-name="T11">. The original address is removed.</text:span></text:p>
      <text:p text:style-name="table_20_header1">Instruction<text:tab/><text:tab/>Opcode <text:tab/>Stack in<text:tab/><text:tab/>Stack out</text:p>
      <text:p text:style-name="P44"><text:span text:style-name="T11">leqb</text:span> <text:tab/><text:tab/><text:tab/>163<text:tab/><text:tab/>boolean boolean<text:tab/>boolean</text:p>
      <text:p text:style-name="P44">leqc <text:tab/><text:tab/><text:tab/>165<text:tab/><text:tab/>character character<text:tab/>boolean</text:p>
      <text:p text:style-name="P44">leqi <text:tab/><text:tab/><text:tab/>161<text:tab/><text:tab/>integer integer<text:tab/><text:tab/>boolean</text:p>
      <text:p text:style-name="P44">leqm size<text:tab/><text:tab/>166 qn<text:tab/><text:tab/>address address<text:tab/><text:tab/>boolean</text:p>
      <text:p text:style-name="P44">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1">leqv<text:tab/><text:tab/><text:tab/>219<text:tab/><text:tab/>sadr len sadr len<text:tab/><text:tab/>boolean</text:p>
      <text:p text:style-name="P61"/>
      <text:p text:style-name="P61">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p>
      <text:p text:style-name="P61"/>
      <text:p text:style-name="P61"/>
      <text:p text:style-name="P61"/>
      <text:p text:style-name="P61"/>
      <text:p text:style-name="P61"/>
      <text:p text:style-name="P61"/>
      <text:p text:style-name="P61"/>
      <text:p text:style-name="P61"/>
      <text:p text:style-name="P61"/>
      <text:p text:style-name="table_20_header1"><text:soft-page-break/>Instruction<text:tab/><text:tab/>Opcode <text:tab/>Stack in<text:tab/><text:tab/>Stack out</text:p>
      <text:p text:style-name="No_20_Spacing">lesb <text:tab/><text:tab/><text:tab/>169<text:tab/><text:tab/>boolean<text:tab/> boolean<text:tab/>boolean</text:p>
      <text:p text:style-name="No_20_Spacing">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1">lesv<text:tab/><text:tab/><text:tab/>217<text:tab/><text:tab/>sadr len sadr len<text:tab/><text:tab/>boolean</text:p>
      <text:p text:style-name="P61"/>
      <text:p text:style-name="P61">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p>
      <text:p text:style-name="table_20_header1">Instruction<text:tab/><text:tab/>Opcode<text:tab/>Stack in<text:tab/><text:tab/>Stack out</text:p>
      <text:p text:style-name="P61">lft tadr<text:tab/><text:tab/><text:tab/>213 qn<text:tab/><text:tab/>adr<text:tab/><text:tab/><text:tab/>adr tadr</text:p>
      <text:p text:style-name="P61"/>
      <text:p text:style-name="P61">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p>
      <text:p text:style-name="table_20_header1">Instruction<text:tab/><text:tab/>Opcode <text:tab/>Stack in<text:tab/><text:tab/>Stack out</text:p>
      <text:p text:style-name="Standard">lip p addr <text:tab/><text:tab/>120 p8 qn<text:tab/><text:tab/><text:tab/><text:tab/>mp pfaddr</text:p>
      <text:p text:style-name="Standard">load procedure/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P61">lnp gadr<text:tab/><text:tab/>20</text:p>
      <text:p text:style-name="P61"/>
      <text:p text:style-name="P61">This is an internal setup instruction for pint. It contains the address of the globals, which are then cleared to zero, and other setup operations are performed.</text:p>
      <text:p text:style-name="Standard"/>
      <text:p text:style-name="P92">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38">Instruction<text:tab/><text:tab/>Opcode<text:tab/>Stack in<text:tab/><text:tab/>Stack out</text:p>
      <text:p text:style-name="P61">lsa off<text:tab/><text:tab/><text:tab/>241<text:tab/><text:tab/><text:tab/><text:tab/><text:tab/>adr</text:p>
      <text:p text:style-name="P61"/>
      <text:p text:style-name="P61">Load stack address. Expects an offset to the current stack in the instruction. The offset is added to the current stack and the resulting address pushed onto stack. Used in overloaded operators to index parameters on the stack.</text:p>
      <text:p text:style-name="P61"/>
      <text:p text:style-name="P127">Instruction<text:tab/><text:tab/>Opcode<text:tab/>Stack in<text:tab/><text:tab/>Stack out</text:p>
      <text:p text:style-name="P128"><text:span text:style-name="T11">l</text:span><text:span text:style-name="T18">s</text:span><text:span text:style-name="T11">p<text:tab/><text:tab/><text:tab/>263<text:tab/><text:tab/>adr<text:tab/><text:tab/><text:tab/>adr </text:span><text:span text:style-name="T17">taddr</text:span></text:p>
      <text:p text:style-name="P62"/>
      <text:p text:style-name="P128"><text:span text:style-name="T11">Load </text:span><text:span text:style-name="T18">stack </text:span><text:span text:style-name="T11">complex pointer. Expects the address of the complex pointer as a address/length pair. Loads the complex pointer with the address first on stack, followed by the </text:span><text:span text:style-name="T17">template</text:span><text:span text:style-name="T11">. The original address is removed. </text:span><text:span text:style-name="T18">This instruction is identical to the ldp instruction, but is ignored by pgen.</text:span></text:p>
      <text:p text:style-name="table_20_header1">Instruction<text:tab/><text:tab/>Opcode<text:tab/>Stack in<text:tab/><text:tab/>Stack out</text:p>
      <text:p text:style-name="P61">ltcb off<text:tab/><text:tab/><text:tab/>259 qn<text:tab/><text:tab/><text:tab/><text:tab/><text:tab/>boolean</text:p>
      <text:p text:style-name="P61">ltcc off<text:tab/><text:tab/><text:tab/>260 qn<text:tab/><text:tab/><text:tab/><text:tab/><text:tab/>char</text:p>
      <text:p text:style-name="P61">ltci off<text:tab/><text:tab/><text:tab/>256 qn<text:tab/><text:tab/><text:tab/><text:tab/><text:tab/>integer</text:p>
      <text:p text:style-name="P61">ltcr off<text:tab/><text:tab/><text:tab/>257 qn<text:tab/><text:tab/><text:tab/><text:tab/><text:tab/>real</text:p>
      <text:p text:style-name="P61">ltcs off<text:tab/><text:tab/><text:tab/>258 qn<text:tab/><text:tab/><text:tab/><text:tab/><text:tab/>sadr</text:p>
      <text:p text:style-name="P61">ltcx off<text:tab/><text:tab/><text:tab/>261 qn<text:tab/><text:tab/><text:tab/><text:tab/><text:tab/>integer</text:p>
      <text:p text:style-name="P61"/>
      <text:p text:style-name="P61">Load from constants area. Expects an offset address to the constants area in the instruction. The constant is loaded by type and placed on stack.</text:p>
      <text:p text:style-name="Standard"/>
      <text:p text:style-name="P92">Instruction<text:tab/><text:tab/>Opcode<text:tab/>Stack in<text:tab/><text:tab/>Stack out</text:p>
      <text:p text:style-name="P61">lto off<text:tab/><text:tab/><text:tab/>262 qn<text:tab/><text:tab/><text:tab/><text:tab/><text:tab/>adr</text:p>
      <text:p text:style-name="P61"/>
      <text:p text:style-name="P61">Load constant address. Expects an offset address to the constants area in the instruction. An address to the constant is loaded to stack.</text:p>
      <text:p text:style-name="table_20_header1">Instruction<text:tab/><text:tab/>Opcode<text:tab/>Stack in<text:tab/><text:tab/>Stack out</text:p>
      <text:p text:style-name="P61">max lvl<text:tab/><text:tab/><text:tab/>214<text:tab/><text:tab/>lvl dadr tadr<text:tab/><text:tab/>integer</text:p>
      <text:p text:style-name="P61"/>
      <text:p text:style-name="P61">Find maximum dimension of array. Expects a level in the instruction, a level argument on stack, a data address followed by a template address or length. The length of the array at the level indicated is found and replaces the level, data address and template address on stack.</text:p>
      <text:p text:style-name="table_20_header1">Instruction<text:tab/><text:tab/>Opcode<text:tab/>Stack in<text:tab/><text:tab/>Stack out</text:p>
      <text:p text:style-name="P61">mdc off<text:tab/><text:tab/><text:tab/>254 qn<text:tab/><text:tab/>adr<text:tab/><text:tab/><text:tab/>dadr tadr</text:p>
      <text:p text:style-name="P61"/>
      <text:p text:style-name="P61">Make container pointer. Emitted when a pointer to a container is dereferenced: the single loaded pointer has to become the two-word complex pointer that container indexing uses. mdc leaves the address on top of stack (the data address) together with that address plus the instruction offset (the template address); the offset is the number of container dimensions times the integer size.</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P139">Instruction<text:tab/><text:tab/>Opcode <text:tab/>Stack in<text:tab/><text:tab/>Stack out</text:p>
      <text:p text:style-name="P138">m<text:span text:style-name="T75">pc dpth rev</text:span> <text:s text:c="2"/><text:tab/><text:tab/><text:span text:style-name="T76">248</text:span><text:tab/><text:tab/><text:span text:style-name="T75">dadr</text:span>/<text:span text:style-name="T75">tadr</text:span> <text:span text:style-name="T75">dadr/tadr</text:span><text:tab/><text:span text:style-name="T75">dadr</text:span>/<text:span text:style-name="T75">tadr</text:span></text:p>
      <text:p text:style-name="P140"><text:span text:style-name="T75">Make complex pointer. Takes a </text:span><text:span text:style-name="T76">data</text:span><text:span text:style-name="T75"> address and template </text:span><text:span text:style-name="T76">address</text:span><text:span text:style-name="T75">/length pair from the stack and makes a complex pointer from those. The instruction indicates the depth in the stack to find the pair, and rev indicates if the </text:span><text:span text:style-name="T76">template address is at stack top or the data address. This instruction is only used by pgen to find out when complex pointer pairs should be treated as one unit.</text:span></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38">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text:soft-page-break/>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Instruction<text:tab/><text:tab/>Opcode<text:tab/>Stack in<text:tab/><text:tab/>Stack out</text:p>
      <text:p text:style-name="P61">mse<text:tab/><text:tab/><text:tab/>209<text:tab/><text:tab/>vec madr, sadr, eadr</text:p>
      <text:p text:style-name="P61"/>
      <text:p text:style-name="No_20_Spacing"><text:span text:style-name="T11">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 </text:span><text:span text:style-name="T20">All parameters are removed from the stack.</text:span></text:p>
      <text:p text:style-name="P61"/>
      <text:p text:style-name="table_20_header1">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38"/>
      <text:p text:style-name="P38">Instruction<text:tab/><text:tab/>Opcode<text:tab/>Stack in<text:tab/><text:tab/>Stack out</text:p>
      <text:p text:style-name="P61">neqv<text:tab/><text:tab/><text:tab/>216<text:tab/><text:tab/>sadr len sadr len<text:tab/><text:tab/>boolean</text:p>
      <text:p text:style-name="P61"/>
      <text:p text:style-name="P61">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text:soft-page-break/>string, and returns true if so, otherwise false. Removes the two lengths and two addresses, and replaces them with the truth value.</text:p>
      <text:p text:style-name="table_20_header1">Instruction<text:tab/><text:tab/>Opcode <text:tab/>Stack in<text:tab/><text:tab/>Stack out</text:p>
      <text:p text:style-name="P165">ngi <text:s text:c="2"/><text:tab/><text:tab/><text:tab/>36<text:tab/><text:tab/>integer<text:tab/><text:tab/><text:tab/>integer</text:p>
      <text:p text:style-name="P165">ngr <text:s text:c="2"/><text:tab/><text:tab/><text:tab/>37<text:tab/><text:tab/>real<text:tab/><text:tab/><text:tab/>real</text:p>
      <text:p text:style-name="P165"/>
      <text:p text:style-name="No_20_Spacing">Negate. The operand atop the stack is negated according to type.</text:p>
      <text:p text:style-name="table_20_header1">Instruction<text:tab/><text:tab/>Opcode <text:tab/>Stack in<text:tab/><text:tab/>Stack out</text:p>
      <text:p text:style-name="P37">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table_20_header1">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parr <text:span text:style-name="T69">inx </text:span>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38">Instruction<text:tab/><text:tab/>Opcode<text:tab/>Stack in<text:tab/><text:tab/>Stack out</text:p>
      <text:p text:style-name="P61">ret<text:tab/><text:tab/><text:tab/>22<text:tab/><text:tab/>adr</text:p>
      <text:p text:style-name="P61"/>
      <text:p text:style-name="P61">Return from initializer code strip. Returns to the caller. This instruction is used to return from an initializer code strip, which is a short section of code used to set up parameterized variables. The return address is removed from stack.</text:p>
      <text:p text:style-name="Standard"/>
      <text:p text:style-name="P92">Instruction<text:tab/><text:tab/>Opcode <text:tab/>Stack in<text:tab/><text:tab/>Stack out</text:p>
      <text:p text:style-name="No_20_Spacing">reta <text:span text:style-name="T69">psize</text:span><text:tab/><text:tab/>132<text:tab/><text:tab/><text:tab/><text:tab/><text:tab/>address</text:p>
      <text:p text:style-name="No_20_Spacing">retb <text:span text:style-name="T69">psize</text:span><text:tab/><text:tab/>131<text:tab/><text:tab/><text:tab/><text:tab/><text:tab/>boolean</text:p>
      <text:p text:style-name="No_20_Spacing">retc <text:span text:style-name="T69">psize</text:span><text:tab/><text:tab/>130<text:tab/><text:tab/><text:tab/><text:tab/><text:tab/>character</text:p>
      <text:p text:style-name="No_20_Spacing">reti <text:span text:style-name="T69">psize</text:span> <text:tab/><text:tab/>128<text:tab/><text:tab/><text:tab/><text:tab/><text:tab/>integer</text:p>
      <text:p text:style-name="No_20_Spacing">retm <text:span text:style-name="T69">p</text:span>size<text:tab/><text:tab/>237 qn<text:tab/><text:tab/><text:tab/><text:tab/><text:tab/>structure</text:p>
      <text:p text:style-name="No_20_Spacing">retx <text:span text:style-name="T69">psize</text:span><text:tab/><text:tab/>204<text:tab/><text:tab/><text:tab/><text:tab/><text:tab/>integer</text:p>
      <text:p text:style-name="No_20_Spacing">retp <text:span text:style-name="T69">psize</text:span><text:tab/><text:tab/>14<text:tab/><text:tab/><text:tab/><text:tab/><text:tab/></text:p>
      <text:p text:style-name="No_20_Spacing">retr <text:span text:style-name="T69">psize</text:span> <text:tab/><text:tab/>129<text:tab/><text:tab/><text:tab/><text:tab/><text:tab/>real</text:p>
      <text:p text:style-name="No_20_Spacing">rets <text:span text:style-name="T69">psize</text:span><text:tab/><text:tab/>236<text:tab/><text:tab/><text:tab/><text:tab/><text:tab/>set</text:p>
      <text:p text:style-name="P37"/>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text:span text:style-name="T70">parameter total </text:span>size is indicated in the instruction.</text:p>
      <text:p text:style-name="table_20_header1">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Standard"/>
      <text:p text:style-name="P92">Instruction<text:tab/><text:tab/>Opcode<text:tab/>Stack in<text:tab/><text:tab/>Stack out</text:p>
      <text:p text:style-name="P61">scp<text:tab/><text:tab/><text:tab/>224<text:tab/><text:tab/>dadr tadr adr</text:p>
      <text:p text:style-name="P61"/>
      <text:p text:style-name="P61">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p>
      <text:p text:style-name="P61"/>
      <text:p text:style-name="P203">Instruction<text:tab/><text:tab/>Opcode<text:tab/>Stack in<text:tab/><text:tab/>Stack out</text:p>
      <text:p text:style-name="P73">s<text:span text:style-name="T124">ev</text:span><text:tab/><text:tab/><text:tab/>2<text:span text:style-name="T124">53 qn</text:span><text:tab/><text:tab/><text:span text:style-name="T124">evec<text:tab/><text:tab/><text:tab/>evec</text:span></text:p>
      <text:p text:style-name="P73"/>
      <text:p text:style-name="P229">Save exception vector to local. Expects an exception number/variable at stack top. Stores the exception <text:s/></text:p>
      <text:p text:style-name="P229">at the local offset. The exception vector is left on the stack.</text:p>
      <text:p text:style-name="table_20_header1">Instruction<text:tab/><text:tab/>Opcode <text:tab/>Stack in<text:tab/><text:tab/>Stack out</text:p>
      <text:p text:style-name="Standard">sfr <text:s/>rs <text:tab/><text:tab/><text:tab/>245<text:tab/><text:tab/><text:tab/><text:tab/><text:tab/></text:p>
      <text:p text:style-name="P71">Set function result. Expects the size of the function result for an upcoming function call as rs. rs bytes are allocated on the stack. This instruction is used to reserve space for the function result.</text:p>
      <text:p text:style-name="P143">Instruction<text:tab/><text:tab/>Opcode <text:tab/>Stack in<text:tab/><text:tab/>Stack out</text:p>
      <text:p text:style-name="P142">sf<text:span text:style-name="T78">s</text:span> <text:span text:style-name="T78">siz stk</text:span> <text:tab/><text:tab/>2<text:span text:style-name="T78">52</text:span><text:tab/><text:tab/><text:span text:style-name="T78">addr struct</text:span><text:tab/><text:tab/><text:tab/></text:p>
      <text:p text:style-name="P72">Store from stack. The instruction contains the size of the stack variable, and the size of the allocation. The stack contains the destination address. The variable is stored to the given address, then both the address and the variable on stack are removed.</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table_20_header1">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P92">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Standard"/>
      <text:p text:style-name="P92">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38">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text:soft-page-break/>Instruction<text:tab/><text:tab/>Opcode <text:tab/>Stack in<text:tab/><text:tab/>Stack out</text:p>
      <text:p text:style-name="Standard">upk sizep sizeu<text:tab/><text:tab/>64 qn qn<text:tab/>sindex upackarr packarr</text:p>
      <text:p text:style-name="Standard">Unpack a packed array. Pascal-P6 does not implement packing, so this instruction is implemented as a copy operation. Expects the size of the packed array <text:span text:style-name="reference">sizep</text:span> and the <text:span text:style-name="reference">size</text:span>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 <text:span text:style-name="T94">All parameters are removed from the stack.</text:span></text:p>
      <text:p text:style-name="table_20_header1">Instruction<text:tab/><text:tab/>Opcode <text:tab/>Stack in<text:tab/><text:tab/>Stack out</text:p>
      <text:p text:style-name="Standard">vbe<text:tab/><text:tab/><text:tab/>9<text:span text:style-name="T74">6</text:span>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P61">vdd<text:tab/><text:tab/><text:tab/>227<text:tab/><text:tab/>adr</text:p>
      <text:p text:style-name="P61"/>
      <text:p text:style-name="P61">Vector dispose array. Expects the address of a dynamically allocated array on stack. Disposes of the array. The address is removed from stack. This instruction is used to deallocate dynamically allocated arrays.</text:p>
      <text:p text:style-name="table_20_header1">Instruction<text:tab/><text:tab/>Opcode<text:tab/>Stack in<text:tab/><text:tab/>Stack out</text:p>
      <text:p text:style-name="P61">vdp<text:tab/><text:tab/><text:tab/>221<text:tab/><text:tab/>adr</text:p>
      <text:p text:style-name="P61"/>
      <text:p text:style-name="P61">Vector dispose array. Expects the address of a dynamically allocated array on stack. Disposes of the array. The address is removed from stack. This instruction is used to deallocate global parameterized arrays.</text:p>
      <text:p text:style-name="P61"/>
      <text:p text:style-name="table_20_header1">Instruction<text:tab/><text:tab/>Opcode <text:tab/>Stack in<text:tab/><text:tab/>Stack out</text:p>
      <text:p text:style-name="Standard">vin lvl siz<text:tab/><text:tab/>226 qn qn<text:tab/>adr siz [siz]...</text:p>
      <text:p text:style-name="Standard">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Standard"/>
      <text:p text:style-name="P92">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table_20_header1">Instruction<text:tab/><text:tab/>Opcode <text:tab/>Stack in<text:tab/><text:tab/>Stack out</text:p>
      <text:p text:style-name="Standard">xjp <text:s/>l addr<text:tab/><text:tab/>25 qn<text:tab/><text:tab/>index</text:p>
      <text:p text:style-name="Standard">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text:soft-page-break/>Instruction<text:tab/><text:tab/>Opcode<text:tab/>Stack in<text:tab/><text:tab/>Stack out</text:p>
      <text:p text:style-name="P61">xor<text:tab/><text:tab/><text:tab/>206<text:tab/><text:tab/>int int<text:tab/><text:tab/><text:tab/>int</text:p>
      <text:p text:style-name="P61"/>
      <text:p text:style-name="P61">‘xor’s integers or booleans. Expects two integers on stack or two booleans, which are treated the same. The integers are ‘xor’ed and the result replaces them on stack. If either integer is negative, an error results.</text:p>
      <text:p text:style-name="Standard"/>
      <text:h text:style-name="P214" text:outline-level="3"><text:bookmark-start text:name="__RefHeading___Toc15950_2478585429_Copy_"/>Instructions by number<text:bookmark-end text:name="__RefHeading___Toc15950_2478585429_Copy_"/><text:bookmark text:name="_Toc528309211_Copy_2"/><text:bookmark text:name="_Toc528309211_Copy_1"/></text:h>
      <table:table table:name="Table29" table:style-name="Table29">
        <table:table-column table:style-name="Table29.A" table:number-columns-repeated="4"/>
        <table:table-row table:style-name="Table29.1">
          <table:table-cell table:style-name="Table29.A1" office:value-type="string">
            <text:p text:style-name="P60">0</text:p>
          </table:table-cell>
          <table:table-cell table:style-name="Table29.A1" office:value-type="string">
            <text:p text:style-name="P60">lodi</text:p>
          </table:table-cell>
          <table:table-cell table:style-name="Table29.A1" office:value-type="string">
            <text:p text:style-name="P60">1</text:p>
          </table:table-cell>
          <table:table-cell table:style-name="Table29.A1" office:value-type="string">
            <text:p text:style-name="P60">ldoi</text:p>
          </table:table-cell>
        </table:table-row>
        <table:table-row table:style-name="Table29.1">
          <table:table-cell table:style-name="Table29.A1" office:value-type="string">
            <text:p text:style-name="P60">2</text:p>
          </table:table-cell>
          <table:table-cell table:style-name="Table29.A1" office:value-type="string">
            <text:p text:style-name="P60">stri</text:p>
          </table:table-cell>
          <table:table-cell table:style-name="Table29.A1" office:value-type="string">
            <text:p text:style-name="P60">3</text:p>
          </table:table-cell>
          <table:table-cell table:style-name="Table29.A1" office:value-type="string">
            <text:p text:style-name="P60">sroi</text:p>
          </table:table-cell>
        </table:table-row>
        <table:table-row table:style-name="Table29.1">
          <table:table-cell table:style-name="Table29.A1" office:value-type="string">
            <text:p text:style-name="P60">4</text:p>
          </table:table-cell>
          <table:table-cell table:style-name="Table29.A1" office:value-type="string">
            <text:p text:style-name="P60">lda</text:p>
          </table:table-cell>
          <table:table-cell table:style-name="Table29.A1" office:value-type="string">
            <text:p text:style-name="P60">5</text:p>
          </table:table-cell>
          <table:table-cell table:style-name="Table29.A1" office:value-type="string">
            <text:p text:style-name="P60">lao</text:p>
          </table:table-cell>
        </table:table-row>
        <table:table-row table:style-name="Table29.1">
          <table:table-cell table:style-name="Table29.A1" office:value-type="string">
            <text:p text:style-name="P60">6</text:p>
          </table:table-cell>
          <table:table-cell table:style-name="Table29.A1" office:value-type="string">
            <text:p text:style-name="P60">stoi</text:p>
          </table:table-cell>
          <table:table-cell table:style-name="Table29.A1" office:value-type="string">
            <text:p text:style-name="P60">7</text:p>
          </table:table-cell>
          <table:table-cell table:style-name="Table29.A1" office:value-type="string">
            <text:p text:style-name="P60">ldcs</text:p>
          </table:table-cell>
        </table:table-row>
        <table:table-row table:style-name="Table29.1">
          <table:table-cell table:style-name="Table29.A1" office:value-type="string">
            <text:p text:style-name="P60">8</text:p>
          </table:table-cell>
          <table:table-cell table:style-name="Table29.A1" office:value-type="string">
            <text:p text:style-name="P60">cjp</text:p>
          </table:table-cell>
          <table:table-cell table:style-name="Table29.A1" office:value-type="string">
            <text:p text:style-name="P60">9</text:p>
          </table:table-cell>
          <table:table-cell table:style-name="Table29.A1" office:value-type="string">
            <text:p text:style-name="P60">indi</text:p>
          </table:table-cell>
        </table:table-row>
        <table:table-row table:style-name="Table29.1">
          <table:table-cell table:style-name="Table29.A1" office:value-type="string">
            <text:p text:style-name="P60">10</text:p>
          </table:table-cell>
          <table:table-cell table:style-name="Table29.A1" office:value-type="string">
            <text:p text:style-name="P60">inci</text:p>
          </table:table-cell>
          <table:table-cell table:style-name="Table29.A1" office:value-type="string">
            <text:p text:style-name="P60">11</text:p>
          </table:table-cell>
          <table:table-cell table:style-name="Table29.A1" office:value-type="string">
            <text:p text:style-name="P60">mst</text:p>
          </table:table-cell>
        </table:table-row>
        <table:table-row table:style-name="Table29.1">
          <table:table-cell table:style-name="Table29.A1" office:value-type="string">
            <text:p text:style-name="P60">12</text:p>
          </table:table-cell>
          <table:table-cell table:style-name="Table29.A1" office:value-type="string">
            <text:p text:style-name="P60">cup</text:p>
          </table:table-cell>
          <table:table-cell table:style-name="Table29.A1" office:value-type="string">
            <text:p text:style-name="P60">13</text:p>
          </table:table-cell>
          <table:table-cell table:style-name="Table29.A1" office:value-type="string">
            <text:p text:style-name="P60">rip</text:p>
          </table:table-cell>
        </table:table-row>
        <table:table-row table:style-name="Table29.1">
          <table:table-cell table:style-name="Table29.A1" office:value-type="string">
            <text:p text:style-name="P60">14</text:p>
          </table:table-cell>
          <table:table-cell table:style-name="Table29.A1" office:value-type="string">
            <text:p text:style-name="P60">retp</text:p>
          </table:table-cell>
          <table:table-cell table:style-name="Table29.A1" office:value-type="string">
            <text:p text:style-name="P60">15</text:p>
          </table:table-cell>
          <table:table-cell table:style-name="Table29.A1" office:value-type="string">
            <text:p text:style-name="P60">csp</text:p>
          </table:table-cell>
        </table:table-row>
        <table:table-row table:style-name="Table29.1">
          <table:table-cell table:style-name="Table29.A1" office:value-type="string">
            <text:p text:style-name="P60">16</text:p>
          </table:table-cell>
          <table:table-cell table:style-name="Table29.A1" office:value-type="string">
            <text:p text:style-name="P60">ixa</text:p>
          </table:table-cell>
          <table:table-cell table:style-name="Table29.A1" office:value-type="string">
            <text:p text:style-name="P60">17</text:p>
          </table:table-cell>
          <table:table-cell table:style-name="Table29.A1" office:value-type="string">
            <text:p text:style-name="P60">equa</text:p>
          </table:table-cell>
        </table:table-row>
        <table:table-row table:style-name="Table29.1">
          <table:table-cell table:style-name="Table29.A1" office:value-type="string">
            <text:p text:style-name="P60">18</text:p>
          </table:table-cell>
          <table:table-cell table:style-name="Table29.A1" office:value-type="string">
            <text:p text:style-name="P60">neqa</text:p>
          </table:table-cell>
          <table:table-cell table:style-name="Table29.A1" office:value-type="string">
            <text:p text:style-name="P60">19</text:p>
          </table:table-cell>
          <table:table-cell table:style-name="Table29.A1" office:value-type="string">
            <text:p text:style-name="P60">brk</text:p>
          </table:table-cell>
        </table:table-row>
        <table:table-row table:style-name="Table29.1">
          <table:table-cell table:style-name="Table29.A1" office:value-type="string">
            <text:p text:style-name="P60">20</text:p>
          </table:table-cell>
          <table:table-cell table:style-name="Table29.A1" office:value-type="string">
            <text:p text:style-name="P60">lnp</text:p>
          </table:table-cell>
          <table:table-cell table:style-name="Table29.A1" office:value-type="string">
            <text:p text:style-name="P60">21</text:p>
          </table:table-cell>
          <table:table-cell table:style-name="Table29.A1" office:value-type="string">
            <text:p text:style-name="P60">cal</text:p>
          </table:table-cell>
        </table:table-row>
        <table:table-row table:style-name="Table29.1">
          <table:table-cell table:style-name="Table29.A1" office:value-type="string">
            <text:p text:style-name="P60">22</text:p>
          </table:table-cell>
          <table:table-cell table:style-name="Table29.A1" office:value-type="string">
            <text:p text:style-name="P60">ret</text:p>
          </table:table-cell>
          <table:table-cell table:style-name="Table29.A1" office:value-type="string">
            <text:p text:style-name="P60">23</text:p>
          </table:table-cell>
          <table:table-cell table:style-name="Table29.A1" office:value-type="string">
            <text:p text:style-name="P60">ujp</text:p>
          </table:table-cell>
        </table:table-row>
        <table:table-row table:style-name="Table29.1">
          <table:table-cell table:style-name="Table29.A1" office:value-type="string">
            <text:p text:style-name="P60">24</text:p>
          </table:table-cell>
          <table:table-cell table:style-name="Table29.A1" office:value-type="string">
            <text:p text:style-name="P60">fjp</text:p>
          </table:table-cell>
          <table:table-cell table:style-name="Table29.A1" office:value-type="string">
            <text:p text:style-name="P60">25</text:p>
          </table:table-cell>
          <table:table-cell table:style-name="Table29.A1" office:value-type="string">
            <text:p text:style-name="P60">xjp</text:p>
          </table:table-cell>
        </table:table-row>
        <table:table-row table:style-name="Table29.1">
          <table:table-cell table:style-name="Table29.A1" office:value-type="string">
            <text:p text:style-name="P60">26</text:p>
          </table:table-cell>
          <table:table-cell table:style-name="Table29.A1" office:value-type="string">
            <text:p text:style-name="P60">chki</text:p>
          </table:table-cell>
          <table:table-cell table:style-name="Table29.A1" office:value-type="string">
            <text:p text:style-name="P60">27</text:p>
          </table:table-cell>
          <table:table-cell table:style-name="Table29.A1" office:value-type="string">
            <text:p text:style-name="P60">cuv</text:p>
          </table:table-cell>
        </table:table-row>
        <table:table-row table:style-name="Table29.1">
          <table:table-cell table:style-name="Table29.A1" office:value-type="string">
            <text:p text:style-name="P60">28</text:p>
          </table:table-cell>
          <table:table-cell table:style-name="Table29.A1" office:value-type="string">
            <text:p text:style-name="P60">adi</text:p>
          </table:table-cell>
          <table:table-cell table:style-name="Table29.A1" office:value-type="string">
            <text:p text:style-name="P60">29</text:p>
          </table:table-cell>
          <table:table-cell table:style-name="Table29.A1" office:value-type="string">
            <text:p text:style-name="P60">adr</text:p>
          </table:table-cell>
        </table:table-row>
        <table:table-row table:style-name="Table29.1">
          <table:table-cell table:style-name="Table29.A1" office:value-type="string">
            <text:p text:style-name="P60">30</text:p>
          </table:table-cell>
          <table:table-cell table:style-name="Table29.A1" office:value-type="string">
            <text:p text:style-name="P60">sbi</text:p>
          </table:table-cell>
          <table:table-cell table:style-name="Table29.A1" office:value-type="string">
            <text:p text:style-name="P60">31</text:p>
          </table:table-cell>
          <table:table-cell table:style-name="Table29.A1" office:value-type="string">
            <text:p text:style-name="P60">sbr</text:p>
          </table:table-cell>
        </table:table-row>
        <table:table-row table:style-name="Table29.1">
          <table:table-cell table:style-name="Table29.A1" office:value-type="string">
            <text:p text:style-name="P60">32</text:p>
          </table:table-cell>
          <table:table-cell table:style-name="Table29.A1" office:value-type="string">
            <text:p text:style-name="P60">sgs</text:p>
          </table:table-cell>
          <table:table-cell table:style-name="Table29.A1" office:value-type="string">
            <text:p text:style-name="P60">33</text:p>
          </table:table-cell>
          <table:table-cell table:style-name="Table29.A1" office:value-type="string">
            <text:p text:style-name="P60">flt</text:p>
          </table:table-cell>
        </table:table-row>
        <table:table-row table:style-name="Table29.1">
          <table:table-cell table:style-name="Table29.A1" office:value-type="string">
            <text:p text:style-name="P60">34</text:p>
          </table:table-cell>
          <table:table-cell table:style-name="Table29.A1" office:value-type="string">
            <text:p text:style-name="P60">flo</text:p>
          </table:table-cell>
          <table:table-cell table:style-name="Table29.A1" office:value-type="string">
            <text:p text:style-name="P60">35</text:p>
          </table:table-cell>
          <table:table-cell table:style-name="Table29.A1" office:value-type="string">
            <text:p text:style-name="P60">trc</text:p>
          </table:table-cell>
        </table:table-row>
        <table:table-row table:style-name="Table29.1">
          <table:table-cell table:style-name="Table29.A1" office:value-type="string">
            <text:p text:style-name="P60">36</text:p>
          </table:table-cell>
          <table:table-cell table:style-name="Table29.A1" office:value-type="string">
            <text:p text:style-name="P60">ngi</text:p>
          </table:table-cell>
          <table:table-cell table:style-name="Table29.A1" office:value-type="string">
            <text:p text:style-name="P60">37</text:p>
          </table:table-cell>
          <table:table-cell table:style-name="Table29.A1" office:value-type="string">
            <text:p text:style-name="P60">ngr</text:p>
          </table:table-cell>
        </table:table-row>
        <table:table-row table:style-name="Table29.1">
          <table:table-cell table:style-name="Table29.A1" office:value-type="string">
            <text:p text:style-name="P60">38</text:p>
          </table:table-cell>
          <table:table-cell table:style-name="Table29.A1" office:value-type="string">
            <text:p text:style-name="P60">sqi</text:p>
          </table:table-cell>
          <table:table-cell table:style-name="Table29.A1" office:value-type="string">
            <text:p text:style-name="P60">39</text:p>
          </table:table-cell>
          <table:table-cell table:style-name="Table29.A1" office:value-type="string">
            <text:p text:style-name="P60">sqr</text:p>
          </table:table-cell>
        </table:table-row>
        <table:table-row table:style-name="Table29.1">
          <table:table-cell table:style-name="Table29.A1" office:value-type="string">
            <text:p text:style-name="P60">40</text:p>
          </table:table-cell>
          <table:table-cell table:style-name="Table29.A1" office:value-type="string">
            <text:p text:style-name="P60">abi</text:p>
          </table:table-cell>
          <table:table-cell table:style-name="Table29.A1" office:value-type="string">
            <text:p text:style-name="P60">41</text:p>
          </table:table-cell>
          <table:table-cell table:style-name="Table29.A1" office:value-type="string">
            <text:p text:style-name="P60">abr</text:p>
          </table:table-cell>
        </table:table-row>
        <table:table-row table:style-name="Table29.1">
          <table:table-cell table:style-name="Table29.A1" office:value-type="string">
            <text:p text:style-name="P60">42</text:p>
          </table:table-cell>
          <table:table-cell table:style-name="Table29.A1" office:value-type="string">
            <text:p text:style-name="P60">notb</text:p>
          </table:table-cell>
          <table:table-cell table:style-name="Table29.A1" office:value-type="string">
            <text:p text:style-name="P60">43</text:p>
          </table:table-cell>
          <table:table-cell table:style-name="Table29.A1" office:value-type="string">
            <text:p text:style-name="P60">and</text:p>
          </table:table-cell>
        </table:table-row>
        <table:table-row table:style-name="Table29.1">
          <table:table-cell table:style-name="Table29.A1" office:value-type="string">
            <text:p text:style-name="P60">44</text:p>
          </table:table-cell>
          <table:table-cell table:style-name="Table29.A1" office:value-type="string">
            <text:p text:style-name="P60">ior</text:p>
          </table:table-cell>
          <table:table-cell table:style-name="Table29.A1" office:value-type="string">
            <text:p text:style-name="P60">45</text:p>
          </table:table-cell>
          <table:table-cell table:style-name="Table29.A1" office:value-type="string">
            <text:p text:style-name="P60">dif</text:p>
          </table:table-cell>
        </table:table-row>
        <table:table-row table:style-name="Table29.1">
          <table:table-cell table:style-name="Table29.A1" office:value-type="string">
            <text:p text:style-name="P60">46</text:p>
          </table:table-cell>
          <table:table-cell table:style-name="Table29.A1" office:value-type="string">
            <text:p text:style-name="P60">int</text:p>
          </table:table-cell>
          <table:table-cell table:style-name="Table29.A1" office:value-type="string">
            <text:p text:style-name="P60">47</text:p>
          </table:table-cell>
          <table:table-cell table:style-name="Table29.A1" office:value-type="string">
            <text:p text:style-name="P60">uni</text:p>
          </table:table-cell>
        </table:table-row>
        <table:table-row table:style-name="Table29.1">
          <table:table-cell table:style-name="Table29.A1" office:value-type="string">
            <text:p text:style-name="P60">48</text:p>
          </table:table-cell>
          <table:table-cell table:style-name="Table29.A1" office:value-type="string">
            <text:p text:style-name="P60">inn</text:p>
          </table:table-cell>
          <table:table-cell table:style-name="Table29.A1" office:value-type="string">
            <text:p text:style-name="P60">49</text:p>
          </table:table-cell>
          <table:table-cell table:style-name="Table29.A1" office:value-type="string">
            <text:p text:style-name="P60">mod</text:p>
          </table:table-cell>
        </table:table-row>
        <table:table-row table:style-name="Table29.1">
          <table:table-cell table:style-name="Table29.A1" office:value-type="string">
            <text:p text:style-name="P60">50</text:p>
          </table:table-cell>
          <table:table-cell table:style-name="Table29.A1" office:value-type="string">
            <text:p text:style-name="P60">odd</text:p>
          </table:table-cell>
          <table:table-cell table:style-name="Table29.A1" office:value-type="string">
            <text:p text:style-name="P60">51</text:p>
          </table:table-cell>
          <table:table-cell table:style-name="Table29.A1" office:value-type="string">
            <text:p text:style-name="P60">mpi</text:p>
          </table:table-cell>
        </table:table-row>
        <table:table-row table:style-name="Table29.1">
          <table:table-cell table:style-name="Table29.A1" office:value-type="string">
            <text:p text:style-name="P60">52</text:p>
          </table:table-cell>
          <table:table-cell table:style-name="Table29.A1" office:value-type="string">
            <text:p text:style-name="P60">mpr</text:p>
          </table:table-cell>
          <table:table-cell table:style-name="Table29.A1" office:value-type="string">
            <text:p text:style-name="P60">53</text:p>
          </table:table-cell>
          <table:table-cell table:style-name="Table29.A1" office:value-type="string">
            <text:p text:style-name="P60">dvi</text:p>
          </table:table-cell>
        </table:table-row>
        <table:table-row table:style-name="Table29.1">
          <table:table-cell table:style-name="Table29.A1" office:value-type="string">
            <text:p text:style-name="P60">54</text:p>
          </table:table-cell>
          <table:table-cell table:style-name="Table29.A1" office:value-type="string">
            <text:p text:style-name="P60">dvr</text:p>
          </table:table-cell>
          <table:table-cell table:style-name="Table29.A1" office:value-type="string">
            <text:p text:style-name="P60">55</text:p>
          </table:table-cell>
          <table:table-cell table:style-name="Table29.A1" office:value-type="string">
            <text:p text:style-name="P60">mov</text:p>
          </table:table-cell>
        </table:table-row>
        <table:table-row table:style-name="Table29.1">
          <table:table-cell table:style-name="Table29.A1" office:value-type="string">
            <text:p text:style-name="P60">56</text:p>
          </table:table-cell>
          <table:table-cell table:style-name="Table29.A1" office:value-type="string">
            <text:p text:style-name="P60">lca</text:p>
          </table:table-cell>
          <table:table-cell table:style-name="Table29.A1" office:value-type="string">
            <text:p text:style-name="P60">57</text:p>
          </table:table-cell>
          <table:table-cell table:style-name="Table29.A1" office:value-type="string">
            <text:p text:style-name="P60">deci</text:p>
          </table:table-cell>
        </table:table-row>
        <table:table-row table:style-name="Table29.1">
          <table:table-cell table:style-name="Table29.A1" office:value-type="string">
            <text:p text:style-name="P60">58</text:p>
          </table:table-cell>
          <table:table-cell table:style-name="Table29.A1" office:value-type="string">
            <text:p text:style-name="P60">stp</text:p>
          </table:table-cell>
          <table:table-cell table:style-name="Table29.A1" office:value-type="string">
            <text:p text:style-name="P60">59</text:p>
          </table:table-cell>
          <table:table-cell table:style-name="Table29.A1" office:value-type="string">
            <text:p text:style-name="P60">ordi</text:p>
          </table:table-cell>
        </table:table-row>
        <table:table-row table:style-name="Table29.1">
          <table:table-cell table:style-name="Table29.A1" office:value-type="string">
            <text:p text:style-name="P60">60</text:p>
          </table:table-cell>
          <table:table-cell table:style-name="Table29.A1" office:value-type="string">
            <text:p text:style-name="P60">chr</text:p>
          </table:table-cell>
          <table:table-cell table:style-name="Table29.A1" office:value-type="string">
            <text:p text:style-name="P60">61</text:p>
          </table:table-cell>
          <table:table-cell table:style-name="Table29.A1" office:value-type="string">
            <text:p text:style-name="P60">ujc</text:p>
          </table:table-cell>
        </table:table-row>
        <table:table-row table:style-name="Table29.1">
          <table:table-cell table:style-name="Table29.A1" office:value-type="string">
            <text:p text:style-name="P60">62</text:p>
          </table:table-cell>
          <table:table-cell table:style-name="Table29.A1" office:value-type="string">
            <text:p text:style-name="P60">rnd</text:p>
          </table:table-cell>
          <table:table-cell table:style-name="Table29.A1" office:value-type="string">
            <text:p text:style-name="P60">63</text:p>
          </table:table-cell>
          <table:table-cell table:style-name="Table29.A1" office:value-type="string">
            <text:p text:style-name="P60">pck</text:p>
          </table:table-cell>
        </table:table-row>
        <table:table-row table:style-name="Table29.1">
          <table:table-cell table:style-name="Table29.A1" office:value-type="string">
            <text:p text:style-name="P60">64</text:p>
          </table:table-cell>
          <table:table-cell table:style-name="Table29.A1" office:value-type="string">
            <text:p text:style-name="P60">upk</text:p>
          </table:table-cell>
          <table:table-cell table:style-name="Table29.A1" office:value-type="string">
            <text:p text:style-name="P60">65</text:p>
          </table:table-cell>
          <table:table-cell table:style-name="Table29.A1" office:value-type="string">
            <text:p text:style-name="P60">ldoa</text:p>
          </table:table-cell>
        </table:table-row>
        <table:table-row table:style-name="Table29.1">
          <table:table-cell table:style-name="Table29.A1" office:value-type="string">
            <text:p text:style-name="P60">66</text:p>
          </table:table-cell>
          <table:table-cell table:style-name="Table29.A1" office:value-type="string">
            <text:p text:style-name="P60">ldor</text:p>
          </table:table-cell>
          <table:table-cell table:style-name="Table29.A1" office:value-type="string">
            <text:p text:style-name="P60">67</text:p>
          </table:table-cell>
          <table:table-cell table:style-name="Table29.A1" office:value-type="string">
            <text:p text:style-name="P60">ldos</text:p>
          </table:table-cell>
        </table:table-row>
        <table:table-row table:style-name="Table29.1">
          <table:table-cell table:style-name="Table29.A1" office:value-type="string">
            <text:p text:style-name="P60">68</text:p>
          </table:table-cell>
          <table:table-cell table:style-name="Table29.A1" office:value-type="string">
            <text:p text:style-name="P60">ldob</text:p>
          </table:table-cell>
          <table:table-cell table:style-name="Table29.A1" office:value-type="string">
            <text:p text:style-name="P60">69</text:p>
          </table:table-cell>
          <table:table-cell table:style-name="Table29.A1" office:value-type="string">
            <text:p text:style-name="P60">ldoc</text:p>
          </table:table-cell>
        </table:table-row>
        <table:table-row table:style-name="Table29.1">
          <table:table-cell table:style-name="Table29.A1" office:value-type="string">
            <text:p text:style-name="P60">70</text:p>
          </table:table-cell>
          <table:table-cell table:style-name="Table29.A1" office:value-type="string">
            <text:p text:style-name="P60">stra</text:p>
          </table:table-cell>
          <table:table-cell table:style-name="Table29.A1" office:value-type="string">
            <text:p text:style-name="P60">71</text:p>
          </table:table-cell>
          <table:table-cell table:style-name="Table29.A1" office:value-type="string">
            <text:p text:style-name="P60">strr</text:p>
          </table:table-cell>
        </table:table-row>
        <table:table-row table:style-name="Table29.1">
          <table:table-cell table:style-name="Table29.A1" office:value-type="string">
            <text:p text:style-name="P60">72</text:p>
          </table:table-cell>
          <table:table-cell table:style-name="Table29.A1" office:value-type="string">
            <text:p text:style-name="P60">strs</text:p>
          </table:table-cell>
          <table:table-cell table:style-name="Table29.A1" office:value-type="string">
            <text:p text:style-name="P60">73</text:p>
          </table:table-cell>
          <table:table-cell table:style-name="Table29.A1" office:value-type="string">
            <text:p text:style-name="P60">strb</text:p>
          </table:table-cell>
        </table:table-row>
        <table:table-row table:style-name="Table29.1">
          <table:table-cell table:style-name="Table29.A1" office:value-type="string">
            <text:p text:style-name="P60">74</text:p>
          </table:table-cell>
          <table:table-cell table:style-name="Table29.A1" office:value-type="string">
            <text:p text:style-name="P60">strc</text:p>
          </table:table-cell>
          <table:table-cell table:style-name="Table29.A1" office:value-type="string">
            <text:p text:style-name="P60">75</text:p>
          </table:table-cell>
          <table:table-cell table:style-name="Table29.A1" office:value-type="string">
            <text:p text:style-name="P60">sroa</text:p>
          </table:table-cell>
        </table:table-row>
        <table:table-row table:style-name="Table29.1">
          <table:table-cell table:style-name="Table29.A1" office:value-type="string">
            <text:p text:style-name="P60">76</text:p>
          </table:table-cell>
          <table:table-cell table:style-name="Table29.A1" office:value-type="string">
            <text:p text:style-name="P60">sror</text:p>
          </table:table-cell>
          <table:table-cell table:style-name="Table29.A1" office:value-type="string">
            <text:p text:style-name="P60">77</text:p>
          </table:table-cell>
          <table:table-cell table:style-name="Table29.A1" office:value-type="string">
            <text:p text:style-name="P60">sros</text:p>
          </table:table-cell>
        </table:table-row>
        <table:table-row table:style-name="Table29.1">
          <table:table-cell table:style-name="Table29.A1" office:value-type="string">
            <text:p text:style-name="P60">78</text:p>
          </table:table-cell>
          <table:table-cell table:style-name="Table29.A1" office:value-type="string">
            <text:p text:style-name="P60">srob</text:p>
          </table:table-cell>
          <table:table-cell table:style-name="Table29.A1" office:value-type="string">
            <text:p text:style-name="P60">79</text:p>
          </table:table-cell>
          <table:table-cell table:style-name="Table29.A1" office:value-type="string">
            <text:p text:style-name="P60">sroc</text:p>
          </table:table-cell>
        </table:table-row>
        <table:table-row table:style-name="Table29.1">
          <table:table-cell table:style-name="Table29.A1" office:value-type="string">
            <text:p text:style-name="P60">80</text:p>
          </table:table-cell>
          <table:table-cell table:style-name="Table29.A1" office:value-type="string">
            <text:p text:style-name="P60">stoa</text:p>
          </table:table-cell>
          <table:table-cell table:style-name="Table29.A1" office:value-type="string">
            <text:p text:style-name="P60">81</text:p>
          </table:table-cell>
          <table:table-cell table:style-name="Table29.A1" office:value-type="string">
            <text:p text:style-name="P60">stor</text:p>
          </table:table-cell>
        </table:table-row>
        <table:table-row table:style-name="Table29.1">
          <table:table-cell table:style-name="Table29.A1" office:value-type="string">
            <text:p text:style-name="P60">82</text:p>
          </table:table-cell>
          <table:table-cell table:style-name="Table29.A1" office:value-type="string">
            <text:p text:style-name="P60">stos</text:p>
          </table:table-cell>
          <table:table-cell table:style-name="Table29.A1" office:value-type="string">
            <text:p text:style-name="P60">83</text:p>
          </table:table-cell>
          <table:table-cell table:style-name="Table29.A1" office:value-type="string">
            <text:p text:style-name="P60">stob</text:p>
          </table:table-cell>
        </table:table-row>
        <table:table-row table:style-name="Table29.1">
          <table:table-cell table:style-name="Table29.A1" office:value-type="string">
            <text:p text:style-name="P60">84</text:p>
          </table:table-cell>
          <table:table-cell table:style-name="Table29.A1" office:value-type="string">
            <text:p text:style-name="P60">stoc</text:p>
          </table:table-cell>
          <table:table-cell table:style-name="Table29.A1" office:value-type="string">
            <text:p text:style-name="P60">85</text:p>
          </table:table-cell>
          <table:table-cell table:style-name="Table29.A1" office:value-type="string">
            <text:p text:style-name="P60">inda</text:p>
          </table:table-cell>
        </table:table-row>
        <table:table-row table:style-name="Table29.1">
          <table:table-cell table:style-name="Table29.A1" office:value-type="string">
            <text:p text:style-name="P60">86</text:p>
          </table:table-cell>
          <table:table-cell table:style-name="Table29.A1" office:value-type="string">
            <text:p text:style-name="P60">indr</text:p>
          </table:table-cell>
          <table:table-cell table:style-name="Table29.A1" office:value-type="string">
            <text:p text:style-name="P60">87</text:p>
          </table:table-cell>
          <table:table-cell table:style-name="Table29.A1" office:value-type="string">
            <text:p text:style-name="P60">inds</text:p>
          </table:table-cell>
        </table:table-row>
        <text:soft-page-break/>
        <table:table-row table:style-name="Table29.1">
          <table:table-cell table:style-name="Table29.A1" office:value-type="string">
            <text:p text:style-name="P60">88</text:p>
          </table:table-cell>
          <table:table-cell table:style-name="Table29.A1" office:value-type="string">
            <text:p text:style-name="P60">indb</text:p>
          </table:table-cell>
          <table:table-cell table:style-name="Table29.A1" office:value-type="string">
            <text:p text:style-name="P60">89</text:p>
          </table:table-cell>
          <table:table-cell table:style-name="Table29.A1" office:value-type="string">
            <text:p text:style-name="P60">indc</text:p>
          </table:table-cell>
        </table:table-row>
        <table:table-row table:style-name="Table29.1">
          <table:table-cell table:style-name="Table29.A1" office:value-type="string">
            <text:p text:style-name="P60">90</text:p>
          </table:table-cell>
          <table:table-cell table:style-name="Table29.A1" office:value-type="string">
            <text:p text:style-name="P60">inca</text:p>
          </table:table-cell>
          <table:table-cell table:style-name="Table29.A1" office:value-type="string">
            <text:p text:style-name="P60">91</text:p>
          </table:table-cell>
          <table:table-cell table:style-name="Table29.A1" office:value-type="string">
            <text:p text:style-name="P60">suv</text:p>
          </table:table-cell>
        </table:table-row>
        <table:table-row table:style-name="Table29.1">
          <table:table-cell table:style-name="Table29.A1" office:value-type="string">
            <text:p text:style-name="P60">92</text:p>
          </table:table-cell>
          <table:table-cell table:style-name="Table29.A1" office:value-type="string">
            <text:p text:style-name="P60">vbs</text:p>
          </table:table-cell>
          <table:table-cell table:style-name="Table29.A1" office:value-type="string">
            <text:p text:style-name="P60">93</text:p>
          </table:table-cell>
          <table:table-cell table:style-name="Table29.A1" office:value-type="string">
            <text:p text:style-name="P60">incb</text:p>
          </table:table-cell>
        </table:table-row>
        <table:table-row table:style-name="Table29.1">
          <table:table-cell table:style-name="Table29.A1" office:value-type="string">
            <text:p text:style-name="P60">94</text:p>
          </table:table-cell>
          <table:table-cell table:style-name="Table29.A1" office:value-type="string">
            <text:p text:style-name="P60">incc</text:p>
          </table:table-cell>
          <table:table-cell table:style-name="Table29.A1" office:value-type="string">
            <text:p text:style-name="P60">95</text:p>
          </table:table-cell>
          <table:table-cell table:style-name="Table29.A1" office:value-type="string">
            <text:p text:style-name="P60">chka</text:p>
          </table:table-cell>
        </table:table-row>
        <table:table-row table:style-name="Table29.1">
          <table:table-cell table:style-name="Table29.A1" office:value-type="string">
            <text:p text:style-name="P60">96</text:p>
          </table:table-cell>
          <table:table-cell table:style-name="Table29.A1" office:value-type="string">
            <text:p text:style-name="P60">vbe</text:p>
          </table:table-cell>
          <table:table-cell table:style-name="Table29.A1" office:value-type="string">
            <text:p text:style-name="P60">97</text:p>
          </table:table-cell>
          <table:table-cell table:style-name="Table29.A1" office:value-type="string">
            <text:p text:style-name="P60">chks</text:p>
          </table:table-cell>
        </table:table-row>
        <table:table-row table:style-name="Table29.1">
          <table:table-cell table:style-name="Table29.A1" office:value-type="string">
            <text:p text:style-name="P60">98</text:p>
          </table:table-cell>
          <table:table-cell table:style-name="Table29.A1" office:value-type="string">
            <text:p text:style-name="P60">chkb</text:p>
          </table:table-cell>
          <table:table-cell table:style-name="Table29.A1" office:value-type="string">
            <text:p text:style-name="P60">99</text:p>
          </table:table-cell>
          <table:table-cell table:style-name="Table29.A1" office:value-type="string">
            <text:p text:style-name="P60">chkc</text:p>
          </table:table-cell>
        </table:table-row>
        <table:table-row table:style-name="Table29.1">
          <table:table-cell table:style-name="Table29.A1" office:value-type="string">
            <text:p text:style-name="P60">100</text:p>
          </table:table-cell>
          <table:table-cell table:style-name="Table29.A1" office:value-type="string">
            <text:p text:style-name="P60">cvbi</text:p>
          </table:table-cell>
          <table:table-cell table:style-name="Table29.A1" office:value-type="string">
            <text:p text:style-name="P60">101</text:p>
          </table:table-cell>
          <table:table-cell table:style-name="Table29.A1" office:value-type="string">
            <text:p text:style-name="P60">ivtx</text:p>
          </table:table-cell>
        </table:table-row>
        <table:table-row table:style-name="Table29.1">
          <table:table-cell table:style-name="Table29.A1" office:value-type="string">
            <text:p text:style-name="P60">102</text:p>
          </table:table-cell>
          <table:table-cell table:style-name="Table29.A1" office:value-type="string">
            <text:p text:style-name="P60">ivtb</text:p>
          </table:table-cell>
          <table:table-cell table:style-name="Table29.A1" office:value-type="string">
            <text:p text:style-name="P60">103</text:p>
          </table:table-cell>
          <table:table-cell table:style-name="Table29.A1" office:value-type="string">
            <text:p text:style-name="P60">decb</text:p>
          </table:table-cell>
        </table:table-row>
        <table:table-row table:style-name="Table29.1">
          <table:table-cell table:style-name="Table29.A1" office:value-type="string">
            <text:p text:style-name="P60">104</text:p>
          </table:table-cell>
          <table:table-cell table:style-name="Table29.A1" office:value-type="string">
            <text:p text:style-name="P60">decc</text:p>
          </table:table-cell>
          <table:table-cell table:style-name="Table29.A1" office:value-type="string">
            <text:p text:style-name="P60">105</text:p>
          </table:table-cell>
          <table:table-cell table:style-name="Table29.A1" office:value-type="string">
            <text:p text:style-name="P60">loda</text:p>
          </table:table-cell>
        </table:table-row>
        <table:table-row table:style-name="Table29.1">
          <table:table-cell table:style-name="Table29.A1" office:value-type="string">
            <text:p text:style-name="P60">106</text:p>
          </table:table-cell>
          <table:table-cell table:style-name="Table29.A1" office:value-type="string">
            <text:p text:style-name="P60">lodr</text:p>
          </table:table-cell>
          <table:table-cell table:style-name="Table29.A1" office:value-type="string">
            <text:p text:style-name="P60">107</text:p>
          </table:table-cell>
          <table:table-cell table:style-name="Table29.A1" office:value-type="string">
            <text:p text:style-name="P60">lods</text:p>
          </table:table-cell>
        </table:table-row>
        <table:table-row table:style-name="Table29.1">
          <table:table-cell table:style-name="Table29.A1" office:value-type="string">
            <text:p text:style-name="P60">108</text:p>
          </table:table-cell>
          <table:table-cell table:style-name="Table29.A1" office:value-type="string">
            <text:p text:style-name="P60">lodb</text:p>
          </table:table-cell>
          <table:table-cell table:style-name="Table29.A1" office:value-type="string">
            <text:p text:style-name="P60">109</text:p>
          </table:table-cell>
          <table:table-cell table:style-name="Table29.A1" office:value-type="string">
            <text:p text:style-name="P60">lodc</text:p>
          </table:table-cell>
        </table:table-row>
        <table:table-row table:style-name="Table29.1">
          <table:table-cell table:style-name="Table29.A1" office:value-type="string">
            <text:p text:style-name="P60">110</text:p>
          </table:table-cell>
          <table:table-cell table:style-name="Table29.A1" office:value-type="string">
            <text:p text:style-name="P60">rgs</text:p>
          </table:table-cell>
          <table:table-cell table:style-name="Table29.A1" office:value-type="string">
            <text:p text:style-name="P60">111</text:p>
          </table:table-cell>
          <table:table-cell table:style-name="Table29.A1" office:value-type="string">
            <text:p text:style-name="P60">ivtc</text:p>
          </table:table-cell>
        </table:table-row>
        <table:table-row table:style-name="Table29.1">
          <table:table-cell table:style-name="Table29.A1" office:value-type="string">
            <text:p text:style-name="P60">112</text:p>
          </table:table-cell>
          <table:table-cell table:style-name="Table29.A1" office:value-type="string">
            <text:p text:style-name="P60">ipj</text:p>
          </table:table-cell>
          <table:table-cell table:style-name="Table29.A1" office:value-type="string">
            <text:p text:style-name="P60">113</text:p>
          </table:table-cell>
          <table:table-cell table:style-name="Table29.A1" office:value-type="string">
            <text:p text:style-name="P60">cip</text:p>
          </table:table-cell>
        </table:table-row>
        <table:table-row table:style-name="Table29.1">
          <table:table-cell table:style-name="Table29.A1" office:value-type="string">
            <text:p text:style-name="P60">114</text:p>
          </table:table-cell>
          <table:table-cell table:style-name="Table29.A1" office:value-type="string">
            <text:p text:style-name="P60">lpa</text:p>
          </table:table-cell>
          <table:table-cell table:style-name="Table29.A1" office:value-type="string">
            <text:p text:style-name="P60">115</text:p>
          </table:table-cell>
          <table:table-cell table:style-name="Table29.A1" office:value-type="string">
            <text:p text:style-name="P60">cvbx</text:p>
          </table:table-cell>
        </table:table-row>
        <table:table-row table:style-name="Table29.1">
          <table:table-cell table:style-name="Table29.A1" office:value-type="string">
            <text:p text:style-name="P60">116</text:p>
          </table:table-cell>
          <table:table-cell table:style-name="Table29.A1" office:value-type="string">
            <text:p text:style-name="P60">cvbb</text:p>
          </table:table-cell>
          <table:table-cell table:style-name="Table29.A1" office:value-type="string">
            <text:p text:style-name="P60">117</text:p>
          </table:table-cell>
          <table:table-cell table:style-name="Table29.A1" office:value-type="string">
            <text:p text:style-name="P60">dmp</text:p>
          </table:table-cell>
        </table:table-row>
        <table:table-row table:style-name="Table29.1">
          <table:table-cell table:style-name="Table29.A1" office:value-type="string">
            <text:p text:style-name="P60">118</text:p>
          </table:table-cell>
          <table:table-cell table:style-name="Table29.A1" office:value-type="string">
            <text:p text:style-name="P60">swp</text:p>
          </table:table-cell>
          <table:table-cell table:style-name="Table29.A1" office:value-type="string">
            <text:p text:style-name="P60">119</text:p>
          </table:table-cell>
          <table:table-cell table:style-name="Table29.A1" office:value-type="string">
            <text:p text:style-name="P60">tjp</text:p>
          </table:table-cell>
        </table:table-row>
        <table:table-row table:style-name="Table29.1">
          <table:table-cell table:style-name="Table29.A1" office:value-type="string">
            <text:p text:style-name="P60">120</text:p>
          </table:table-cell>
          <table:table-cell table:style-name="Table29.A1" office:value-type="string">
            <text:p text:style-name="P60">lip</text:p>
          </table:table-cell>
          <table:table-cell table:style-name="Table29.A1" office:value-type="string">
            <text:p text:style-name="P60">121</text:p>
          </table:table-cell>
          <table:table-cell table:style-name="Table29.A1" office:value-type="string">
            <text:p text:style-name="P60">cvbc</text:p>
          </table:table-cell>
        </table:table-row>
        <table:table-row table:style-name="Table29.1">
          <table:table-cell table:style-name="Table29.A1" office:value-type="string">
            <text:p text:style-name="P60">122</text:p>
          </table:table-cell>
          <table:table-cell table:style-name="Table29.A1" office:value-type="string">
            <text:p text:style-name="P60">vis</text:p>
          </table:table-cell>
          <table:table-cell table:style-name="Table29.A1" office:value-type="string">
            <text:p text:style-name="P60">123</text:p>
          </table:table-cell>
          <table:table-cell table:style-name="Table29.A1" office:value-type="string">
            <text:p text:style-name="P60">ldci</text:p>
          </table:table-cell>
        </table:table-row>
        <table:table-row table:style-name="Table29.1">
          <table:table-cell table:style-name="Table29.A1" office:value-type="string">
            <text:p text:style-name="P60">124</text:p>
          </table:table-cell>
          <table:table-cell table:style-name="Table29.A1" office:value-type="string">
            <text:p text:style-name="P60">ldcr</text:p>
          </table:table-cell>
          <table:table-cell table:style-name="Table29.A1" office:value-type="string">
            <text:p text:style-name="P60">125</text:p>
          </table:table-cell>
          <table:table-cell table:style-name="Table29.A1" office:value-type="string">
            <text:p text:style-name="P60">ldcn</text:p>
          </table:table-cell>
        </table:table-row>
        <table:table-row table:style-name="Table29.1">
          <table:table-cell table:style-name="Table29.A1" office:value-type="string">
            <text:p text:style-name="P60">126</text:p>
          </table:table-cell>
          <table:table-cell table:style-name="Table29.A1" office:value-type="string">
            <text:p text:style-name="P60">ldcb</text:p>
          </table:table-cell>
          <table:table-cell table:style-name="Table29.A1" office:value-type="string">
            <text:p text:style-name="P60">127</text:p>
          </table:table-cell>
          <table:table-cell table:style-name="Table29.A1" office:value-type="string">
            <text:p text:style-name="P60">ldcc</text:p>
          </table:table-cell>
        </table:table-row>
        <table:table-row table:style-name="Table29.1">
          <table:table-cell table:style-name="Table29.A1" office:value-type="string">
            <text:p text:style-name="P60">128</text:p>
          </table:table-cell>
          <table:table-cell table:style-name="Table29.A1" office:value-type="string">
            <text:p text:style-name="P60">reti</text:p>
          </table:table-cell>
          <table:table-cell table:style-name="Table29.A1" office:value-type="string">
            <text:p text:style-name="P60">129</text:p>
          </table:table-cell>
          <table:table-cell table:style-name="Table29.A1" office:value-type="string">
            <text:p text:style-name="P60">retr</text:p>
          </table:table-cell>
        </table:table-row>
        <table:table-row table:style-name="Table29.1">
          <table:table-cell table:style-name="Table29.A1" office:value-type="string">
            <text:p text:style-name="P60">130</text:p>
          </table:table-cell>
          <table:table-cell table:style-name="Table29.A1" office:value-type="string">
            <text:p text:style-name="P60">retc</text:p>
          </table:table-cell>
          <table:table-cell table:style-name="Table29.A1" office:value-type="string">
            <text:p text:style-name="P60">131</text:p>
          </table:table-cell>
          <table:table-cell table:style-name="Table29.A1" office:value-type="string">
            <text:p text:style-name="P60">retb</text:p>
          </table:table-cell>
        </table:table-row>
        <table:table-row table:style-name="Table29.1">
          <table:table-cell table:style-name="Table29.A1" office:value-type="string">
            <text:p text:style-name="P60">132</text:p>
          </table:table-cell>
          <table:table-cell table:style-name="Table29.A1" office:value-type="string">
            <text:p text:style-name="P60">reta</text:p>
          </table:table-cell>
          <table:table-cell table:style-name="Table29.A1" office:value-type="string">
            <text:p text:style-name="P60">133</text:p>
          </table:table-cell>
          <table:table-cell table:style-name="Table29.A1" office:value-type="string">
            <text:p text:style-name="P60">vip</text:p>
          </table:table-cell>
        </table:table-row>
        <table:table-row table:style-name="Table29.1">
          <table:table-cell table:style-name="Table29.A1" office:value-type="string">
            <text:p text:style-name="P60">134</text:p>
          </table:table-cell>
          <table:table-cell table:style-name="Table29.A1" office:value-type="string">
            <text:p text:style-name="P60">ordb</text:p>
          </table:table-cell>
          <table:table-cell table:style-name="Table29.A1" office:value-type="string">
            <text:p text:style-name="P60">135</text:p>
          </table:table-cell>
          <table:table-cell table:style-name="Table29.A1" office:value-type="string">
            <text:p text:style-name="P60">lcp</text:p>
          </table:table-cell>
        </table:table-row>
        <table:table-row table:style-name="Table29.1">
          <table:table-cell table:style-name="Table29.A1" office:value-type="string">
            <text:p text:style-name="P60">136</text:p>
          </table:table-cell>
          <table:table-cell table:style-name="Table29.A1" office:value-type="string">
            <text:p text:style-name="P60">ordc</text:p>
          </table:table-cell>
          <table:table-cell table:style-name="Table29.A1" office:value-type="string">
            <text:p text:style-name="P60">137</text:p>
          </table:table-cell>
          <table:table-cell table:style-name="Table29.A1" office:value-type="string">
            <text:p text:style-name="P60">equi</text:p>
          </table:table-cell>
        </table:table-row>
        <table:table-row table:style-name="Table29.1">
          <table:table-cell table:style-name="Table29.A1" office:value-type="string">
            <text:p text:style-name="P60">138</text:p>
          </table:table-cell>
          <table:table-cell table:style-name="Table29.A1" office:value-type="string">
            <text:p text:style-name="P60">equr</text:p>
          </table:table-cell>
          <table:table-cell table:style-name="Table29.A1" office:value-type="string">
            <text:p text:style-name="P60">139</text:p>
          </table:table-cell>
          <table:table-cell table:style-name="Table29.A1" office:value-type="string">
            <text:p text:style-name="P60">equb</text:p>
          </table:table-cell>
        </table:table-row>
        <table:table-row table:style-name="Table29.1">
          <table:table-cell table:style-name="Table29.A1" office:value-type="string">
            <text:p text:style-name="P60">140</text:p>
          </table:table-cell>
          <table:table-cell table:style-name="Table29.A1" office:value-type="string">
            <text:p text:style-name="P60">equs</text:p>
          </table:table-cell>
          <table:table-cell table:style-name="Table29.A1" office:value-type="string">
            <text:p text:style-name="P60">141</text:p>
          </table:table-cell>
          <table:table-cell table:style-name="Table29.A1" office:value-type="string">
            <text:p text:style-name="P60">equc</text:p>
          </table:table-cell>
        </table:table-row>
        <table:table-row table:style-name="Table29.1">
          <table:table-cell table:style-name="Table29.A1" office:value-type="string">
            <text:p text:style-name="P60">142</text:p>
          </table:table-cell>
          <table:table-cell table:style-name="Table29.A1" office:value-type="string">
            <text:p text:style-name="P60">equm</text:p>
          </table:table-cell>
          <table:table-cell table:style-name="Table29.A1" office:value-type="string">
            <text:p text:style-name="P60">143</text:p>
          </table:table-cell>
          <table:table-cell table:style-name="Table29.A1" office:value-type="string">
            <text:p text:style-name="P60">neqi</text:p>
          </table:table-cell>
        </table:table-row>
        <table:table-row table:style-name="Table29.1">
          <table:table-cell table:style-name="Table29.A1" office:value-type="string">
            <text:p text:style-name="P60">144</text:p>
          </table:table-cell>
          <table:table-cell table:style-name="Table29.A1" office:value-type="string">
            <text:p text:style-name="P60">neqr</text:p>
          </table:table-cell>
          <table:table-cell table:style-name="Table29.A1" office:value-type="string">
            <text:p text:style-name="P60">145</text:p>
          </table:table-cell>
          <table:table-cell table:style-name="Table29.A1" office:value-type="string">
            <text:p text:style-name="P60">neqb</text:p>
          </table:table-cell>
        </table:table-row>
        <table:table-row table:style-name="Table29.1">
          <table:table-cell table:style-name="Table29.A1" office:value-type="string">
            <text:p text:style-name="P60">146</text:p>
          </table:table-cell>
          <table:table-cell table:style-name="Table29.A1" office:value-type="string">
            <text:p text:style-name="P60">neqs</text:p>
          </table:table-cell>
          <table:table-cell table:style-name="Table29.A1" office:value-type="string">
            <text:p text:style-name="P60">147</text:p>
          </table:table-cell>
          <table:table-cell table:style-name="Table29.A1" office:value-type="string">
            <text:p text:style-name="P60">neqc</text:p>
          </table:table-cell>
        </table:table-row>
        <table:table-row table:style-name="Table29.1">
          <table:table-cell table:style-name="Table29.A1" office:value-type="string">
            <text:p text:style-name="P60">148</text:p>
          </table:table-cell>
          <table:table-cell table:style-name="Table29.A1" office:value-type="string">
            <text:p text:style-name="P60">neqm</text:p>
          </table:table-cell>
          <table:table-cell table:style-name="Table29.A1" office:value-type="string">
            <text:p text:style-name="P60">149</text:p>
          </table:table-cell>
          <table:table-cell table:style-name="Table29.A1" office:value-type="string">
            <text:p text:style-name="P60">geqi</text:p>
          </table:table-cell>
        </table:table-row>
        <table:table-row table:style-name="Table29.1">
          <table:table-cell table:style-name="Table29.A1" office:value-type="string">
            <text:p text:style-name="P60">150</text:p>
          </table:table-cell>
          <table:table-cell table:style-name="Table29.A1" office:value-type="string">
            <text:p text:style-name="P60">geqr</text:p>
          </table:table-cell>
          <table:table-cell table:style-name="Table29.A1" office:value-type="string">
            <text:p text:style-name="P60">151</text:p>
          </table:table-cell>
          <table:table-cell table:style-name="Table29.A1" office:value-type="string">
            <text:p text:style-name="P60">geqb</text:p>
          </table:table-cell>
        </table:table-row>
        <table:table-row table:style-name="Table29.1">
          <table:table-cell table:style-name="Table29.A1" office:value-type="string">
            <text:p text:style-name="P60">152</text:p>
          </table:table-cell>
          <table:table-cell table:style-name="Table29.A1" office:value-type="string">
            <text:p text:style-name="P60">geqs</text:p>
          </table:table-cell>
          <table:table-cell table:style-name="Table29.A1" office:value-type="string">
            <text:p text:style-name="P60">153</text:p>
          </table:table-cell>
          <table:table-cell table:style-name="Table29.A1" office:value-type="string">
            <text:p text:style-name="P60">geqc</text:p>
          </table:table-cell>
        </table:table-row>
        <table:table-row table:style-name="Table29.1">
          <table:table-cell table:style-name="Table29.A1" office:value-type="string">
            <text:p text:style-name="P60">154</text:p>
          </table:table-cell>
          <table:table-cell table:style-name="Table29.A1" office:value-type="string">
            <text:p text:style-name="P60">geqm</text:p>
          </table:table-cell>
          <table:table-cell table:style-name="Table29.A1" office:value-type="string">
            <text:p text:style-name="P60">155</text:p>
          </table:table-cell>
          <table:table-cell table:style-name="Table29.A1" office:value-type="string">
            <text:p text:style-name="P60">grti</text:p>
          </table:table-cell>
        </table:table-row>
        <table:table-row table:style-name="Table29.1">
          <table:table-cell table:style-name="Table29.A1" office:value-type="string">
            <text:p text:style-name="P60">156</text:p>
          </table:table-cell>
          <table:table-cell table:style-name="Table29.A1" office:value-type="string">
            <text:p text:style-name="P60">grtr</text:p>
          </table:table-cell>
          <table:table-cell table:style-name="Table29.A1" office:value-type="string">
            <text:p text:style-name="P60">157</text:p>
          </table:table-cell>
          <table:table-cell table:style-name="Table29.A1" office:value-type="string">
            <text:p text:style-name="P60">grtb</text:p>
          </table:table-cell>
        </table:table-row>
        <table:table-row table:style-name="Table29.1">
          <table:table-cell table:style-name="Table29.A1" office:value-type="string">
            <text:p text:style-name="P60">158</text:p>
          </table:table-cell>
          <table:table-cell table:style-name="Table29.A1" office:value-type="string">
            <text:p text:style-name="P60">grts</text:p>
          </table:table-cell>
          <table:table-cell table:style-name="Table29.A1" office:value-type="string">
            <text:p text:style-name="P60">159</text:p>
          </table:table-cell>
          <table:table-cell table:style-name="Table29.A1" office:value-type="string">
            <text:p text:style-name="P60">grtc</text:p>
          </table:table-cell>
        </table:table-row>
        <table:table-row table:style-name="Table29.1">
          <table:table-cell table:style-name="Table29.A1" office:value-type="string">
            <text:p text:style-name="P60">160</text:p>
          </table:table-cell>
          <table:table-cell table:style-name="Table29.A1" office:value-type="string">
            <text:p text:style-name="P60">grtm</text:p>
          </table:table-cell>
          <table:table-cell table:style-name="Table29.A1" office:value-type="string">
            <text:p text:style-name="P60">161</text:p>
          </table:table-cell>
          <table:table-cell table:style-name="Table29.A1" office:value-type="string">
            <text:p text:style-name="P60">leqi</text:p>
          </table:table-cell>
        </table:table-row>
        <table:table-row table:style-name="Table29.1">
          <table:table-cell table:style-name="Table29.A1" office:value-type="string">
            <text:p text:style-name="P60">162</text:p>
          </table:table-cell>
          <table:table-cell table:style-name="Table29.A1" office:value-type="string">
            <text:p text:style-name="P60">leqr</text:p>
          </table:table-cell>
          <table:table-cell table:style-name="Table29.A1" office:value-type="string">
            <text:p text:style-name="P60">163</text:p>
          </table:table-cell>
          <table:table-cell table:style-name="Table29.A1" office:value-type="string">
            <text:p text:style-name="P60">leqb</text:p>
          </table:table-cell>
        </table:table-row>
        <table:table-row table:style-name="Table29.1">
          <table:table-cell table:style-name="Table29.A1" office:value-type="string">
            <text:p text:style-name="P60">164</text:p>
          </table:table-cell>
          <table:table-cell table:style-name="Table29.A1" office:value-type="string">
            <text:p text:style-name="P60">leqs</text:p>
          </table:table-cell>
          <table:table-cell table:style-name="Table29.A1" office:value-type="string">
            <text:p text:style-name="P60">165</text:p>
          </table:table-cell>
          <table:table-cell table:style-name="Table29.A1" office:value-type="string">
            <text:p text:style-name="P60">leqc</text:p>
          </table:table-cell>
        </table:table-row>
        <table:table-row table:style-name="Table29.1">
          <table:table-cell table:style-name="Table29.A1" office:value-type="string">
            <text:p text:style-name="P60">166</text:p>
          </table:table-cell>
          <table:table-cell table:style-name="Table29.A1" office:value-type="string">
            <text:p text:style-name="P60">leqm</text:p>
          </table:table-cell>
          <table:table-cell table:style-name="Table29.A1" office:value-type="string">
            <text:p text:style-name="P60">167</text:p>
          </table:table-cell>
          <table:table-cell table:style-name="Table29.A1" office:value-type="string">
            <text:p text:style-name="P60">lesi</text:p>
          </table:table-cell>
        </table:table-row>
        <table:table-row table:style-name="Table29.1">
          <table:table-cell table:style-name="Table29.A1" office:value-type="string">
            <text:p text:style-name="P60">168</text:p>
          </table:table-cell>
          <table:table-cell table:style-name="Table29.A1" office:value-type="string">
            <text:p text:style-name="P60">lesr</text:p>
          </table:table-cell>
          <table:table-cell table:style-name="Table29.A1" office:value-type="string">
            <text:p text:style-name="P60">169</text:p>
          </table:table-cell>
          <table:table-cell table:style-name="Table29.A1" office:value-type="string">
            <text:p text:style-name="P60">lesb</text:p>
          </table:table-cell>
        </table:table-row>
        <table:table-row table:style-name="Table29.1">
          <table:table-cell table:style-name="Table29.A1" office:value-type="string">
            <text:p text:style-name="P60">170</text:p>
          </table:table-cell>
          <table:table-cell table:style-name="Table29.A1" office:value-type="string">
            <text:p text:style-name="P60">less</text:p>
          </table:table-cell>
          <table:table-cell table:style-name="Table29.A1" office:value-type="string">
            <text:p text:style-name="P60">171</text:p>
          </table:table-cell>
          <table:table-cell table:style-name="Table29.A1" office:value-type="string">
            <text:p text:style-name="P60">lesc</text:p>
          </table:table-cell>
        </table:table-row>
        <table:table-row table:style-name="Table29.1">
          <table:table-cell table:style-name="Table29.A1" office:value-type="string">
            <text:p text:style-name="P60">172</text:p>
          </table:table-cell>
          <table:table-cell table:style-name="Table29.A1" office:value-type="string">
            <text:p text:style-name="P60">lesm</text:p>
          </table:table-cell>
          <table:table-cell table:style-name="Table29.A1" office:value-type="string">
            <text:p text:style-name="P60">173</text:p>
          </table:table-cell>
          <table:table-cell table:style-name="Table29.A1" office:value-type="string">
            <text:p text:style-name="P60">---</text:p>
          </table:table-cell>
        </table:table-row>
        <table:table-row table:style-name="Table29.1">
          <table:table-cell table:style-name="Table29.A1" office:value-type="string">
            <text:p text:style-name="P60">174</text:p>
          </table:table-cell>
          <table:table-cell table:style-name="Table29.A1" office:value-type="string">
            <text:p text:style-name="P60">mrkl</text:p>
          </table:table-cell>
          <table:table-cell table:style-name="Table29.A1" office:value-type="string">
            <text:p text:style-name="P60">175</text:p>
          </table:table-cell>
          <table:table-cell table:style-name="Table29.A1" office:value-type="string">
            <text:p text:style-name="P60">ckvi</text:p>
          </table:table-cell>
        </table:table-row>
        <table:table-row table:style-name="Table29.1">
          <table:table-cell table:style-name="Table29.A1" office:value-type="string">
            <text:p text:style-name="P60">176</text:p>
          </table:table-cell>
          <table:table-cell table:style-name="Table29.A1" office:value-type="string">
            <text:p text:style-name="P60">cps</text:p>
          </table:table-cell>
          <table:table-cell table:style-name="Table29.A1" office:value-type="string">
            <text:p text:style-name="P60">177</text:p>
          </table:table-cell>
          <table:table-cell table:style-name="Table29.A1" office:value-type="string">
            <text:p text:style-name="P60">cpc</text:p>
          </table:table-cell>
        </table:table-row>
        <text:soft-page-break/>
        <table:table-row table:style-name="Table29.1">
          <table:table-cell table:style-name="Table29.A1" office:value-type="string">
            <text:p text:style-name="P60">178</text:p>
          </table:table-cell>
          <table:table-cell table:style-name="Table29.A1" office:value-type="string">
            <text:p text:style-name="P60">aps</text:p>
          </table:table-cell>
          <table:table-cell table:style-name="Table29.A1" office:value-type="string">
            <text:p text:style-name="P60">179</text:p>
          </table:table-cell>
          <table:table-cell table:style-name="Table29.A1" office:value-type="string">
            <text:p text:style-name="P60">ckvb</text:p>
          </table:table-cell>
        </table:table-row>
        <table:table-row table:style-name="Table29.1">
          <table:table-cell table:style-name="Table29.A1" office:value-type="string">
            <text:p text:style-name="P60">180</text:p>
          </table:table-cell>
          <table:table-cell table:style-name="Table29.A1" office:value-type="string">
            <text:p text:style-name="P60">ckvc</text:p>
          </table:table-cell>
          <table:table-cell table:style-name="Table29.A1" office:value-type="string">
            <text:p text:style-name="P60">181</text:p>
          </table:table-cell>
          <table:table-cell table:style-name="Table29.A1" office:value-type="string">
            <text:p text:style-name="P60">dupi</text:p>
          </table:table-cell>
        </table:table-row>
        <table:table-row table:style-name="Table29.1">
          <table:table-cell table:style-name="Table29.A1" office:value-type="string">
            <text:p text:style-name="P60">182</text:p>
          </table:table-cell>
          <table:table-cell table:style-name="Table29.A1" office:value-type="string">
            <text:p text:style-name="P60">dupa</text:p>
          </table:table-cell>
          <table:table-cell table:style-name="Table29.A1" office:value-type="string">
            <text:p text:style-name="P60">183</text:p>
          </table:table-cell>
          <table:table-cell table:style-name="Table29.A1" office:value-type="string">
            <text:p text:style-name="P60">dupr</text:p>
          </table:table-cell>
        </table:table-row>
        <table:table-row table:style-name="Table29.1">
          <table:table-cell table:style-name="Table29.A1" office:value-type="string">
            <text:p text:style-name="P60">184</text:p>
          </table:table-cell>
          <table:table-cell table:style-name="Table29.A1" office:value-type="string">
            <text:p text:style-name="P60">dups</text:p>
          </table:table-cell>
          <table:table-cell table:style-name="Table29.A1" office:value-type="string">
            <text:p text:style-name="P60">185</text:p>
          </table:table-cell>
          <table:table-cell table:style-name="Table29.A1" office:value-type="string">
            <text:p text:style-name="P60">dupb</text:p>
          </table:table-cell>
        </table:table-row>
        <table:table-row table:style-name="Table29.1">
          <table:table-cell table:style-name="Table29.A1" office:value-type="string">
            <text:p text:style-name="P60">186</text:p>
          </table:table-cell>
          <table:table-cell table:style-name="Table29.A1" office:value-type="string">
            <text:p text:style-name="P60">dupc</text:p>
          </table:table-cell>
          <table:table-cell table:style-name="Table29.A1" office:value-type="string">
            <text:p text:style-name="P60">187</text:p>
          </table:table-cell>
          <table:table-cell table:style-name="Table29.A1" office:value-type="string">
            <text:p text:style-name="P60">cks</text:p>
          </table:table-cell>
        </table:table-row>
        <table:table-row table:style-name="Table29.1">
          <table:table-cell table:style-name="Table29.A1" office:value-type="string">
            <text:p text:style-name="P60">188</text:p>
          </table:table-cell>
          <table:table-cell table:style-name="Table29.A1" office:value-type="string">
            <text:p text:style-name="P60">cke</text:p>
          </table:table-cell>
          <table:table-cell table:style-name="Table29.A1" office:value-type="string">
            <text:p text:style-name="P60">189</text:p>
          </table:table-cell>
          <table:table-cell table:style-name="Table29.A1" office:value-type="string">
            <text:p text:style-name="P60">inv</text:p>
          </table:table-cell>
        </table:table-row>
        <table:table-row table:style-name="Table29.1">
          <table:table-cell table:style-name="Table29.A1" office:value-type="string">
            <text:p text:style-name="P60">190</text:p>
          </table:table-cell>
          <table:table-cell table:style-name="Table29.A1" office:value-type="string">
            <text:p text:style-name="P60">ckla</text:p>
          </table:table-cell>
          <table:table-cell table:style-name="Table29.A1" office:value-type="string">
            <text:p text:style-name="P60">191</text:p>
          </table:table-cell>
          <table:table-cell table:style-name="Table29.A1" office:value-type="string">
            <text:p text:style-name="P60">cta</text:p>
          </table:table-cell>
        </table:table-row>
        <table:table-row table:style-name="Table29.1">
          <table:table-cell table:style-name="Table29.A1" office:value-type="string">
            <text:p text:style-name="P60">192</text:p>
          </table:table-cell>
          <table:table-cell table:style-name="Table29.A1" office:value-type="string">
            <text:p text:style-name="P60">ivti</text:p>
          </table:table-cell>
          <table:table-cell table:style-name="Table29.A1" office:value-type="string">
            <text:p text:style-name="P60">193</text:p>
          </table:table-cell>
          <table:table-cell table:style-name="Table29.A1" office:value-type="string">
            <text:p text:style-name="P60">lodx</text:p>
          </table:table-cell>
        </table:table-row>
        <table:table-row table:style-name="Table29.1">
          <table:table-cell table:style-name="Table29.A1" office:value-type="string">
            <text:p text:style-name="P60">194</text:p>
          </table:table-cell>
          <table:table-cell table:style-name="Table29.A1" office:value-type="string">
            <text:p text:style-name="P60">ldox</text:p>
          </table:table-cell>
          <table:table-cell table:style-name="Table29.A1" office:value-type="string">
            <text:p text:style-name="P60">195</text:p>
          </table:table-cell>
          <table:table-cell table:style-name="Table29.A1" office:value-type="string">
            <text:p text:style-name="P60">strx</text:p>
          </table:table-cell>
        </table:table-row>
        <table:table-row table:style-name="Table29.1">
          <table:table-cell table:style-name="Table29.A1" office:value-type="string">
            <text:p text:style-name="P60">196</text:p>
          </table:table-cell>
          <table:table-cell table:style-name="Table29.A1" office:value-type="string">
            <text:p text:style-name="P60">srox</text:p>
          </table:table-cell>
          <table:table-cell table:style-name="Table29.A1" office:value-type="string">
            <text:p text:style-name="P60">197</text:p>
          </table:table-cell>
          <table:table-cell table:style-name="Table29.A1" office:value-type="string">
            <text:p text:style-name="P60">stox</text:p>
          </table:table-cell>
        </table:table-row>
        <table:table-row table:style-name="Table29.1">
          <table:table-cell table:style-name="Table29.A1" office:value-type="string">
            <text:p text:style-name="P60">198</text:p>
          </table:table-cell>
          <table:table-cell table:style-name="Table29.A1" office:value-type="string">
            <text:p text:style-name="P60">indx</text:p>
          </table:table-cell>
          <table:table-cell table:style-name="Table29.A1" office:value-type="string">
            <text:p text:style-name="P60">199</text:p>
          </table:table-cell>
          <table:table-cell table:style-name="Table29.A1" office:value-type="string">
            <text:p text:style-name="P60">chkx</text:p>
          </table:table-cell>
        </table:table-row>
        <table:table-row table:style-name="Table29.1">
          <table:table-cell table:style-name="Table29.A1" office:value-type="string">
            <text:p text:style-name="P60">200</text:p>
          </table:table-cell>
          <table:table-cell table:style-name="Table29.A1" office:value-type="string">
            <text:p text:style-name="P60">ordx</text:p>
          </table:table-cell>
          <table:table-cell table:style-name="Table29.A1" office:value-type="string">
            <text:p text:style-name="P60">201</text:p>
          </table:table-cell>
          <table:table-cell table:style-name="Table29.A1" office:value-type="string">
            <text:p text:style-name="P60">incx</text:p>
          </table:table-cell>
        </table:table-row>
        <table:table-row table:style-name="Table29.1">
          <table:table-cell table:style-name="Table29.A1" office:value-type="string">
            <text:p text:style-name="P60">202</text:p>
          </table:table-cell>
          <table:table-cell table:style-name="Table29.A1" office:value-type="string">
            <text:p text:style-name="P60">decx</text:p>
          </table:table-cell>
          <table:table-cell table:style-name="Table29.A1" office:value-type="string">
            <text:p text:style-name="P60">203</text:p>
          </table:table-cell>
          <table:table-cell table:style-name="Table29.A1" office:value-type="string">
            <text:p text:style-name="P60">ckvx</text:p>
          </table:table-cell>
        </table:table-row>
        <table:table-row table:style-name="Table29.1">
          <table:table-cell table:style-name="Table29.A1" office:value-type="string">
            <text:p text:style-name="P60">204</text:p>
          </table:table-cell>
          <table:table-cell table:style-name="Table29.A1" office:value-type="string">
            <text:p text:style-name="P60">retx</text:p>
          </table:table-cell>
          <table:table-cell table:style-name="Table29.A1" office:value-type="string">
            <text:p text:style-name="P60">205</text:p>
          </table:table-cell>
          <table:table-cell table:style-name="Table29.A1" office:value-type="string">
            <text:p text:style-name="P60">noti</text:p>
          </table:table-cell>
        </table:table-row>
        <table:table-row table:style-name="Table29.1">
          <table:table-cell table:style-name="Table29.A1" office:value-type="string">
            <text:p text:style-name="P60">206</text:p>
          </table:table-cell>
          <table:table-cell table:style-name="Table29.A1" office:value-type="string">
            <text:p text:style-name="P60">xor</text:p>
          </table:table-cell>
          <table:table-cell table:style-name="Table29.A1" office:value-type="string">
            <text:p text:style-name="P60">207</text:p>
          </table:table-cell>
          <table:table-cell table:style-name="Table29.A1" office:value-type="string">
            <text:p text:style-name="P60">bge</text:p>
          </table:table-cell>
        </table:table-row>
        <table:table-row table:style-name="Table29.1">
          <table:table-cell table:style-name="Table29.A1" office:value-type="string">
            <text:p text:style-name="P60">208</text:p>
          </table:table-cell>
          <table:table-cell table:style-name="Table29.A1" office:value-type="string">
            <text:p text:style-name="P60">ede</text:p>
          </table:table-cell>
          <table:table-cell table:style-name="Table29.A1" office:value-type="string">
            <text:p text:style-name="P60">209</text:p>
          </table:table-cell>
          <table:table-cell table:style-name="Table29.A1" office:value-type="string">
            <text:p text:style-name="P60">mse</text:p>
          </table:table-cell>
        </table:table-row>
        <table:table-row table:style-name="Table29.1">
          <table:table-cell table:style-name="Table29.A1" office:value-type="string">
            <text:p text:style-name="P60">210</text:p>
          </table:table-cell>
          <table:table-cell table:style-name="Table29.A1" office:value-type="string">
            <text:p text:style-name="P60">apc</text:p>
          </table:table-cell>
          <table:table-cell table:style-name="Table29.A1" office:value-type="string">
            <text:p text:style-name="P60">211</text:p>
          </table:table-cell>
          <table:table-cell table:style-name="Table29.A1" office:value-type="string">
            <text:p text:style-name="P60">cxs</text:p>
          </table:table-cell>
        </table:table-row>
        <table:table-row table:style-name="Table29.1">
          <table:table-cell table:style-name="Table29.A1" office:value-type="string">
            <text:p text:style-name="P60">212</text:p>
          </table:table-cell>
          <table:table-cell table:style-name="Table29.A1" office:value-type="string">
            <text:p text:style-name="P60">cxc</text:p>
          </table:table-cell>
          <table:table-cell table:style-name="Table29.A1" office:value-type="string">
            <text:p text:style-name="P60">213</text:p>
          </table:table-cell>
          <table:table-cell table:style-name="Table29.A1" office:value-type="string">
            <text:p text:style-name="P60">lft</text:p>
          </table:table-cell>
        </table:table-row>
        <table:table-row table:style-name="Table29.1">
          <table:table-cell table:style-name="Table29.A1" office:value-type="string">
            <text:p text:style-name="P60">214</text:p>
          </table:table-cell>
          <table:table-cell table:style-name="Table29.A1" office:value-type="string">
            <text:p text:style-name="P60">max</text:p>
          </table:table-cell>
          <table:table-cell table:style-name="Table29.A1" office:value-type="string">
            <text:p text:style-name="P60">215</text:p>
          </table:table-cell>
          <table:table-cell table:style-name="Table29.A1" office:value-type="string">
            <text:p text:style-name="P60">equv</text:p>
          </table:table-cell>
        </table:table-row>
        <table:table-row table:style-name="Table29.1">
          <table:table-cell table:style-name="Table29.A1" office:value-type="string">
            <text:p text:style-name="P60">216</text:p>
          </table:table-cell>
          <table:table-cell table:style-name="Table29.A1" office:value-type="string">
            <text:p text:style-name="P60">neqv</text:p>
          </table:table-cell>
          <table:table-cell table:style-name="Table29.A1" office:value-type="string">
            <text:p text:style-name="P60">217</text:p>
          </table:table-cell>
          <table:table-cell table:style-name="Table29.A1" office:value-type="string">
            <text:p text:style-name="P60">lesv</text:p>
          </table:table-cell>
        </table:table-row>
        <table:table-row table:style-name="Table29.1">
          <table:table-cell table:style-name="Table29.A1" office:value-type="string">
            <text:p text:style-name="P60">218</text:p>
          </table:table-cell>
          <table:table-cell table:style-name="Table29.A1" office:value-type="string">
            <text:p text:style-name="P60">grtv</text:p>
          </table:table-cell>
          <table:table-cell table:style-name="Table29.A1" office:value-type="string">
            <text:p text:style-name="P60">219</text:p>
          </table:table-cell>
          <table:table-cell table:style-name="Table29.A1" office:value-type="string">
            <text:p text:style-name="P60">leqv</text:p>
          </table:table-cell>
        </table:table-row>
        <table:table-row table:style-name="Table29.1">
          <table:table-cell table:style-name="Table29.A1" office:value-type="string">
            <text:p text:style-name="P60">220</text:p>
          </table:table-cell>
          <table:table-cell table:style-name="Table29.A1" office:value-type="string">
            <text:p text:style-name="P60">geqv</text:p>
          </table:table-cell>
          <table:table-cell table:style-name="Table29.A1" office:value-type="string">
            <text:p text:style-name="P60">221</text:p>
          </table:table-cell>
          <table:table-cell table:style-name="Table29.A1" office:value-type="string">
            <text:p text:style-name="P60">vdp</text:p>
          </table:table-cell>
        </table:table-row>
        <table:table-row table:style-name="Table29.1">
          <table:table-cell table:style-name="Table29.A1" office:value-type="string">
            <text:p text:style-name="P60">222</text:p>
          </table:table-cell>
          <table:table-cell table:style-name="Table29.A1" office:value-type="string">
            <text:p text:style-name="P60">spc</text:p>
          </table:table-cell>
          <table:table-cell table:style-name="Table29.A1" office:value-type="string">
            <text:p text:style-name="P60">223</text:p>
          </table:table-cell>
          <table:table-cell table:style-name="Table29.A1" office:value-type="string">
            <text:p text:style-name="P60">ccs</text:p>
          </table:table-cell>
        </table:table-row>
        <table:table-row table:style-name="Table29.1">
          <table:table-cell table:style-name="Table29.A1" office:value-type="string">
            <text:p text:style-name="P60">224</text:p>
          </table:table-cell>
          <table:table-cell table:style-name="Table29.A1" office:value-type="string">
            <text:p text:style-name="P60">scp</text:p>
          </table:table-cell>
          <table:table-cell table:style-name="Table29.A1" office:value-type="string">
            <text:p text:style-name="P60">225</text:p>
          </table:table-cell>
          <table:table-cell table:style-name="Table29.A1" office:value-type="string">
            <text:p text:style-name="P60">ldp</text:p>
          </table:table-cell>
        </table:table-row>
        <table:table-row table:style-name="Table29.1">
          <table:table-cell table:style-name="Table29.A1" office:value-type="string">
            <text:p text:style-name="P60">226</text:p>
          </table:table-cell>
          <table:table-cell table:style-name="Table29.A1" office:value-type="string">
            <text:p text:style-name="P60">vin</text:p>
          </table:table-cell>
          <table:table-cell table:style-name="Table29.A1" office:value-type="string">
            <text:p text:style-name="P60">227</text:p>
          </table:table-cell>
          <table:table-cell table:style-name="Table29.A1" office:value-type="string">
            <text:p text:style-name="P60">vdd</text:p>
          </table:table-cell>
        </table:table-row>
        <table:table-row table:style-name="Table29.1">
          <table:table-cell table:style-name="Table29.A1" office:value-type="string">
            <text:p text:style-name="P60">228</text:p>
          </table:table-cell>
          <table:table-cell table:style-name="Table29.A1" office:value-type="string">
            <text:p text:style-name="P60">---</text:p>
          </table:table-cell>
          <table:table-cell table:style-name="Table29.A1" office:value-type="string">
            <text:p text:style-name="P60">229</text:p>
          </table:table-cell>
          <table:table-cell table:style-name="Table29.A1" office:value-type="string">
            <text:p text:style-name="P60">---</text:p>
          </table:table-cell>
        </table:table-row>
        <table:table-row table:style-name="Table29.1">
          <table:table-cell table:style-name="Table29.A1" office:value-type="string">
            <text:p text:style-name="P60">230</text:p>
          </table:table-cell>
          <table:table-cell table:style-name="Table29.A1" office:value-type="string">
            <text:p text:style-name="P60">---</text:p>
          </table:table-cell>
          <table:table-cell table:style-name="Table29.A1" office:value-type="string">
            <text:p text:style-name="P60">231</text:p>
          </table:table-cell>
          <table:table-cell table:style-name="Table29.A1" office:value-type="string">
            <text:p text:style-name="P60">---</text:p>
          </table:table-cell>
        </table:table-row>
        <table:table-row table:style-name="Table29.1">
          <table:table-cell table:style-name="Table29.A1" office:value-type="string">
            <text:p text:style-name="P60">232</text:p>
          </table:table-cell>
          <table:table-cell table:style-name="Table29.A1" office:value-type="string">
            <text:p text:style-name="P60">---</text:p>
          </table:table-cell>
          <table:table-cell table:style-name="Table29.A1" office:value-type="string">
            <text:p text:style-name="P60">233</text:p>
          </table:table-cell>
          <table:table-cell table:style-name="Table29.A1" office:value-type="string">
            <text:p text:style-name="P60">---</text:p>
          </table:table-cell>
        </table:table-row>
        <table:table-row table:style-name="Table29.1">
          <table:table-cell table:style-name="Table29.A1" office:value-type="string">
            <text:p text:style-name="P60">234</text:p>
          </table:table-cell>
          <table:table-cell table:style-name="Table29.A1" office:value-type="string">
            <text:p text:style-name="P60">---</text:p>
          </table:table-cell>
          <table:table-cell table:style-name="Table29.A1" office:value-type="string">
            <text:p text:style-name="P60">235</text:p>
          </table:table-cell>
          <table:table-cell table:style-name="Table29.A1" office:value-type="string">
            <text:p text:style-name="P60">stom</text:p>
          </table:table-cell>
        </table:table-row>
        <table:table-row table:style-name="Table29.1">
          <table:table-cell table:style-name="Table29.A1" office:value-type="string">
            <text:p text:style-name="P60">236</text:p>
          </table:table-cell>
          <table:table-cell table:style-name="Table29.A1" office:value-type="string">
            <text:p text:style-name="P60">rets</text:p>
          </table:table-cell>
          <table:table-cell table:style-name="Table29.A1" office:value-type="string">
            <text:p text:style-name="P60">237</text:p>
          </table:table-cell>
          <table:table-cell table:style-name="Table29.A1" office:value-type="string">
            <text:p text:style-name="P60">retm</text:p>
          </table:table-cell>
        </table:table-row>
        <table:table-row table:style-name="Table29.1">
          <table:table-cell table:style-name="Table29.A1" office:value-type="string">
            <text:p text:style-name="P60">238</text:p>
          </table:table-cell>
          <table:table-cell table:style-name="Table29.A1" office:value-type="string">
            <text:p text:style-name="P60">ctb</text:p>
          </table:table-cell>
          <table:table-cell table:style-name="Table29.A1" office:value-type="string">
            <text:p text:style-name="P60">239</text:p>
          </table:table-cell>
          <table:table-cell table:style-name="Table29.A1" office:value-type="string">
            <text:p text:style-name="P60">cpp</text:p>
          </table:table-cell>
        </table:table-row>
        <table:table-row table:style-name="Table29.1">
          <table:table-cell table:style-name="Table29.A1" office:value-type="string">
            <text:p text:style-name="P60">240</text:p>
          </table:table-cell>
          <table:table-cell table:style-name="Table29.A1" office:value-type="string">
            <text:p text:style-name="P60">cpr</text:p>
          </table:table-cell>
          <table:table-cell table:style-name="Table29.A1" office:value-type="string">
            <text:p text:style-name="P60">241</text:p>
          </table:table-cell>
          <table:table-cell table:style-name="Table29.A1" office:value-type="string">
            <text:p text:style-name="P60">lsa</text:p>
          </table:table-cell>
        </table:table-row>
        <table:table-row table:style-name="Table29.1">
          <table:table-cell table:style-name="Table29.A1" office:value-type="string">
            <text:p text:style-name="P60">242</text:p>
          </table:table-cell>
          <table:table-cell table:style-name="Table29.A1" office:value-type="string">
            <text:p text:style-name="P60">eext</text:p>
          </table:table-cell>
          <table:table-cell table:style-name="Table29.A1" office:value-type="string">
            <text:p text:style-name="P60">243</text:p>
          </table:table-cell>
          <table:table-cell table:style-name="Table29.A1" office:value-type="string">
            <text:p text:style-name="P60">wbs</text:p>
          </table:table-cell>
        </table:table-row>
        <table:table-row table:style-name="Table29.1">
          <table:table-cell table:style-name="Table29.A1" office:value-type="string">
            <text:p text:style-name="P60">244</text:p>
          </table:table-cell>
          <table:table-cell table:style-name="Table29.A1" office:value-type="string">
            <text:p text:style-name="P60">wbe</text:p>
          </table:table-cell>
          <table:table-cell table:style-name="Table29.A1" office:value-type="string">
            <text:p text:style-name="P60">245</text:p>
          </table:table-cell>
          <table:table-cell table:style-name="Table29.A1" office:value-type="string">
            <text:p text:style-name="P60">sfr</text:p>
          </table:table-cell>
        </table:table-row>
        <table:table-row table:style-name="Table29.1">
          <table:table-cell table:style-name="Table29.A1" office:value-type="string">
            <text:p text:style-name="P60">246</text:p>
          </table:table-cell>
          <table:table-cell table:style-name="Table29.A1" office:value-type="string">
            <text:p text:style-name="P60">cuf</text:p>
          </table:table-cell>
          <table:table-cell table:style-name="Table29.A1" office:value-type="string">
            <text:p text:style-name="P60">247</text:p>
          </table:table-cell>
          <table:table-cell table:style-name="Table29.A1" office:value-type="string">
            <text:p text:style-name="P60">cif</text:p>
          </table:table-cell>
        </table:table-row>
        <table:table-row table:style-name="Table29.1">
          <table:table-cell table:style-name="Table29.A1" office:value-type="string">
            <text:p text:style-name="P60">248</text:p>
          </table:table-cell>
          <table:table-cell table:style-name="Table29.A1" office:value-type="string">
            <text:p text:style-name="P60">mpc</text:p>
          </table:table-cell>
          <table:table-cell table:style-name="Table29.A1" office:value-type="string">
            <text:p text:style-name="P60">249</text:p>
          </table:table-cell>
          <table:table-cell table:style-name="Table29.A1" office:value-type="string">
            <text:p text:style-name="P60">cvf</text:p>
          </table:table-cell>
        </table:table-row>
        <table:table-row table:style-name="Table29.1">
          <table:table-cell table:style-name="Table29.A1" office:value-type="string">
            <text:p text:style-name="P60">250</text:p>
          </table:table-cell>
          <table:table-cell table:style-name="Table29.A1" office:value-type="string">
            <text:p text:style-name="P60">---</text:p>
          </table:table-cell>
          <table:table-cell table:style-name="Table29.A1" office:value-type="string">
            <text:p text:style-name="P60">251</text:p>
          </table:table-cell>
          <table:table-cell table:style-name="Table29.A1" office:value-type="string">
            <text:p text:style-name="P60">cpl</text:p>
          </table:table-cell>
        </table:table-row>
        <table:table-row table:style-name="Table29.1">
          <table:table-cell table:style-name="Table29.A1" office:value-type="string">
            <text:p text:style-name="P60">252</text:p>
          </table:table-cell>
          <table:table-cell table:style-name="Table29.A1" office:value-type="string">
            <text:p text:style-name="P60">sfs</text:p>
          </table:table-cell>
          <table:table-cell table:style-name="Table29.A1" office:value-type="string">
            <text:p text:style-name="P60">253</text:p>
          </table:table-cell>
          <table:table-cell table:style-name="Table29.A1" office:value-type="string">
            <text:p text:style-name="P60">sev</text:p>
          </table:table-cell>
        </table:table-row>
        <table:table-row table:style-name="Table29.1">
          <table:table-cell table:style-name="Table29.A1" office:value-type="string">
            <text:p text:style-name="P60">254</text:p>
          </table:table-cell>
          <table:table-cell table:style-name="Table29.A1" office:value-type="string">
            <text:p text:style-name="P60">mdc</text:p>
          </table:table-cell>
          <table:table-cell table:style-name="Table29.A1" office:value-type="string">
            <text:p text:style-name="P60">255</text:p>
          </table:table-cell>
          <table:table-cell table:style-name="Table29.A1" office:value-type="string">
            <text:p text:style-name="P60">---</text:p>
          </table:table-cell>
        </table:table-row>
        <table:table-row table:style-name="Table29.1">
          <table:table-cell table:style-name="Table29.A1" office:value-type="string">
            <text:p text:style-name="P60">256</text:p>
          </table:table-cell>
          <table:table-cell table:style-name="Table29.A1" office:value-type="string">
            <text:p text:style-name="P60">ltci</text:p>
          </table:table-cell>
          <table:table-cell table:style-name="Table29.A1" office:value-type="string">
            <text:p text:style-name="P60">257</text:p>
          </table:table-cell>
          <table:table-cell table:style-name="Table29.A1" office:value-type="string">
            <text:p text:style-name="P60">ltcr</text:p>
          </table:table-cell>
        </table:table-row>
        <table:table-row table:style-name="Table29.1">
          <table:table-cell table:style-name="Table29.A1" office:value-type="string">
            <text:p text:style-name="P60">258</text:p>
          </table:table-cell>
          <table:table-cell table:style-name="Table29.A1" office:value-type="string">
            <text:p text:style-name="P60">ltcs</text:p>
          </table:table-cell>
          <table:table-cell table:style-name="Table29.A1" office:value-type="string">
            <text:p text:style-name="P60">259</text:p>
          </table:table-cell>
          <table:table-cell table:style-name="Table29.A1" office:value-type="string">
            <text:p text:style-name="P60">ltcb</text:p>
          </table:table-cell>
        </table:table-row>
        <table:table-row table:style-name="Table29.1">
          <table:table-cell table:style-name="Table29.A1" office:value-type="string">
            <text:p text:style-name="P60">260</text:p>
          </table:table-cell>
          <table:table-cell table:style-name="Table29.A1" office:value-type="string">
            <text:p text:style-name="P60">ltcc</text:p>
          </table:table-cell>
          <table:table-cell table:style-name="Table29.A1" office:value-type="string">
            <text:p text:style-name="P60">261</text:p>
          </table:table-cell>
          <table:table-cell table:style-name="Table29.A1" office:value-type="string">
            <text:p text:style-name="P60">ltcx</text:p>
          </table:table-cell>
        </table:table-row>
        <table:table-row table:style-name="Table29.1">
          <table:table-cell table:style-name="Table29.A1" office:value-type="string">
            <text:p text:style-name="P60">262</text:p>
          </table:table-cell>
          <table:table-cell table:style-name="Table29.A1" office:value-type="string">
            <text:p text:style-name="P60">lto</text:p>
          </table:table-cell>
          <table:table-cell table:style-name="Table29.A1" office:value-type="string">
            <text:p text:style-name="P60">263</text:p>
          </table:table-cell>
          <table:table-cell table:style-name="Table29.A1" office:value-type="string">
            <text:p text:style-name="P60">lsp</text:p>
          </table:table-cell>
        </table:table-row>
      </table:table>
      <text:p text:style-name="P60"/>
      <text:p text:style-name="P60"/>
      <text:p text:style-name="Standard"><text:soft-page-break/></text:p>
      <text:h text:style-name="P212" text:outline-level="2"><text:bookmark-start text:name="__RefHeading___Toc15950_2478585429"/><text:bookmark-start text:name="_Toc528309211"/>System calls<text:bookmark-end text:name="__RefHeading___Toc15950_2478585429"/><text:bookmark-end text:name="_Toc528309211"/></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11">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11">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11">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11">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11">assb</text:span> <text:tab/><text:tab/><text:tab/>56<text:tab/><text:tab/>sadr len fila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11">asst</text:span> <text:tab/><text:tab/><text:tab/>46<text:tab/><text:tab/>sadr len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11">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11">asts</text:span> <text:tab/><text:tab/><text:tab/>61<text:tab/><text:tab/>str len int</text:p>
      <text:p text:style-name="Standard">Assert with message. Expects <text:span text:style-name="T79">the</text:span> <text:span text:style-name="T79">string </text:span>length, followed by the string <text:span text:style-name="T79">address</text:span>,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11">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11">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11">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11">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11">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11">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11">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80">translated to lvn form,</text:span>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11">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11">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11">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11">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11">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11">exs</text:span> <text:tab/><text:tab/><text:tab/>55<text:tab/><text:tab/>str len<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11">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11">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11">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11">hlt</text:span> <text:tab/><text:tab/><text:tab/>59</text:p>
      <text:p text:style-name="Standard">Halt program. Simply halts the running program.</text:p>
      <text:p text:style-name="Standard"/>
      <text:p text:style-name="P36">System Call<text:tab/><text:tab/>Number <text:tab/>Stack in<text:tab/><text:tab/>Stack out</text:p>
      <text:p text:style-name="Standard"><text:span text:style-name="T11">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11">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11">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81">translated to lvn form,</text:span>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text:style-name="WWNum9">
        <text:list-item>
          <text:p text:style-name="P223">To check that the tagfield constant list is equal between new() and dispose() operations.</text:p>
        </text:list-item>
        <text:list-item>
          <text:p text:style-name="P223">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11">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11">pbf</text:span> <text:tab/><text:tab/><text:tab/>36<text:tab/><text:tab/>size fila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11">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a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11">rbf</text:span> <text:tab/><text:tab/><text:tab/>32<text:tab/><text:tab/>len varaddr fila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11">rcb</text:span> <text:tab/><text:tab/><text:tab/>38<text:tab/><text:tab/>max min vaddr fila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all parameters including the file variable address from the stack.</text:p>
      <text:p text:style-name="Standard"/>
      <text:p text:style-name="P36">System Call<text:tab/><text:tab/>Number <text:tab/>Stack in<text:tab/><text:tab/>Stack out</text:p>
      <text:p text:style-name="Standard"><text:span text:style-name="T11">rcbf</text:span> <text:tab/><text:tab/><text:tab/>74<text:tab/><text:tab/> max min <text:span text:style-name="T81">fld</text:span> vadr filadr 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rdc</text:span> <text:tab/><text:tab/><text:tab/>13<text:tab/><text:tab/>varaddr filadr<text:tab/></text:p>
      <text:p text:style-name="Standard">Read character from text file. Expects the file variable address on stack, and the variable address to read to above that. Reads a single charact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cf</text:span> <text:tab/><text:tab/><text:tab/>75<text:tab/><text:tab/>field varadr 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i</text:span> <text:tab/><text:tab/><text:tab/>11<text:tab/><text:tab/>varaddr filadr<text:tab/></text:p>
      <text:p text:style-name="Standard">Read integer from text file. Expects the file variable address on stack, and the variable address to read to above that. Reads a single integ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36">System Call<text:tab/><text:tab/>Number <text:tab/>Stack in<text:tab/><text:tab/>Stack out</text:p>
      <text:p text:style-name="Standard"><text:span text:style-name="T11">rdif</text:span> <text:tab/><text:tab/><text:tab/>72<text:tab/><text:tab/>fld varaddr filadr<text:tab/>fila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11">rdr</text:span> <text:tab/><text:tab/><text:tab/>12<text:tab/><text:tab/>varaddr filadr<text:tab/></text:p>
      <text:p text:style-name="Standard">Read real from text file. Expects the file variable address on stack, and the variable address to read to above that. Reads a single real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11">rdrf</text:span> <text:tab/><text:tab/><text:tab/>73<text:tab/><text:tab/>fld varadr filadr<text:tab/></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11">rds</text:span> <text:tab/><text:tab/><text:tab/>70<text:tab/><text:tab/>sadr <text:span text:style-name="T82">len </text:span>filadr<text:tab/></text:p>
      <text:p text:style-name="Standard">Read string. Expects the length of the string on stack top, followed by the string address, then the address of the file to read. Only the number of characters in the string are read. The length and string address are removed.</text:p>
      <text:p text:style-name="P38">System Call<text:tab/><text:tab/>Number <text:tab/>Stack in<text:tab/><text:tab/>Stack out</text:p>
      <text:p text:style-name="Standard"><text:span text:style-name="T11">rdsf</text:span> <text:tab/><text:tab/><text:tab/>76<text:tab/><text:tab/><text:span text:style-name="T82">fld sadr </text:span>len 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System Call<text:tab/><text:tab/>Number <text:tab/>Stack in<text:tab/><text:tab/>Stack out</text:p>
      <text:p text:style-name="Standard"><text:span text:style-name="T11">rdsp</text:span> <text:tab/><text:tab/><text:tab/>77<text:tab/><text:tab/>sadr <text:span text:style-name="T83">len </text:span>filadr<text:tab/></text:p>
      <text:p text:style-name="Standard"><text:soft-page-break/>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a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all parameters including the file variable address from the stack.</text:p>
      <text:p text:style-name="table_20_header1">System Call<text:tab/><text:tab/>Number <text:tab/>Stack in<text:tab/><text:tab/>Stack out</text:p>
      <text:p text:style-name="Standard"><text:span text:style-name="T11">ribf</text:span> <text:tab/><text:tab/><text:tab/>72<text:tab/><text:tab/>max min <text:span text:style-name="T83">fld </text:span>vadr 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rln</text:span> <text:s/><text:tab/><text:tab/><text:tab/>3<text:tab/><text:tab/>filadr<text:tab/><text:tab/></text:p>
      <text:p text:style-name="Standard">Read next line from text file. Expects the file variable address on stack. The text file is read until an eoln() or eof() is encountered.</text:p>
      <text:p text:style-name="Standard">Purges the file variable address from the stack.</text:p>
      <text:p text:style-name="table_20_header1">System Call<text:tab/><text:tab/>Number <text:tab/>Stack in<text:tab/><text:tab/>Stack out</text:p>
      <text:p text:style-name="Standard"><text:span text:style-name="T11">rsb</text:span> <text:tab/><text:tab/><text:tab/>33<text:tab/><text:tab/>fila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11">rsf<text:tab/></text:span> <text:tab/><text:tab/>22<text:tab/><text:tab/>filadr</text:p>
      <text:p text:style-name="Standard">Reset file text. Expects the file variable address on stack. The text file is reset(). The file variable address is purged.</text:p>
      <text:p text:style-name="table_20_header1">System Call<text:tab/><text:tab/>Number <text:tab/>Stack in<text:tab/><text:tab/>Stack out</text:p>
      <text:p text:style-name="Standard"><text:span text:style-name="T11">rwb</text:span> <text:tab/><text:tab/><text:tab/>34<text:tab/><text:tab/>fileaddr</text:p>
      <text:p text:style-name="Standard">Rewrite file binary. Expects the file variable address on stack. The binary file is rewritten. The file variable address is purged.</text:p>
      <text:p text:style-name="table_20_header1"><text:soft-page-break/>System Call<text:tab/><text:tab/>Number <text:tab/>Stack in<text:tab/><text:tab/>Stack out</text:p>
      <text:p text:style-name="Standard"><text:span text:style-name="T11">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11">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11">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11">upd</text:span> <text:tab/><text:tab/><text:tab/>49<text:tab/><text:tab/>filadr</text:p>
      <text:p text:style-name="Standard">Update file. Expects a file address on stack. The file is changed to write mode and positioned at the start. The file is removed from the stack.</text:p>
      <text:p text:style-name="P38">System Call<text:tab/><text:tab/>Number <text:tab/>Stack in<text:tab/><text:tab/>Stack out</text:p>
      <text:p text:style-name="Standard"><text:span text:style-name="T11">wbb</text:span> <text:tab/><text:tab/><text:tab/>31<text:tab/><text:tab/>boolean fileaddr<text:tab/></text:p>
      <text:p text:style-name="Standard">Write Boolean to binary file. Expects the file variable address on stack, and the Boolean to write to above that. Writes a single boolean to the file from the variable.</text:p>
      <text:p text:style-name="Standard">Purges all parameters including the file variable address from the stack.</text:p>
      <text:p text:style-name="Standard"/>
      <text:p text:style-name="Standard"/>
      <text:p text:style-name="Standard"/>
      <text:p text:style-name="table_20_header1">System Call<text:tab/><text:tab/>Number <text:tab/>Stack in<text:tab/><text:tab/>Stack out</text:p>
      <text:p text:style-name="Standard"><text:span text:style-name="T11">wbc</text:span> <text:tab/><text:tab/><text:tab/>30<text:tab/><text:tab/>char fileaddr<text:tab/></text:p>
      <text:p text:style-name="Standard">Write character to binary file. Expects the file variable address on stack, and the character to write to above that. Writes a single character to the file from the variable.</text:p>
      <text:p text:style-name="Standard">Purges all parameters including the file variable address from the stack.</text:p>
      <text:p text:style-name="table_20_header1"><text:soft-page-break/>System Call<text:tab/><text:tab/>Number <text:tab/>Stack in<text:tab/><text:tab/>Stack out</text:p>
      <text:p text:style-name="Standard"><text:span text:style-name="T11">wbf</text:span> <text:tab/><text:tab/><text:tab/>27<text:tab/><text:tab/>size varaddr 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wbi</text:span> <text:tab/><text:tab/><text:tab/>28<text:tab/><text:tab/>integer fileaddr<text:tab/></text:p>
      <text:p text:style-name="Standard">Write integer to binary file. Expects the file variable address on stack, and an integer to write to above that. Writes a single integer to the file from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wbr</text:span> <text:tab/><text:tab/><text:tab/>29<text:tab/><text:tab/>real fileaddr<text:tab/></text:p>
      <text:p text:style-name="Standard">Write a real to binary file. Expects the file variable address on stack, and a real to write to above that. Writes a single real to the file from the variable.</text:p>
      <text:p text:style-name="Standard">Purges all parameters including the file variable address from the stack.</text:p>
      <text:p text:style-name="P38">System Call<text:tab/><text:tab/>Number <text:tab/>Stack in<text:tab/><text:tab/>Stack out</text:p>
      <text:p text:style-name="Standard"><text:span text:style-name="T11">wbx</text:span> <text:tab/><text:tab/><text:tab/>45<text:tab/><text:tab/>integer fileaddr<text:tab/></text:p>
      <text:p text:style-name="Standard">Write byte to binary file. Expects the file variable address on stack, and an integer to write to above that. Writes a single byte to the file from the variable.</text:p>
      <text:p text:style-name="Standard">Purges all parameters including the file variable address from the stack.</text:p>
      <text:p text:style-name="Standard"/>
      <text:p text:style-name="Standard"/>
      <text:p text:style-name="table_20_header1">System Call<text:tab/><text:tab/>Number <text:tab/>Stack in<text:tab/><text:tab/>Stack out</text:p>
      <text:p text:style-name="Standard"><text:span text:style-name="T11">wiz</text:span> <text:tab/><text:tab/><text:tab/>66<text:tab/><text:tab/>width integer 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text:soft-page-break/>Purges all parameters including the file variable address from the stack.</text:p>
      <text:p text:style-name="table_20_header1">System Call<text:tab/><text:tab/>Number <text:tab/>Stack in<text:tab/><text:tab/>Stack out</text:p>
      <text:p text:style-name="Standard"><text:span text:style-name="T11">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P38">System Call<text:tab/><text:tab/>Number <text:tab/>Stack in<text:tab/><text:tab/>Stack out</text:p>
      <text:p text:style-name="Standard"><text:span text:style-name="T11">wln</text:span> <text:tab/><text:tab/><text:tab/>5<text:tab/><text:tab/>fileaddr<text:tab/><text:tab/></text:p>
      <text:p text:style-name="Standard">Write next line to text file. Expects the file variable address on stack. A new line is written to the text file.</text:p>
      <text:p text:style-name="Standard">Leaves the <text:s/>file variable address.</text:p>
      <text:p text:style-name="Standard"/>
      <text:p text:style-name="table_20_header1">System Call<text:tab/><text:tab/>Number <text:tab/>Stack in<text:tab/><text:tab/>Stack out</text:p>
      <text:p text:style-name="Standard"><text:span text:style-name="T11">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c</text:span> <text:tab/><text:tab/><text:tab/>10<text:tab/><text:tab/>width char fileaddr</text:p>
      <text:p text:style-name="Standard">Write character to text file. Expects the file variable address on stack, <text:s/>a character to write to above that, and a field width at stack top. Writes the charact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f</text:span> <text:tab/><text:tab/><text:tab/>25<text:tab/><text:tab/>frac width real 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all parameters including the file variable address from the stack.</text:p>
      <text:p text:style-name="table_20_header1"><text:soft-page-break/>System Call<text:tab/><text:tab/>Number <text:tab/>Stack in<text:tab/><text:tab/>Stack out</text:p>
      <text:p text:style-name="Standard"><text:span text:style-name="T11">wri</text:span> <text:tab/><text:tab/><text:tab/> 8<text:tab/><text:tab/>width integer 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P38">System Call<text:tab/><text:tab/>Number <text:tab/>Stack in<text:tab/><text:tab/>Stack out</text:p>
      <text:p text:style-name="Standard"><text:span text:style-name="T11">wrib</text:span> <text:tab/><text:tab/><text:tab/>64<text:tab/><text:tab/>width integer fileaddr</text:p>
      <text:p text:style-name="Standard">Write integer to text file in binary form (base 2).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Standard"/>
      <text:p text:style-name="Standard"/>
      <text:p text:style-name="Standard"/>
      <text:p text:style-name="table_20_header1">System Call<text:tab/><text:tab/>Number <text:tab/>Stack in<text:tab/><text:tab/>Stack out</text:p>
      <text:p text:style-name="Standard"><text:span text:style-name="T11">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r</text:span> <text:tab/><text:tab/><text:tab/> 9<text:tab/><text:tab/>width real fileaddr</text:p>
      <text:p text:style-name="Standard">Write real to text file in floating point notation. Expects the file variable address on stack, <text:s/>a real to write to above that, and a field width at stack top. Writes the real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s</text:span> <text:s/><text:tab/><text:tab/><text:tab/>6<text:tab/><text:tab/>width saddr len fileaddr</text:p>
      <text:p text:style-name="Standard">Write string to text file. Expects the file variable address on stack, the length of the string above that, address of the string to write to above that, and the field width above that.</text:p>
      <text:p text:style-name="Standard">Purges all parameters including the file variable address from the stack.</text:p>
      <text:p text:style-name="P38"><text:soft-page-break/>System Call<text:tab/><text:tab/>Number <text:tab/>Stack in<text:tab/><text:tab/>Stack out</text:p>
      <text:p text:style-name="Standard"><text:span text:style-name="T11">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214" text:outline-level="3"><text:bookmark-start text:name="__RefHeading___Toc15952_2478585429_Copy_"/>System calls by number<text:bookmark-end text:name="__RefHeading___Toc15952_2478585429_Copy_"/><text:bookmark text:name="_Toc320481280_Copy_1"/><text:bookmark text:name="_Toc528309212_Copy_1"/><text:bookmark text:name="_Ref320433002_Copy_1"/><text:bookmark text:name="_Ref320433003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59">0</text:p>
          </table:table-cell>
          <table:table-cell table:style-name="Table30.A1" office:value-type="string">
            <text:p text:style-name="P59">get</text:p>
          </table:table-cell>
          <table:table-cell table:style-name="Table30.A1" office:value-type="string">
            <text:p text:style-name="P59">1</text:p>
          </table:table-cell>
          <table:table-cell table:style-name="Table30.A1" office:value-type="string">
            <text:p text:style-name="P59">put</text:p>
          </table:table-cell>
        </table:table-row>
        <table:table-row table:style-name="Table30.1">
          <table:table-cell table:style-name="Table30.A1" office:value-type="string">
            <text:p text:style-name="P59">2</text:p>
          </table:table-cell>
          <table:table-cell table:style-name="Table30.A1" office:value-type="string">
            <text:p text:style-name="P59">thw</text:p>
          </table:table-cell>
          <table:table-cell table:style-name="Table30.A1" office:value-type="string">
            <text:p text:style-name="P59">3</text:p>
          </table:table-cell>
          <table:table-cell table:style-name="Table30.A1" office:value-type="string">
            <text:p text:style-name="P59">rln</text:p>
          </table:table-cell>
        </table:table-row>
        <table:table-row table:style-name="Table30.1">
          <table:table-cell table:style-name="Table30.A1" office:value-type="string">
            <text:p text:style-name="P59">4</text:p>
          </table:table-cell>
          <table:table-cell table:style-name="Table30.A1" office:value-type="string">
            <text:p text:style-name="P59">new</text:p>
          </table:table-cell>
          <table:table-cell table:style-name="Table30.A1" office:value-type="string">
            <text:p text:style-name="P59">5</text:p>
          </table:table-cell>
          <table:table-cell table:style-name="Table30.A1" office:value-type="string">
            <text:p text:style-name="P59">wln</text:p>
          </table:table-cell>
        </table:table-row>
        <table:table-row table:style-name="Table30.1">
          <table:table-cell table:style-name="Table30.A1" office:value-type="string">
            <text:p text:style-name="P59">6</text:p>
          </table:table-cell>
          <table:table-cell table:style-name="Table30.A1" office:value-type="string">
            <text:p text:style-name="P59">wrs</text:p>
          </table:table-cell>
          <table:table-cell table:style-name="Table30.A1" office:value-type="string">
            <text:p text:style-name="P59">7</text:p>
          </table:table-cell>
          <table:table-cell table:style-name="Table30.A1" office:value-type="string">
            <text:p text:style-name="P59">eln</text:p>
          </table:table-cell>
        </table:table-row>
        <table:table-row table:style-name="Table30.1">
          <table:table-cell table:style-name="Table30.A1" office:value-type="string">
            <text:p text:style-name="P59">8</text:p>
          </table:table-cell>
          <table:table-cell table:style-name="Table30.A1" office:value-type="string">
            <text:p text:style-name="P59">wri</text:p>
          </table:table-cell>
          <table:table-cell table:style-name="Table30.A1" office:value-type="string">
            <text:p text:style-name="P59">9</text:p>
          </table:table-cell>
          <table:table-cell table:style-name="Table30.A1" office:value-type="string">
            <text:p text:style-name="P59">wrr</text:p>
          </table:table-cell>
        </table:table-row>
        <table:table-row table:style-name="Table30.1">
          <table:table-cell table:style-name="Table30.A1" office:value-type="string">
            <text:p text:style-name="P59">10</text:p>
          </table:table-cell>
          <table:table-cell table:style-name="Table30.A1" office:value-type="string">
            <text:p text:style-name="P59">wrc</text:p>
          </table:table-cell>
          <table:table-cell table:style-name="Table30.A1" office:value-type="string">
            <text:p text:style-name="P59">11</text:p>
          </table:table-cell>
          <table:table-cell table:style-name="Table30.A1" office:value-type="string">
            <text:p text:style-name="P59">rdi</text:p>
          </table:table-cell>
        </table:table-row>
        <table:table-row table:style-name="Table30.1">
          <table:table-cell table:style-name="Table30.A1" office:value-type="string">
            <text:p text:style-name="P59">12</text:p>
          </table:table-cell>
          <table:table-cell table:style-name="Table30.A1" office:value-type="string">
            <text:p text:style-name="P59">rdr</text:p>
          </table:table-cell>
          <table:table-cell table:style-name="Table30.A1" office:value-type="string">
            <text:p text:style-name="P59">13</text:p>
          </table:table-cell>
          <table:table-cell table:style-name="Table30.A1" office:value-type="string">
            <text:p text:style-name="P59">rdc</text:p>
          </table:table-cell>
        </table:table-row>
        <table:table-row table:style-name="Table30.1">
          <table:table-cell table:style-name="Table30.A1" office:value-type="string">
            <text:p text:style-name="P59">14</text:p>
          </table:table-cell>
          <table:table-cell table:style-name="Table30.A1" office:value-type="string">
            <text:p text:style-name="P59">sin</text:p>
          </table:table-cell>
          <table:table-cell table:style-name="Table30.A1" office:value-type="string">
            <text:p text:style-name="P59">15</text:p>
          </table:table-cell>
          <table:table-cell table:style-name="Table30.A1" office:value-type="string">
            <text:p text:style-name="P59">cos</text:p>
          </table:table-cell>
        </table:table-row>
        <table:table-row table:style-name="Table30.1">
          <table:table-cell table:style-name="Table30.A1" office:value-type="string">
            <text:p text:style-name="P59">16</text:p>
          </table:table-cell>
          <table:table-cell table:style-name="Table30.A1" office:value-type="string">
            <text:p text:style-name="P59">exp</text:p>
          </table:table-cell>
          <table:table-cell table:style-name="Table30.A1" office:value-type="string">
            <text:p text:style-name="P59">17</text:p>
          </table:table-cell>
          <table:table-cell table:style-name="Table30.A1" office:value-type="string">
            <text:p text:style-name="P59">log</text:p>
          </table:table-cell>
        </table:table-row>
        <table:table-row table:style-name="Table30.1">
          <table:table-cell table:style-name="Table30.A1" office:value-type="string">
            <text:p text:style-name="P59">18</text:p>
          </table:table-cell>
          <table:table-cell table:style-name="Table30.A1" office:value-type="string">
            <text:p text:style-name="P59">sqt</text:p>
          </table:table-cell>
          <table:table-cell table:style-name="Table30.A1" office:value-type="string">
            <text:p text:style-name="P59">19</text:p>
          </table:table-cell>
          <table:table-cell table:style-name="Table30.A1" office:value-type="string">
            <text:p text:style-name="P59">atn</text:p>
          </table:table-cell>
        </table:table-row>
        <table:table-row table:style-name="Table30.1">
          <table:table-cell table:style-name="Table30.A1" office:value-type="string">
            <text:p text:style-name="P59">20</text:p>
          </table:table-cell>
          <table:table-cell table:style-name="Table30.A1" office:value-type="string">
            <text:p text:style-name="P59">---</text:p>
          </table:table-cell>
          <table:table-cell table:style-name="Table30.A1" office:value-type="string">
            <text:p text:style-name="P59">21</text:p>
          </table:table-cell>
          <table:table-cell table:style-name="Table30.A1" office:value-type="string">
            <text:p text:style-name="P59">pag</text:p>
          </table:table-cell>
        </table:table-row>
        <table:table-row table:style-name="Table30.1">
          <table:table-cell table:style-name="Table30.A1" office:value-type="string">
            <text:p text:style-name="P59">22</text:p>
          </table:table-cell>
          <table:table-cell table:style-name="Table30.A1" office:value-type="string">
            <text:p text:style-name="P59">rsf</text:p>
          </table:table-cell>
          <table:table-cell table:style-name="Table30.A1" office:value-type="string">
            <text:p text:style-name="P59">23</text:p>
          </table:table-cell>
          <table:table-cell table:style-name="Table30.A1" office:value-type="string">
            <text:p text:style-name="P59">rwf</text:p>
          </table:table-cell>
        </table:table-row>
        <table:table-row table:style-name="Table30.1">
          <table:table-cell table:style-name="Table30.A1" office:value-type="string">
            <text:p text:style-name="P59">24</text:p>
          </table:table-cell>
          <table:table-cell table:style-name="Table30.A1" office:value-type="string">
            <text:p text:style-name="P59">wrb</text:p>
          </table:table-cell>
          <table:table-cell table:style-name="Table30.A1" office:value-type="string">
            <text:p text:style-name="P59">25</text:p>
          </table:table-cell>
          <table:table-cell table:style-name="Table30.A1" office:value-type="string">
            <text:p text:style-name="P59">wrf</text:p>
          </table:table-cell>
        </table:table-row>
        <table:table-row table:style-name="Table30.1">
          <table:table-cell table:style-name="Table30.A1" office:value-type="string">
            <text:p text:style-name="P59">26</text:p>
          </table:table-cell>
          <table:table-cell table:style-name="Table30.A1" office:value-type="string">
            <text:p text:style-name="P59">dsp</text:p>
          </table:table-cell>
          <table:table-cell table:style-name="Table30.A1" office:value-type="string">
            <text:p text:style-name="P59">27</text:p>
          </table:table-cell>
          <table:table-cell table:style-name="Table30.A1" office:value-type="string">
            <text:p text:style-name="P59">wbf</text:p>
          </table:table-cell>
        </table:table-row>
        <table:table-row table:style-name="Table30.1">
          <table:table-cell table:style-name="Table30.A1" office:value-type="string">
            <text:p text:style-name="P59">28</text:p>
          </table:table-cell>
          <table:table-cell table:style-name="Table30.A1" office:value-type="string">
            <text:p text:style-name="P59">wbi</text:p>
          </table:table-cell>
          <table:table-cell table:style-name="Table30.A1" office:value-type="string">
            <text:p text:style-name="P59">29</text:p>
          </table:table-cell>
          <table:table-cell table:style-name="Table30.A1" office:value-type="string">
            <text:p text:style-name="P59">wbr</text:p>
          </table:table-cell>
        </table:table-row>
        <table:table-row table:style-name="Table30.1">
          <table:table-cell table:style-name="Table30.A1" office:value-type="string">
            <text:p text:style-name="P59">30</text:p>
          </table:table-cell>
          <table:table-cell table:style-name="Table30.A1" office:value-type="string">
            <text:p text:style-name="P59">wbc</text:p>
          </table:table-cell>
          <table:table-cell table:style-name="Table30.A1" office:value-type="string">
            <text:p text:style-name="P59">31</text:p>
          </table:table-cell>
          <table:table-cell table:style-name="Table30.A1" office:value-type="string">
            <text:p text:style-name="P59">wbb</text:p>
          </table:table-cell>
        </table:table-row>
        <table:table-row table:style-name="Table30.1">
          <table:table-cell table:style-name="Table30.A1" office:value-type="string">
            <text:p text:style-name="P59">32</text:p>
          </table:table-cell>
          <table:table-cell table:style-name="Table30.A1" office:value-type="string">
            <text:p text:style-name="P59">rbf</text:p>
          </table:table-cell>
          <table:table-cell table:style-name="Table30.A1" office:value-type="string">
            <text:p text:style-name="P59">33</text:p>
          </table:table-cell>
          <table:table-cell table:style-name="Table30.A1" office:value-type="string">
            <text:p text:style-name="P59">rsb</text:p>
          </table:table-cell>
        </table:table-row>
        <table:table-row table:style-name="Table30.1">
          <table:table-cell table:style-name="Table30.A1" office:value-type="string">
            <text:p text:style-name="P59">34</text:p>
          </table:table-cell>
          <table:table-cell table:style-name="Table30.A1" office:value-type="string">
            <text:p text:style-name="P59">rwb</text:p>
          </table:table-cell>
          <table:table-cell table:style-name="Table30.A1" office:value-type="string">
            <text:p text:style-name="P59">35</text:p>
          </table:table-cell>
          <table:table-cell table:style-name="Table30.A1" office:value-type="string">
            <text:p text:style-name="P59">gbf</text:p>
          </table:table-cell>
        </table:table-row>
        <table:table-row table:style-name="Table30.1">
          <table:table-cell table:style-name="Table30.A1" office:value-type="string">
            <text:p text:style-name="P59">36</text:p>
          </table:table-cell>
          <table:table-cell table:style-name="Table30.A1" office:value-type="string">
            <text:p text:style-name="P59">pbf</text:p>
          </table:table-cell>
          <table:table-cell table:style-name="Table30.A1" office:value-type="string">
            <text:p text:style-name="P59">37</text:p>
          </table:table-cell>
          <table:table-cell table:style-name="Table30.A1" office:value-type="string">
            <text:p text:style-name="P59">rib</text:p>
          </table:table-cell>
        </table:table-row>
        <table:table-row table:style-name="Table30.1">
          <table:table-cell table:style-name="Table30.A1" office:value-type="string">
            <text:p text:style-name="P59">38</text:p>
          </table:table-cell>
          <table:table-cell table:style-name="Table30.A1" office:value-type="string">
            <text:p text:style-name="P59">rcb</text:p>
          </table:table-cell>
          <table:table-cell table:style-name="Table30.A1" office:value-type="string">
            <text:p text:style-name="P59">39</text:p>
          </table:table-cell>
          <table:table-cell table:style-name="Table30.A1" office:value-type="string">
            <text:p text:style-name="P59">nwl</text:p>
          </table:table-cell>
        </table:table-row>
        <table:table-row table:style-name="Table30.1">
          <table:table-cell table:style-name="Table30.A1" office:value-type="string">
            <text:p text:style-name="P59">40</text:p>
          </table:table-cell>
          <table:table-cell table:style-name="Table30.A1" office:value-type="string">
            <text:p text:style-name="P59">dsl</text:p>
          </table:table-cell>
          <table:table-cell table:style-name="Table30.A1" office:value-type="string">
            <text:p text:style-name="P59">41</text:p>
          </table:table-cell>
          <table:table-cell table:style-name="Table30.A1" office:value-type="string">
            <text:p text:style-name="P59">eof</text:p>
          </table:table-cell>
        </table:table-row>
        <table:table-row table:style-name="Table30.1">
          <table:table-cell table:style-name="Table30.A1" office:value-type="string">
            <text:p text:style-name="P59">42</text:p>
          </table:table-cell>
          <table:table-cell table:style-name="Table30.A1" office:value-type="string">
            <text:p text:style-name="P59">efb</text:p>
          </table:table-cell>
          <table:table-cell table:style-name="Table30.A1" office:value-type="string">
            <text:p text:style-name="P59">43</text:p>
          </table:table-cell>
          <table:table-cell table:style-name="Table30.A1" office:value-type="string">
            <text:p text:style-name="P59">fbv</text:p>
          </table:table-cell>
        </table:table-row>
        <table:table-row table:style-name="Table30.1">
          <table:table-cell table:style-name="Table30.A1" office:value-type="string">
            <text:p text:style-name="P59">44</text:p>
          </table:table-cell>
          <table:table-cell table:style-name="Table30.A1" office:value-type="string">
            <text:p text:style-name="P59">fvb</text:p>
          </table:table-cell>
          <table:table-cell table:style-name="Table30.A1" office:value-type="string">
            <text:p text:style-name="P59">45</text:p>
          </table:table-cell>
          <table:table-cell table:style-name="Table30.A1" office:value-type="string">
            <text:p text:style-name="P59">wbx</text:p>
          </table:table-cell>
        </table:table-row>
        <table:table-row table:style-name="Table30.1">
          <table:table-cell table:style-name="Table30.A1" office:value-type="string">
            <text:p text:style-name="P59">46</text:p>
          </table:table-cell>
          <table:table-cell table:style-name="Table30.A1" office:value-type="string">
            <text:p text:style-name="P59">asst</text:p>
          </table:table-cell>
          <table:table-cell table:style-name="Table30.A1" office:value-type="string">
            <text:p text:style-name="P59">47</text:p>
          </table:table-cell>
          <table:table-cell table:style-name="Table30.A1" office:value-type="string">
            <text:p text:style-name="P59">clst</text:p>
          </table:table-cell>
        </table:table-row>
        <table:table-row table:style-name="Table30.1">
          <table:table-cell table:style-name="Table30.A1" office:value-type="string">
            <text:p text:style-name="P59">48</text:p>
          </table:table-cell>
          <table:table-cell table:style-name="Table30.A1" office:value-type="string">
            <text:p text:style-name="P59">pos</text:p>
          </table:table-cell>
          <table:table-cell table:style-name="Table30.A1" office:value-type="string">
            <text:p text:style-name="P59">49</text:p>
          </table:table-cell>
          <table:table-cell table:style-name="Table30.A1" office:value-type="string">
            <text:p text:style-name="P59">upd</text:p>
          </table:table-cell>
        </table:table-row>
        <table:table-row table:style-name="Table30.1">
          <table:table-cell table:style-name="Table30.A1" office:value-type="string">
            <text:p text:style-name="P59">50</text:p>
          </table:table-cell>
          <table:table-cell table:style-name="Table30.A1" office:value-type="string">
            <text:p text:style-name="P59">appt</text:p>
          </table:table-cell>
          <table:table-cell table:style-name="Table30.A1" office:value-type="string">
            <text:p text:style-name="P59">51</text:p>
          </table:table-cell>
          <table:table-cell table:style-name="Table30.A1" office:value-type="string">
            <text:p text:style-name="P59">del</text:p>
          </table:table-cell>
        </table:table-row>
        <table:table-row table:style-name="Table30.1">
          <table:table-cell table:style-name="Table30.A1" office:value-type="string">
            <text:p text:style-name="P59">52</text:p>
          </table:table-cell>
          <table:table-cell table:style-name="Table30.A1" office:value-type="string">
            <text:p text:style-name="P59">chg</text:p>
          </table:table-cell>
          <table:table-cell table:style-name="Table30.A1" office:value-type="string">
            <text:p text:style-name="P59">53</text:p>
          </table:table-cell>
          <table:table-cell table:style-name="Table30.A1" office:value-type="string">
            <text:p text:style-name="P59">len</text:p>
          </table:table-cell>
        </table:table-row>
        <table:table-row table:style-name="Table30.1">
          <table:table-cell table:style-name="Table30.A1" office:value-type="string">
            <text:p text:style-name="P59">54</text:p>
          </table:table-cell>
          <table:table-cell table:style-name="Table30.A1" office:value-type="string">
            <text:p text:style-name="P59">loc</text:p>
          </table:table-cell>
          <table:table-cell table:style-name="Table30.A1" office:value-type="string">
            <text:p text:style-name="P59">55</text:p>
          </table:table-cell>
          <table:table-cell table:style-name="Table30.A1" office:value-type="string">
            <text:p text:style-name="P59">exs</text:p>
          </table:table-cell>
        </table:table-row>
        <table:table-row table:style-name="Table30.1">
          <table:table-cell table:style-name="Table30.A1" office:value-type="string">
            <text:p text:style-name="P59">56</text:p>
          </table:table-cell>
          <table:table-cell table:style-name="Table30.A1" office:value-type="string">
            <text:p text:style-name="P59">assb</text:p>
          </table:table-cell>
          <table:table-cell table:style-name="Table30.A1" office:value-type="string">
            <text:p text:style-name="P59">57</text:p>
          </table:table-cell>
          <table:table-cell table:style-name="Table30.A1" office:value-type="string">
            <text:p text:style-name="P59">clsb</text:p>
          </table:table-cell>
        </table:table-row>
        <table:table-row table:style-name="Table30.1">
          <table:table-cell table:style-name="Table30.A1" office:value-type="string">
            <text:p text:style-name="P59">58</text:p>
          </table:table-cell>
          <table:table-cell table:style-name="Table30.A1" office:value-type="string">
            <text:p text:style-name="P59">appb</text:p>
          </table:table-cell>
          <table:table-cell table:style-name="Table30.A1" office:value-type="string">
            <text:p text:style-name="P59">59</text:p>
          </table:table-cell>
          <table:table-cell table:style-name="Table30.A1" office:value-type="string">
            <text:p text:style-name="P59">hlt</text:p>
          </table:table-cell>
        </table:table-row>
        <table:table-row table:style-name="Table30.1">
          <table:table-cell table:style-name="Table30.A1" office:value-type="string">
            <text:p text:style-name="P59">60</text:p>
          </table:table-cell>
          <table:table-cell table:style-name="Table30.A1" office:value-type="string">
            <text:p text:style-name="P59">ast</text:p>
          </table:table-cell>
          <table:table-cell table:style-name="Table30.A1" office:value-type="string">
            <text:p text:style-name="P59">61</text:p>
          </table:table-cell>
          <table:table-cell table:style-name="Table30.A1" office:value-type="string">
            <text:p text:style-name="P59">asts</text:p>
          </table:table-cell>
        </table:table-row>
        <table:table-row table:style-name="Table30.1">
          <table:table-cell table:style-name="Table30.A1" office:value-type="string">
            <text:p text:style-name="P59">62</text:p>
          </table:table-cell>
          <table:table-cell table:style-name="Table30.A1" office:value-type="string">
            <text:p text:style-name="P59">wrih</text:p>
          </table:table-cell>
          <table:table-cell table:style-name="Table30.A1" office:value-type="string">
            <text:p text:style-name="P59">63</text:p>
          </table:table-cell>
          <table:table-cell table:style-name="Table30.A1" office:value-type="string">
            <text:p text:style-name="P59">wrio</text:p>
          </table:table-cell>
        </table:table-row>
        <table:table-row table:style-name="Table30.1">
          <table:table-cell table:style-name="Table30.A1" office:value-type="string">
            <text:p text:style-name="P59">64</text:p>
          </table:table-cell>
          <table:table-cell table:style-name="Table30.A1" office:value-type="string">
            <text:p text:style-name="P59">wrib</text:p>
          </table:table-cell>
          <table:table-cell table:style-name="Table30.A1" office:value-type="string">
            <text:p text:style-name="P59">65</text:p>
          </table:table-cell>
          <table:table-cell table:style-name="Table30.A1" office:value-type="string">
            <text:p text:style-name="P59">wrsp</text:p>
          </table:table-cell>
        </table:table-row>
        <table:table-row table:style-name="Table30.1">
          <table:table-cell table:style-name="Table30.A1" office:value-type="string">
            <text:p text:style-name="P59">66</text:p>
          </table:table-cell>
          <table:table-cell table:style-name="Table30.A1" office:value-type="string">
            <text:p text:style-name="P59">wiz</text:p>
          </table:table-cell>
          <table:table-cell table:style-name="Table30.A1" office:value-type="string">
            <text:p text:style-name="P59">67</text:p>
          </table:table-cell>
          <table:table-cell table:style-name="Table30.A1" office:value-type="string">
            <text:p text:style-name="P59">wizh</text:p>
          </table:table-cell>
        </table:table-row>
        <table:table-row table:style-name="Table30.1">
          <table:table-cell table:style-name="Table30.A1" office:value-type="string">
            <text:p text:style-name="P59">68</text:p>
          </table:table-cell>
          <table:table-cell table:style-name="Table30.A1" office:value-type="string">
            <text:p text:style-name="P59">wizo</text:p>
          </table:table-cell>
          <table:table-cell table:style-name="Table30.A1" office:value-type="string">
            <text:p text:style-name="P59">69</text:p>
          </table:table-cell>
          <table:table-cell table:style-name="Table30.A1" office:value-type="string">
            <text:p text:style-name="P59">wizb</text:p>
          </table:table-cell>
        </table:table-row>
        <table:table-row table:style-name="Table30.1">
          <table:table-cell table:style-name="Table30.A1" office:value-type="string">
            <text:p text:style-name="P59">70</text:p>
          </table:table-cell>
          <table:table-cell table:style-name="Table30.A1" office:value-type="string">
            <text:p text:style-name="P59">rds</text:p>
          </table:table-cell>
          <table:table-cell table:style-name="Table30.A1" office:value-type="string">
            <text:p text:style-name="P59">71</text:p>
          </table:table-cell>
          <table:table-cell table:style-name="Table30.A1" office:value-type="string">
            <text:p text:style-name="P59">ribf</text:p>
          </table:table-cell>
        </table:table-row>
        <table:table-row table:style-name="Table30.1">
          <table:table-cell table:style-name="Table30.A1" office:value-type="string">
            <text:p text:style-name="P59">72</text:p>
          </table:table-cell>
          <table:table-cell table:style-name="Table30.A1" office:value-type="string">
            <text:p text:style-name="P59">rdif</text:p>
          </table:table-cell>
          <table:table-cell table:style-name="Table30.A1" office:value-type="string">
            <text:p text:style-name="P59">73</text:p>
          </table:table-cell>
          <table:table-cell table:style-name="Table30.A1" office:value-type="string">
            <text:p text:style-name="P59">rdrf</text:p>
          </table:table-cell>
        </table:table-row>
        <table:table-row table:style-name="Table30.1">
          <table:table-cell table:style-name="Table30.A1" office:value-type="string">
            <text:p text:style-name="P59">74</text:p>
          </table:table-cell>
          <table:table-cell table:style-name="Table30.A1" office:value-type="string">
            <text:p text:style-name="P59">rcbf</text:p>
          </table:table-cell>
          <table:table-cell table:style-name="Table30.A1" office:value-type="string">
            <text:p text:style-name="P59">75</text:p>
          </table:table-cell>
          <table:table-cell table:style-name="Table30.A1" office:value-type="string">
            <text:p text:style-name="P59">rdcf</text:p>
          </table:table-cell>
        </table:table-row>
        <table:table-row table:style-name="Table30.1">
          <table:table-cell table:style-name="Table30.A1" office:value-type="string">
            <text:p text:style-name="P59">76</text:p>
          </table:table-cell>
          <table:table-cell table:style-name="Table30.A1" office:value-type="string">
            <text:p text:style-name="P59">rdsf</text:p>
          </table:table-cell>
          <table:table-cell table:style-name="Table30.A1" office:value-type="string">
            <text:p text:style-name="P59">77</text:p>
          </table:table-cell>
          <table:table-cell table:style-name="Table30.A1" office:value-type="string">
            <text:p text:style-name="P59">rdsp</text:p>
          </table:table-cell>
        </table:table-row>
        <table:table-row table:style-name="Table30.1">
          <table:table-cell table:style-name="Table30.A1" office:value-type="string">
            <text:p text:style-name="P59">78</text:p>
          </table:table-cell>
          <table:table-cell table:style-name="Table30.A1" office:value-type="string">
            <text:p text:style-name="P59">aeft</text:p>
          </table:table-cell>
          <table:table-cell table:style-name="Table30.A1" office:value-type="string">
            <text:p text:style-name="P59">79</text:p>
          </table:table-cell>
          <table:table-cell table:style-name="Table30.A1" office:value-type="string">
            <text:p text:style-name="P59">aefb</text:p>
          </table:table-cell>
        </table:table-row>
        <text:soft-page-break/>
        <table:table-row table:style-name="Table30.1">
          <table:table-cell table:style-name="Table30.A1" office:value-type="string">
            <text:p text:style-name="P59">80</text:p>
          </table:table-cell>
          <table:table-cell table:style-name="Table30.A1" office:value-type="string">
            <text:p text:style-name="P59">rdie</text:p>
          </table:table-cell>
          <table:table-cell table:style-name="Table30.A1" office:value-type="string">
            <text:p text:style-name="P59">81</text:p>
          </table:table-cell>
          <table:table-cell table:style-name="Table30.A1" office:value-type="string">
            <text:p text:style-name="P59">rdre</text:p>
          </table:table-cell>
        </table:table-row>
        <table:table-row table:style-name="Table30.1">
          <table:table-cell table:style-name="Table30.A1" office:value-type="string">
            <text:p text:style-name="P59">82</text:p>
          </table:table-cell>
          <table:table-cell table:style-name="Table30.A1" office:value-type="string">
            <text:p text:style-name="P59">rdx</text:p>
          </table:table-cell>
          <table:table-cell table:style-name="Table30.A1" office:value-type="string">
            <text:p text:style-name="P59">83</text:p>
          </table:table-cell>
          <table:table-cell table:style-name="Table30.A1" office:value-type="string">
            <text:p text:style-name="P59">rdxf</text:p>
          </table:table-cell>
        </table:table-row>
        <table:table-row table:style-name="Table30.1">
          <table:table-cell table:style-name="Table30.A1" office:value-type="string">
            <text:p text:style-name="P59">84</text:p>
          </table:table-cell>
          <table:table-cell table:style-name="Table30.A1" office:value-type="string">
            <text:p text:style-name="P59">rxb</text:p>
          </table:table-cell>
          <table:table-cell table:style-name="Table30.A1" office:value-type="string">
            <text:p text:style-name="P59">85</text:p>
          </table:table-cell>
          <table:table-cell table:style-name="Table30.A1" office:value-type="string">
            <text:p text:style-name="P59">rxbf</text:p>
          </table:table-cell>
        </table:table-row>
        <table:table-row table:style-name="Table30.1">
          <table:table-cell table:style-name="Table30.A1" office:value-type="string">
            <text:p text:style-name="P59">86</text:p>
          </table:table-cell>
          <table:table-cell table:style-name="Table30.A1" office:value-type="string">
            <text:p text:style-name="P59">rdsc</text:p>
          </table:table-cell>
          <table:table-cell table:style-name="Table30.A1" office:value-type="string">
            <text:p text:style-name="P59">87</text:p>
          </table:table-cell>
          <table:table-cell table:style-name="Table30.A1" office:value-type="string">
            <text:p text:style-name="P59">rdih</text:p>
          </table:table-cell>
        </table:table-row>
        <table:table-row table:style-name="Table30.1">
          <table:table-cell table:style-name="Table30.A1" office:value-type="string">
            <text:p text:style-name="P59">88</text:p>
          </table:table-cell>
          <table:table-cell table:style-name="Table30.A1" office:value-type="string">
            <text:p text:style-name="P59">rdio</text:p>
          </table:table-cell>
          <table:table-cell table:style-name="Table30.A1" office:value-type="string">
            <text:p text:style-name="P59">89</text:p>
          </table:table-cell>
          <table:table-cell table:style-name="Table30.A1" office:value-type="string">
            <text:p text:style-name="P59">rdib</text:p>
          </table:table-cell>
        </table:table-row>
        <table:table-row table:style-name="Table30.1">
          <table:table-cell table:style-name="Table30.A1" office:value-type="string">
            <text:p text:style-name="P59">90</text:p>
          </table:table-cell>
          <table:table-cell table:style-name="Table30.A1" office:value-type="string">
            <text:p text:style-name="P59">rifh</text:p>
          </table:table-cell>
          <table:table-cell table:style-name="Table30.A1" office:value-type="string">
            <text:p text:style-name="P59">91</text:p>
          </table:table-cell>
          <table:table-cell table:style-name="Table30.A1" office:value-type="string">
            <text:p text:style-name="P59">rifo</text:p>
          </table:table-cell>
        </table:table-row>
        <table:table-row table:style-name="Table30.1">
          <table:table-cell table:style-name="Table30.A1" office:value-type="string">
            <text:p text:style-name="P59">92</text:p>
          </table:table-cell>
          <table:table-cell table:style-name="Table30.A1" office:value-type="string">
            <text:p text:style-name="P59">rifb</text:p>
          </table:table-cell>
          <table:table-cell table:style-name="Table30.A1" office:value-type="string">
            <text:p text:style-name="P59">93</text:p>
          </table:table-cell>
          <table:table-cell table:style-name="Table30.A1" office:value-type="string">
            <text:p text:style-name="P59">ribh</text:p>
          </table:table-cell>
        </table:table-row>
        <table:table-row table:style-name="Table30.1">
          <table:table-cell table:style-name="Table30.A1" office:value-type="string">
            <text:p text:style-name="P59">94</text:p>
          </table:table-cell>
          <table:table-cell table:style-name="Table30.A1" office:value-type="string">
            <text:p text:style-name="P59">ribo</text:p>
          </table:table-cell>
          <table:table-cell table:style-name="Table30.A1" office:value-type="string">
            <text:p text:style-name="P59">95</text:p>
          </table:table-cell>
          <table:table-cell table:style-name="Table30.A1" office:value-type="string">
            <text:p text:style-name="P59">ribb</text:p>
          </table:table-cell>
        </table:table-row>
        <table:table-row table:style-name="Table30.1">
          <table:table-cell table:style-name="Table30.A1" office:value-type="string">
            <text:p text:style-name="P59">96</text:p>
          </table:table-cell>
          <table:table-cell table:style-name="Table30.A1" office:value-type="string">
            <text:p text:style-name="P59">rbfh</text:p>
          </table:table-cell>
          <table:table-cell table:style-name="Table30.A1" office:value-type="string">
            <text:p text:style-name="P59">97</text:p>
          </table:table-cell>
          <table:table-cell table:style-name="Table30.A1" office:value-type="string">
            <text:p text:style-name="P59">rbfo</text:p>
          </table:table-cell>
        </table:table-row>
        <table:table-row table:style-name="Table30.1">
          <table:table-cell table:style-name="Table30.A1" office:value-type="string">
            <text:p text:style-name="P59">98</text:p>
          </table:table-cell>
          <table:table-cell table:style-name="Table30.A1" office:value-type="string">
            <text:p text:style-name="P59">rbfb</text:p>
          </table:table-cell>
          <table:table-cell table:style-name="Table30.A1" office:value-type="string">
            <text:p text:style-name="P59">99</text:p>
          </table:table-cell>
          <table:table-cell table:style-name="Table30.A1" office:value-type="string">
            <text:p text:style-name="P59">rdxh</text:p>
          </table:table-cell>
        </table:table-row>
        <table:table-row table:style-name="Table30.1">
          <table:table-cell table:style-name="Table30.A1" office:value-type="string">
            <text:p text:style-name="P59">100</text:p>
          </table:table-cell>
          <table:table-cell table:style-name="Table30.A1" office:value-type="string">
            <text:p text:style-name="P59">rdxo</text:p>
          </table:table-cell>
          <table:table-cell table:style-name="Table30.A1" office:value-type="string">
            <text:p text:style-name="P59">101</text:p>
          </table:table-cell>
          <table:table-cell table:style-name="Table30.A1" office:value-type="string">
            <text:p text:style-name="P59">rdxb</text:p>
          </table:table-cell>
        </table:table-row>
        <table:table-row table:style-name="Table30.1">
          <table:table-cell table:style-name="Table30.A1" office:value-type="string">
            <text:p text:style-name="P59">102</text:p>
          </table:table-cell>
          <table:table-cell table:style-name="Table30.A1" office:value-type="string">
            <text:p text:style-name="P59">rxfh</text:p>
          </table:table-cell>
          <table:table-cell table:style-name="Table30.A1" office:value-type="string">
            <text:p text:style-name="P59">103</text:p>
          </table:table-cell>
          <table:table-cell table:style-name="Table30.A1" office:value-type="string">
            <text:p text:style-name="P59">rxfo</text:p>
          </table:table-cell>
        </table:table-row>
        <table:table-row table:style-name="Table30.1">
          <table:table-cell table:style-name="Table30.A1" office:value-type="string">
            <text:p text:style-name="P59">104</text:p>
          </table:table-cell>
          <table:table-cell table:style-name="Table30.A1" office:value-type="string">
            <text:p text:style-name="P59">rxfb</text:p>
          </table:table-cell>
          <table:table-cell table:style-name="Table30.A1" office:value-type="string">
            <text:p text:style-name="P59">105</text:p>
          </table:table-cell>
          <table:table-cell table:style-name="Table30.A1" office:value-type="string">
            <text:p text:style-name="P59">rxbh</text:p>
          </table:table-cell>
        </table:table-row>
        <table:table-row table:style-name="Table30.1">
          <table:table-cell table:style-name="Table30.A1" office:value-type="string">
            <text:p text:style-name="P59">106</text:p>
          </table:table-cell>
          <table:table-cell table:style-name="Table30.A1" office:value-type="string">
            <text:p text:style-name="P59">rxbo</text:p>
          </table:table-cell>
          <table:table-cell table:style-name="Table30.A1" office:value-type="string">
            <text:p text:style-name="P59">107</text:p>
          </table:table-cell>
          <table:table-cell table:style-name="Table30.A1" office:value-type="string">
            <text:p text:style-name="P59">rxbb</text:p>
          </table:table-cell>
        </table:table-row>
        <table:table-row table:style-name="Table30.1">
          <table:table-cell table:style-name="Table30.A1" office:value-type="string">
            <text:p text:style-name="P59">108</text:p>
          </table:table-cell>
          <table:table-cell table:style-name="Table30.A1" office:value-type="string">
            <text:p text:style-name="P59">rbxh</text:p>
          </table:table-cell>
          <table:table-cell table:style-name="Table30.A1" office:value-type="string">
            <text:p text:style-name="P59">109</text:p>
          </table:table-cell>
          <table:table-cell table:style-name="Table30.A1" office:value-type="string">
            <text:p text:style-name="P59">rbxo</text:p>
          </table:table-cell>
        </table:table-row>
        <table:table-row table:style-name="Table30.1">
          <table:table-cell table:style-name="Table30.A1" office:value-type="string">
            <text:p text:style-name="P59">110</text:p>
          </table:table-cell>
          <table:table-cell table:style-name="Table30.A1" office:value-type="string">
            <text:p text:style-name="P59">rbxb</text:p>
          </table:table-cell>
          <table:table-cell table:style-name="Table30.A1" office:value-type="string">
            <text:p text:style-name="P59">111</text:p>
          </table:table-cell>
          <table:table-cell table:style-name="Table30.A1" office:value-type="string">
            <text:p text:style-name="P59">sete</text:p>
          </table:table-cell>
        </table:table-row>
      </table:table>
      <text:p text:style-name="Standard"/>
      <text:p text:style-name="Standard">Note: “---” indicates “unused”.</text:p>
      <text:p text:style-name="P90"/>
      <text:h text:style-name="P205" text:outline-level="1"><text:bookmark-start text:name="__RefHeading___Toc15952_2478585429"/><text:bookmark-start text:name="_Toc528309212"/><text:bookmark-start text:name="_Ref320433003"/><text:bookmark-start text:name="_Ref320433002"/><text:bookmark-start text:name="_Toc320481280"/>Testing Pascal-P6<text:bookmark-end text:name="__RefHeading___Toc15952_2478585429"/><text:bookmark-end text:name="_Toc528309212"/><text:bookmark-end text:name="_Ref320433003"/><text:bookmark-end text:name="_Ref320433002"/><text:bookmark-end text:name="_Toc320481280"/></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_RefHeading___Toc15954_2478585429_Copy_"/><text:bookmark-start text:name="_Toc528309213_Copy_1"/><text:bookmark-start text:name="_Toc320481281_Copy_1"/>Running a Full Regression Test<text:bookmark-end text:name="__RefHeading___Toc15954_2478585429_Copy_"/><text:bookmark-end text:name="_Toc528309213_Copy_1"/><text:bookmark-end text:name="_Toc320481281_Copy_1"/></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p text:style-name="P163">Note: the –full option runs the pint interpreter as a self compiler. This is no longer as relevant, as it takes considerable time, and with pgen, the compiler is always self compiling without the drawbacks of self-interpretation.</text:p>
      <text:h text:style-name="Heading_20_2" text:outline-level="2"><text:bookmark-start text:name="__RefHeading___Toc15954_2478585429"/><text:bookmark-start text:name="_Toc528309213"/><text:bookmark-start text:name="_Toc320481281"/>Running Individual tests<text:bookmark-end text:name="__RefHeading___Toc15954_2478585429"/><text:bookmark-end text:name="_Toc528309213"/><text:bookmark-end text:name="_Toc320481281"/></text:h>
      <text:h text:style-name="Heading_20_3" text:outline-level="3"><text:bookmark-start text:name="__RefHeading___Toc15956_2478585429"/><text:bookmark-start text:name="_Toc320481282"/><text:bookmark-start text:name="_Toc528309214"/>testprog<text:bookmark-end text:name="__RefHeading___Toc15956_2478585429"/><text:bookmark-end text:name="_Toc320481282"/><text:bookmark-end text:name="_Toc528309214"/></text:h>
      <text:p text:style-name="Standard">The main test script for testing <text:s/>is:</text:p>
      <text:p text:style-name="Standard">testprog &lt;Pascal source file&gt;</text:p>
      <text:p text:style-name="Standard"><text:soft-page-break/>testprog.bat &lt;Pascal source file&gt;</text:p>
      <text:p text:style-name="Standard">testprog is a “one stop” test resource for most programs. It expects the following files to exist under the given primary filename:</text:p>
      <text:p text:style-name="Standard">program.pas<text:tab/>The Pascal source file.</text:p>
      <text:p text:style-name="Standard">program.inp<text:tab/>The input file for the running program.</text:p>
      <text:p text:style-name="Standard">program.cmp<text:tab/>The reference file for the expected output.</text:p>
      <text:p text:style-name="P144">program.dat<text:tab/>The data file for the program (fed to prd in pint)</text:p>
      <text:p text:style-name="Standard">testprog compiles and runs the target program, and checks its output against the reference file. Several files are produced during the process:</text:p>
      <text:p text:style-name="P52">program.p6<text:tab/>Contains the intermediate code for the program as compiled by pcom.</text:p>
      <text:p text:style-name="P52"><text:span text:style-name="T84">p</text:span>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52"><text:span text:style-name="T84">p</text:span>rogram.lst<text:tab/>Contains the output from <text:s/>the program when run. This is all output to the standard “ output” file.</text:p>
      <text:p text:style-name="P52"><text:span text:style-name="T84">p</text:span>rogram.out<text:tab/>This is all of the output to the “prr” special file. This is only used by Pascal-P6 for special purposes, such as to output the intermediate code, and most programs will be empty.</text:p>
      <text:p text:style-name="P52"><text:span text:style-name="T84">p</text:span>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text:span text:style-name="T85">A program that does not use a data file does not need the program.dat file. </text:span>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text:soft-page-break/>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_RefHeading___Toc15958_2478585429"/><text:bookmark-start text:name="_Toc528309215"/><text:bookmark-start text:name="_Toc320481283"/>Other tests<text:bookmark-end text:name="__RefHeading___Toc15958_2478585429"/><text:bookmark-end text:name="_Toc528309215"/><text:bookmark-end text:name="_Toc320481283"/></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_RefHeading___Toc15962_2478585429"/><text:bookmark-start text:name="_Toc320481285"/><text:bookmark-start text:name="_Toc528309217"/>Test types<text:bookmark-end text:name="__RefHeading___Toc15962_2478585429"/><text:bookmark-end text:name="_Toc320481285"/><text:bookmark-end text:name="_Toc528309217"/></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_RefHeading___Toc15964_2478585429"/><text:bookmark-start text:name="_Toc320481286"/><text:bookmark-start text:name="_Toc528309218"/>The Pascal acceptance test<text:bookmark-end text:name="__RefHeading___Toc15964_2478585429"/><text:bookmark-end text:name="_Toc320481286"/><text:bookmark-end text:name="_Toc528309218"/></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_RefHeading___Toc15966_2478585429"/><text:bookmark-start text:name="_Toc320481287"/><text:bookmark-start text:name="_Toc528309219"/>The Pascal rejection test<text:bookmark-end text:name="__RefHeading___Toc15966_2478585429"/><text:bookmark-end text:name="_Toc320481287"/><text:bookmark-end text:name="_Toc52830921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text:style-name="WWNum3">
        <text:list-item>
          <text:p text:style-name="P224">The indicated error may or may not be appropriate for the error that was caused (for example, indicating a missing ':' when the problem was a missing ';').</text:p>
        </text:list-item>
        <text:list-item>
          <text:p text:style-name="P224">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Here are descriptions of each of the tests.</text:p>
      <text:p text:style-name="Standard"><text:soft-page-break/></text:p>
      <text:p text:style-name="P53">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34">The syntax visitation is according to the Pascal Users's manual and Report" 4th edition, Appendix D, Syntax diagrams. The tests run in reverse, starting with "program", and working backwards. Thus, the syntax checks are performed top to bottom.</text:p>
      <text:p text:style-name="P53">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_RefHeading___Toc15968_2478585429"/><text:bookmark-start text:name="_Toc528309220"/><text:bookmark-start text:name="_Toc320481288"/>List of tests<text:bookmark-end text:name="__RefHeading___Toc15968_2478585429"/><text:bookmark-end text:name="_Toc528309220"/><text:bookmark-end text:name="_Toc320481288"/></text:h>
      <text:h text:style-name="Heading_20_4" text:outline-level="4"><text:bookmark-start text:name="__RefHeading___Toc15970_2478585429"/><text:bookmark-start text:name="_Toc528309221"/>Class 1: Syntatic errors<text:bookmark-end text:name="__RefHeading___Toc15970_2478585429"/><text:bookmark-end text:name="_Toc528309221"/></text:h>
      <text:p text:style-name="P175">Program</text:p>
      <text:p text:style-name="P55">iso7185prt0001<text:tab/>Missing semicolon after program statement</text:p>
      <text:p text:style-name="P55">iso7185prt0002<text:tab/>missing "program" word-symbol</text:p>
      <text:p text:style-name="P55">iso7185prt0003<text:tab/>missing program name word-symbol</text:p>
      <text:p text:style-name="P55">iso7185prt0004<text:tab/>Moved</text:p>
      <text:p text:style-name="P55">iso7185prt0005<text:tab/>Moved</text:p>
      <text:p text:style-name="P55">iso7185prt0006<text:tab/>missing period</text:p>
      <text:p text:style-name="P55">iso7185prt0007<text:tab/>Extra semicolon</text:p>
      <text:p text:style-name="P55">iso7185prt0008<text:tab/>Missing header parameters</text:p>
      <text:p text:style-name="P55">iso7185prt0009<text:tab/>Opening paren for program header only</text:p>
      <text:p text:style-name="P55">iso7185prt0010<text:tab/>Closing paren for program header only</text:p>
      <text:p text:style-name="P55"><text:soft-page-break/>iso7185prt0011<text:tab/>Improperly terminated header list</text:p>
      <text:p text:style-name="P54">iso7185prt0012<text:tab/>Consecutive semicolons</text:p>
      <text:p text:style-name="P175">Block</text:p>
      <text:p text:style-name="P55">iso7185prt0013<text:tab/>Missing number for label</text:p>
      <text:p text:style-name="P55">iso7185prt0014<text:tab/>Missing semicolon after label</text:p>
      <text:p text:style-name="P55">iso7185prt0015<text:tab/>Non-numeric label</text:p>
      <text:p text:style-name="P55">iso7185prt0016<text:tab/>Unterminated label list</text:p>
      <text:p text:style-name="P55">iso7185prt0017<text:tab/>Unstarted label list</text:p>
      <text:p text:style-name="P55">iso7185prt0018<text:tab/>Missing constant</text:p>
      <text:p text:style-name="P55">iso7185prt0019<text:tab/>Missing constant right side</text:p>
      <text:p text:style-name="P55">iso7185prt0020<text:tab/>Missing "=" in const</text:p>
      <text:p text:style-name="P55">iso7185prt0021<text:tab/>Incomplete second in const</text:p>
      <text:p text:style-name="P55">iso7185prt0022<text:tab/>Missing ident in const</text:p>
      <text:p text:style-name="P55">iso7185prt0023<text:tab/>Missing semicolon in const</text:p>
      <text:p text:style-name="P55">iso7185prt0024<text:tab/>Reverse order between label and const</text:p>
      <text:p text:style-name="P55">iso7185prt0025<text:tab/>Missing type</text:p>
      <text:p text:style-name="P55">iso7185prt0026<text:tab/>Missing type right side</text:p>
      <text:p text:style-name="P55">iso7185prt0027<text:tab/>Missing "=" in type</text:p>
      <text:p text:style-name="P55">iso7185prt0028<text:tab/>Missing ident in type</text:p>
      <text:p text:style-name="P55">iso7185prt0029<text:tab/>Incomplete second in type</text:p>
      <text:p text:style-name="P55">iso7185prt0030<text:tab/>Missing semicolon in type</text:p>
      <text:p text:style-name="P55">iso7185prt0031<text:tab/>Reverse order between const and type</text:p>
      <text:p text:style-name="P55">iso7185prt0032<text:tab/>Missing var</text:p>
      <text:p text:style-name="P55">iso7185prt0033<text:tab/>Missing var right side</text:p>
      <text:p text:style-name="P55">iso7185prt0034<text:tab/>Missing var ident list prime</text:p>
      <text:p text:style-name="P55">iso7185prt0035<text:tab/>Missing var ident list follow</text:p>
      <text:p text:style-name="P55">iso7185prt0036<text:tab/>Missing ":" in var</text:p>
      <text:p text:style-name="P55">iso7185prt0037<text:tab/>Missing ident list in var</text:p>
      <text:p text:style-name="P55">iso7185prt0038<text:tab/>Incomplete second in var</text:p>
      <text:p text:style-name="P55">iso7185prt0039<text:tab/>Missing semicolon in var</text:p>
      <text:p text:style-name="P55">iso7185prt0040<text:tab/>Reverse order between type and var</text:p>
      <text:p text:style-name="P55">iso7185prt0041<text:tab/>Missing "procedure" or "function"</text:p>
      <text:p text:style-name="P55">iso7185prt0042<text:tab/>Missing ident</text:p>
      <text:p text:style-name="P55">iso7185prt0043<text:tab/>Missing semicolon</text:p>
      <text:p text:style-name="P55">iso7185prt0044<text:tab/>Consecutive semicolons start</text:p>
      <text:p text:style-name="P55">iso7185prt0045<text:tab/>Missing block</text:p>
      <text:p text:style-name="P55">iso7185prt0046<text:tab/>Missing final semicolon</text:p>
      <text:p text:style-name="P55">iso7185prt0047<text:tab/>Misspelled directive</text:p>
      <text:p text:style-name="P55">iso7185prt0048<text:tab/>Bad directive</text:p>
      <text:p text:style-name="P55">iso7185prt0049<text:tab/>Misspelled procedure</text:p>
      <text:p text:style-name="P55">iso7185prt0050<text:tab/>Misspelled function</text:p>
      <text:p text:style-name="P55">iso7185prt0051<text:tab/>Bad procedure/function</text:p>
      <text:p text:style-name="P55">iso7185prt0052<text:tab/>Missing ":" on return type for function</text:p>
      <text:p text:style-name="P55">iso7185prt0053<text:tab/>Missing type id on return type for function</text:p>
      <text:p text:style-name="P55">iso7185prt0054<text:tab/>Reverse order between var and procedure</text:p>
      <text:p text:style-name="P55">iso7185prt0055<text:tab/>Reverse order between var and function</text:p>
      <text:p text:style-name="P55">iso7185prt0056<text:tab/>missing begin word-symbol</text:p>
      <text:p text:style-name="P54">iso7185prt0057<text:tab/>missing end word-symbol</text:p>
      <text:p text:style-name="P175"><text:soft-page-break/>Statement</text:p>
      <text:p text:style-name="P55">iso7185prt0100<text:tab/>Missing label ident</text:p>
      <text:p text:style-name="P55">iso7185prt0101<text:tab/>Missing label ":"</text:p>
      <text:p text:style-name="P55">iso7185prt0102<text:tab/>Missing assignment left side</text:p>
      <text:p text:style-name="P55">iso7185prt0103<text:tab/>Missing assignment ":="</text:p>
      <text:p text:style-name="P55">iso7185prt0104<text:tab/>Missing procedure identifier</text:p>
      <text:p text:style-name="P55">iso7185prt0105<text:tab/>Missing "begin" on statement block</text:p>
      <text:p text:style-name="P55">iso7185prt0106<text:tab/>Misspelled "begin" on statement block</text:p>
      <text:p text:style-name="P55">iso7185prt0107<text:tab/>Missing "end" on statement block</text:p>
      <text:p text:style-name="P55">iso7185prt0108<text:tab/>Mispelled "end" on statement block</text:p>
      <text:p text:style-name="P55">iso7185prt0109<text:tab/>Missing "if" on conditional</text:p>
      <text:p text:style-name="P55">iso7185prt0110<text:tab/>Misspelled "if" on conditional</text:p>
      <text:p text:style-name="P55">iso7185prt0111<text:tab/>Missing expression on conditional</text:p>
      <text:p text:style-name="P55">iso7185prt0112<text:tab/>Missing "then" on conditional</text:p>
      <text:p text:style-name="P55">iso7185prt0113<text:tab/>Misspelled "then" on conditional</text:p>
      <text:p text:style-name="P55">iso7185prt0114<text:tab/>Misspelled "else" on conditional</text:p>
      <text:p text:style-name="P55">iso7185prt0115<text:tab/>Missing "case" on case statement</text:p>
      <text:p text:style-name="P55">iso7185prt0116<text:tab/>Misspelled "case" on case statement</text:p>
      <text:p text:style-name="P55">iso7185prt0117<text:tab/>Missing expression on case statement</text:p>
      <text:p text:style-name="P55">iso7185prt0118<text:tab/>Missing "of" on case statement</text:p>
      <text:p text:style-name="P55">iso7185prt0119<text:tab/>Misspelled "of" on case statement</text:p>
      <text:p text:style-name="P55">iso7185prt0120<text:tab/>Missing constant on case stament list</text:p>
      <text:p text:style-name="P55">iso7185prt0121<text:tab/>Missing 2nd constant on case statement list</text:p>
      <text:p text:style-name="P55">iso7185prt0122<text:tab/>Missing ":" before statement on case statement</text:p>
      <text:p text:style-name="P55">iso7185prt0123<text:tab/>Missing ";" between statements on case statement </text:p>
      <text:p text:style-name="P55">iso7185prt0124<text:tab/>Missing "end" on case statement</text:p>
      <text:p text:style-name="P55">iso7185prt0125<text:tab/>Misspelled "end" on case statement</text:p>
      <text:p text:style-name="P55">iso7185prt0126<text:tab/>Missing "while" on while statement</text:p>
      <text:p text:style-name="P55">iso7185prt0127<text:tab/>Mispelled "while" on while statement</text:p>
      <text:p text:style-name="P55">iso7185prt0128<text:tab/>Missing expression on while statement</text:p>
      <text:p text:style-name="P55">iso7185prt0129<text:tab/>Missing "do" on while statement</text:p>
      <text:p text:style-name="P55">iso7185prt0130<text:tab/>Missing "repeat" on repeat statement</text:p>
      <text:p text:style-name="P55">iso7185prt0131<text:tab/>Misspelled "repeat" on repeat statement</text:p>
      <text:p text:style-name="P55">iso7185prt0132<text:tab/>Missing "until" on repeat statement</text:p>
      <text:p text:style-name="P55">iso7185prt0133<text:tab/>Misspelled "until" on repeat statement</text:p>
      <text:p text:style-name="P55">iso7185prt0134<text:tab/>Missing expression on repeat statement</text:p>
      <text:p text:style-name="P55">iso7185prt0135<text:tab/>Missing "for" on for statement</text:p>
      <text:p text:style-name="P55">iso7185prt0136<text:tab/>Misspelled "for" on for statement</text:p>
      <text:p text:style-name="P55">iso7185prt0137<text:tab/>Missing variable ident on for statement</text:p>
      <text:p text:style-name="P55">iso7185prt0138<text:tab/>Misspelled variable ident on for statement</text:p>
      <text:p text:style-name="P55">iso7185prt0139<text:tab/>Missing ":=" on for statement</text:p>
      <text:p text:style-name="P55">iso7185prt0140<text:tab/>Missing start expression on for statement</text:p>
      <text:p text:style-name="P55">iso7185prt0141<text:tab/>Missing "to"/"downto" on for statement</text:p>
      <text:p text:style-name="P55">iso7185prt0142<text:tab/>Misspelled "to" on for statement</text:p>
      <text:p text:style-name="P55">iso7185prt0143<text:tab/>Misspelled "downto" on for statement</text:p>
      <text:p text:style-name="P55">iso7185prt0144<text:tab/>Missing end expression on for statement</text:p>
      <text:p text:style-name="P55">iso7185prt0145<text:tab/>Missing "do" on for statement</text:p>
      <text:p text:style-name="P55">iso7185prt0146<text:tab/>Misspelled "do" on for statement</text:p>
      <text:p text:style-name="P55">iso7185prt0147<text:tab/>Missing "with" on with statement</text:p>
      <text:p text:style-name="P55">iso7185prt0148<text:tab/>Misspelled "with" on with statement</text:p>
      <text:p text:style-name="P55"><text:soft-page-break/>iso7185prt0149<text:tab/>Missing first variable in with statement list</text:p>
      <text:p text:style-name="P55">iso7185prt0150<text:tab/>Missing second variable in with statement list</text:p>
      <text:p text:style-name="P55">iso7185prt0151<text:tab/>Missing "goto" in goto statement</text:p>
      <text:p text:style-name="P55">iso7185prt0152<text:tab/>Misspelled "goto" in goto statement</text:p>
      <text:p text:style-name="P55">iso7185prt0153<text:tab/>Missing unsigned integer in goto statement</text:p>
      <text:p text:style-name="P55">iso7185prt0154<text:tab/>Missing 1st constant on case statement list</text:p>
      <text:p text:style-name="P55">iso7185prt0155<text:tab/>Missing only variable in with statement list</text:p>
      <text:p text:style-name="P55">iso7185prt0156<text:tab/>Missing ',' between case constants</text:p>
      <text:p text:style-name="P54">iso7185prt0157<text:tab/>Missing ',' between variables in with statement</text:p>
      <text:p text:style-name="P175">Field list</text:p>
      <text:p text:style-name="P55">iso7185prt0200<text:tab/>Missing field ident</text:p>
      <text:p text:style-name="P55">iso7185prt0201<text:tab/>Missing first field ident</text:p>
      <text:p text:style-name="P55">iso7185prt0202<text:tab/>Missing second field ident</text:p>
      <text:p text:style-name="P55">iso7185prt0203<text:tab/>Missing ':' between ident and type</text:p>
      <text:p text:style-name="P55">iso7185prt0204<text:tab/>Missing type</text:p>
      <text:p text:style-name="P55">iso7185prt0205<text:tab/>Missing ';' between successive fields</text:p>
      <text:p text:style-name="P55">iso7185prt0206<text:tab/>Misspelled 'case' to variant</text:p>
      <text:p text:style-name="P55">iso7185prt0207<text:tab/>Missing identifier for variant</text:p>
      <text:p text:style-name="P55">iso7185prt0208<text:tab/>Missing type identifier with field identifier</text:p>
      <text:p text:style-name="P55">iso7185prt0209<text:tab/>Missing type identifier without field identifier</text:p>
      <text:p text:style-name="P55">iso7185prt0210<text:tab/>Missing 'of' on variant</text:p>
      <text:p text:style-name="P55">iso7185prt0211<text:tab/>Misspelled 'of' on variant</text:p>
      <text:p text:style-name="P55">iso7185prt0212<text:tab/>Missing case constant on variant</text:p>
      <text:p text:style-name="P55">iso7185prt0213<text:tab/>Missing first constant on variant</text:p>
      <text:p text:style-name="P55">iso7185prt0214<text:tab/>Missing second constant on variant</text:p>
      <text:p text:style-name="P55">iso7185prt0215<text:tab/>Missing ':' on variant case</text:p>
      <text:p text:style-name="P55">iso7185prt0216<text:tab/>Missing '(' on field list for variant</text:p>
      <text:p text:style-name="P55">iso7185prt0217<text:tab/>Missing ')' on field list for variant</text:p>
      <text:p text:style-name="P55">iso7185prt0218<text:tab/>Missing ';' between successive variant cases</text:p>
      <text:p text:style-name="P55">iso7185prt0219<text:tab/>Attempt to define multiple variant sections</text:p>
      <text:p text:style-name="P55">iso7185prt0220<text:tab/>Standard field specification in variant</text:p>
      <text:p text:style-name="P55">iso7185prt0221<text:tab/>Missing ',' between first and second field idents</text:p>
      <text:p text:style-name="P54">iso7185prt0222<text:tab/>Missing ',' between first and second field idents in variant</text:p>
      <text:p text:style-name="P175">Procedure or Function Heading</text:p>
      <text:p text:style-name="P55">iso7185prt0300<text:tab/>Missing 'procedure'</text:p>
      <text:p text:style-name="P55">iso7185prt0301<text:tab/>Misspelled 'procedure'</text:p>
      <text:p text:style-name="P55">iso7185prt0302<text:tab/>Missing procedure identifier</text:p>
      <text:p text:style-name="P55">iso7185prt0303<text:tab/>Missing 'function'</text:p>
      <text:p text:style-name="P55">iso7185prt0304<text:tab/>Misspelled 'function'</text:p>
      <text:p text:style-name="P55">iso7185prt0305<text:tab/>Missing function identifier</text:p>
      <text:p text:style-name="P54">iso7185prt0306<text:tab/>Missing type ident after ':' for function</text:p>
      <text:p text:style-name="P175">Ordinal Type</text:p>
      <text:p text:style-name="P55">iso7185prt0400<text:tab/>Missing '(' on enumeration</text:p>
      <text:p text:style-name="P55">iso7185prt0401<text:tab/>Missing identifier on enumeration</text:p>
      <text:p text:style-name="P55">iso7185prt0402<text:tab/>Missing 1st identifier on enumeration</text:p>
      <text:p text:style-name="P55">iso7185prt0403<text:tab/>Missing 2nd identifier on enumeration</text:p>
      <text:p text:style-name="P55"><text:soft-page-break/>iso7185prt0404<text:tab/>Missing ')' on enumeration</text:p>
      <text:p text:style-name="P55">iso7185prt0405<text:tab/>Missing 1st constant on subrange</text:p>
      <text:p text:style-name="P55">iso7185prt0406<text:tab/>Missing '..' on subrange</text:p>
      <text:p text:style-name="P55">iso7185prt0407<text:tab/>Missing 2nd constant on subrange</text:p>
      <text:p text:style-name="P54">iso7185prt0408<text:tab/>Missing ',' between identifiers on enumeration</text:p>
      <text:p text:style-name="P175">Type</text:p>
      <text:p text:style-name="P55">iso7185prt0500<text:tab/>Missing type identifer after '^'</text:p>
      <text:p text:style-name="P55">iso7185prt0501<text:tab/>Misspelled 'packed'</text:p>
      <text:p text:style-name="P55">iso7185prt0502<text:tab/>Missing 'array'</text:p>
      <text:p text:style-name="P55">iso7185prt0503<text:tab/>Missing '[' on array</text:p>
      <text:p text:style-name="P55">iso7185prt0504<text:tab/>Missing index in array</text:p>
      <text:p text:style-name="P55">iso7185prt0505<text:tab/>Missing first index in array</text:p>
      <text:p text:style-name="P55">iso7185prt0506<text:tab/>Missing second index in array</text:p>
      <text:p text:style-name="P55">iso7185prt0507<text:tab/>Missing ']' on array</text:p>
      <text:p text:style-name="P55">iso7185prt0508<text:tab/>Missing index specification in array</text:p>
      <text:p text:style-name="P55">iso7185prt0509<text:tab/>Missing 'of' on array</text:p>
      <text:p text:style-name="P55">iso7185prt0510<text:tab/>Misspelled 'of' on array</text:p>
      <text:p text:style-name="P55">iso7185prt0511<text:tab/>Missing type on array</text:p>
      <text:p text:style-name="P55">iso7185prt0512<text:tab/>Missing 'file' or 'set' on file or set type</text:p>
      <text:p text:style-name="P55">iso7185prt0513<text:tab/>Misspelled 'file' on file type</text:p>
      <text:p text:style-name="P55">iso7185prt0514<text:tab/>Missing 'of' on file type</text:p>
      <text:p text:style-name="P55">iso7185prt0515<text:tab/>Missing type on file type</text:p>
      <text:p text:style-name="P55">iso7185prt0516<text:tab/>Misspelled 'set' on set type</text:p>
      <text:p text:style-name="P55">iso7185prt0517<text:tab/>Missing 'of' on set type</text:p>
      <text:p text:style-name="P55">iso7185prt0518<text:tab/>Missing type on set type</text:p>
      <text:p text:style-name="P55">iso7185prt0519<text:tab/>Missing 'record' on field list</text:p>
      <text:p text:style-name="P55">iso7185prt0520<text:tab/>Misspelled 'record' on field list</text:p>
      <text:p text:style-name="P55">iso7185prt0521<text:tab/>Missing 'end' on field list</text:p>
      <text:p text:style-name="P54">iso7185prt0522<text:tab/>Misspelled 'end' on field list</text:p>
      <text:p text:style-name="P175">Formal Parameter List</text:p>
      <text:p text:style-name="P55">iso7185prt0600<text:tab/>Missing parameter identifier</text:p>
      <text:p text:style-name="P55">iso7185prt0601<text:tab/>Missing first parameter identifier</text:p>
      <text:p text:style-name="P55">iso7185prt0602<text:tab/>Missing second parameter identifier</text:p>
      <text:p text:style-name="P55">iso7185prt0603<text:tab/>Missing ',' between parameter identifiers</text:p>
      <text:p text:style-name="P55">iso7185prt0604<text:tab/>Missing ':' on parameter specification</text:p>
      <text:p text:style-name="P55">iso7185prt0605<text:tab/>Missing type identifier on parameter specification</text:p>
      <text:p text:style-name="P55">iso7185prt0606<text:tab/>Missing parameter specification after 'var'</text:p>
      <text:p text:style-name="P55">iso7185prt0607<text:tab/>Misspelled 'var'</text:p>
      <text:p text:style-name="P54">iso7185prt0608<text:tab/>Missing ';' between parameter specifications</text:p>
      <text:p text:style-name="P175">Expression</text:p>
      <text:p text:style-name="P55">iso7185prt0700<text:tab/>Missing operator</text:p>
      <text:p text:style-name="P55">iso7185prt0701<text:tab/>Missing first operand to '='</text:p>
      <text:p text:style-name="P55">iso7185prt0702<text:tab/>Missing second operand to '='</text:p>
      <text:p text:style-name="P55">iso7185prt0703<text:tab/>Missing first operand to '&gt;' </text:p>
      <text:p text:style-name="P55">iso7185prt0704<text:tab/>Missing second operand to '&gt;'</text:p>
      <text:p text:style-name="P55">iso7185prt0705<text:tab/>Missing first operand to '&lt;' </text:p>
      <text:p text:style-name="P55"><text:soft-page-break/>iso7185prt0706<text:tab/>Missing second operand to '&lt;'</text:p>
      <text:p text:style-name="P55">iso7185prt0707<text:tab/>Missing first operand to '&lt;&gt;' </text:p>
      <text:p text:style-name="P55">iso7185prt0708<text:tab/>Missing second operand to '&lt;&gt;'</text:p>
      <text:p text:style-name="P55">iso7185prt0709<text:tab/>Missing first operand to '&lt;=' </text:p>
      <text:p text:style-name="P55">iso7185prt0710<text:tab/>Missing second operand to '&lt;='</text:p>
      <text:p text:style-name="P55">iso7185prt0711<text:tab/>Missing first operand to '&gt;=' </text:p>
      <text:p text:style-name="P55">iso7185prt0712<text:tab/>Missing second operand to '&gt;='</text:p>
      <text:p text:style-name="P55">iso7185prt0713<text:tab/>Missing second operand to 'in'</text:p>
      <text:p text:style-name="P55">iso7185prt0714<text:tab/>Alternate '&gt;&lt;'</text:p>
      <text:p text:style-name="P55">iso7185prt0715<text:tab/>Alternate '=&lt;'</text:p>
      <text:p text:style-name="P55">iso7185prt0716<text:tab/>Alternate '=&gt;'</text:p>
      <text:p text:style-name="P54">iso7185prt0717<text:tab/>Missing first operand to 'in'</text:p>
      <text:p text:style-name="P175">Actual Parameter List</text:p>
      <text:p text:style-name="P55">iso7185prt0800<text:tab/>Empty list (parens only)</text:p>
      <text:p text:style-name="P55">iso7185prt0801<text:tab/>Missing leading '(' in list</text:p>
      <text:p text:style-name="P55">iso7185prt0802<text:tab/>Missing ',' in parameter list</text:p>
      <text:p text:style-name="P55">iso7185prt0803<text:tab/>Missing first parameter in parameter list</text:p>
      <text:p text:style-name="P55">iso7185prt0804<text:tab/>Missing second parameter in parameter list</text:p>
      <text:p text:style-name="P54">iso7185prt0805<text:tab/>Missing ')' in list</text:p>
      <text:p text:style-name="P175">Write Parameter List</text:p>
      <text:p text:style-name="P55">iso7185prt0900<text:tab/>Empty list (parens only)</text:p>
      <text:p text:style-name="P55">iso7185prt0901<text:tab/>Missing leading '(' in list</text:p>
      <text:p text:style-name="P55">iso7185prt0902<text:tab/>Missing ',' in parameter list <text:s text:c="14"/></text:p>
      <text:p text:style-name="P55">iso7185prt0903<text:tab/>Missing first parameter in parameter list <text:s text:c="2"/></text:p>
      <text:p text:style-name="P55">iso7185prt0904<text:tab/>Missing second parameter in parameter list <text:s/></text:p>
      <text:p text:style-name="P55">iso7185prt0905<text:tab/>Field with missing value</text:p>
      <text:p text:style-name="P55">iso7185prt0906<text:tab/>Fraction with missing value</text:p>
      <text:p text:style-name="P55">iso7185prt0907<text:tab/>Field and fraction with missing field</text:p>
      <text:p text:style-name="P54">iso7185prt0908<text:tab/>Missing ')' in list <text:s text:c="24"/></text:p>
      <text:p text:style-name="P175">Factor</text:p>
      <text:p text:style-name="P55">iso7185prt1000<text:tab/>Missing leading '(' for subexpression</text:p>
      <text:p text:style-name="P55">iso7185prt1001<text:tab/>Missing subexpression in '()'</text:p>
      <text:p text:style-name="P55">iso7185prt1002<text:tab/>Misspelled 'not'</text:p>
      <text:p text:style-name="P55">iso7185prt1003<text:tab/>'not' missing expression</text:p>
      <text:p text:style-name="P55">iso7185prt1004<text:tab/>Missing '[' on set constant</text:p>
      <text:p text:style-name="P55">iso7185prt1006<text:tab/>Missing first expression in range</text:p>
      <text:p text:style-name="P55">iso7185prt1007<text:tab/>Missing second expression in range</text:p>
      <text:p text:style-name="P55">iso7185prt1008<text:tab/>Missing '..' or ',' in set constant list</text:p>
      <text:p text:style-name="P55">iso7185prt1009<text:tab/>Missing first expression in ',' delimited set constant list</text:p>
      <text:p text:style-name="P54">iso7185prt1010<text:tab/>Missing second expression in ',' delimited set constant list</text:p>
      <text:p text:style-name="P175">Term</text:p>
      <text:p text:style-name="P55">iso7185prt1100<text:tab/>Missing first operand to '*' <text:s text:c="2"/></text:p>
      <text:p text:style-name="P55">iso7185prt1101<text:tab/>Missing second operand to '*' <text:s/></text:p>
      <text:p text:style-name="P55">iso7185prt1102<text:tab/>Missing first operand to '/' <text:s text:c="2"/></text:p>
      <text:p text:style-name="P55"><text:soft-page-break/>iso7185prt1103<text:tab/>Missing second operand to '/' <text:s/></text:p>
      <text:p text:style-name="P55">iso7185prt1104<text:tab/>Missing first operand to 'div' <text:s text:c="2"/></text:p>
      <text:p text:style-name="P55">iso7185prt1105<text:tab/>Missing second operand to 'div' <text:s/></text:p>
      <text:p text:style-name="P55">iso7185prt1106<text:tab/>Missing first operand to 'mod' <text:s/></text:p>
      <text:p text:style-name="P55">iso7185prt1107<text:tab/>Missing second operand to 'mod' </text:p>
      <text:p text:style-name="P55">iso7185prt1108<text:tab/>Missing first operand to 'and' <text:s/></text:p>
      <text:p text:style-name="P54">iso7185prt1109<text:tab/>Missing second operand to 'and' </text:p>
      <text:p text:style-name="P175">Simple Expression</text:p>
      <text:p text:style-name="P55">iso7185prt1200<text:tab/>'+' with missing term</text:p>
      <text:p text:style-name="P55">iso7185prt1201<text:tab/>'-' with missing term</text:p>
      <text:p text:style-name="P55">iso7185prt1203<text:tab/>Missing second operand to '+' <text:s/></text:p>
      <text:p text:style-name="P55">iso7185prt1205<text:tab/>Missing second operand to '-' <text:s/></text:p>
      <text:p text:style-name="P55">iso7185prt1206<text:tab/>Missing first operand to 'or' </text:p>
      <text:p text:style-name="P54">iso7185prt1207<text:tab/>Missing second operand to 'or'</text:p>
      <text:p text:style-name="P175">Unsigned Constant</text:p>
      <text:p text:style-name="P54">iso7185prt1300<text:tab/>Misspelled 'nil'</text:p>
      <text:p text:style-name="P175">Variable</text:p>
      <text:p text:style-name="P55">iso7185prt1400<text:tab/>Missing variable or field identifier</text:p>
      <text:p text:style-name="P55">iso7185prt1401<text:tab/>Missing '[' in index list</text:p>
      <text:p text:style-name="P55">iso7185prt1402<text:tab/>Missing expression in index list</text:p>
      <text:p text:style-name="P55">iso7185prt1403<text:tab/>Missing first expression in index list</text:p>
      <text:p text:style-name="P55">iso7185prt1404<text:tab/>Missing second expression in index list</text:p>
      <text:p text:style-name="P55">iso7185prt1405<text:tab/>Missing ',' in index list</text:p>
      <text:p text:style-name="P55">iso7185prt1406<text:tab/>Missing ']' in index list</text:p>
      <text:p text:style-name="P54">iso7185prt1407<text:tab/>Missing field identifier after '.'</text:p>
      <text:p text:style-name="P175">Unsigned number</text:p>
      <text:p text:style-name="P55">iso7185prt1500<text:tab/>Missing leading digit before '.'</text:p>
      <text:p text:style-name="P55">iso7185prt1501<text:tab/>Missing digit after '.'</text:p>
      <text:p text:style-name="P55">iso7185prt1502<text:tab/>Missing digit before and after '.'</text:p>
      <text:p text:style-name="P55">iso7185prt1503<text:tab/>Mispelled 'e' in exponent</text:p>
      <text:p text:style-name="P55">iso7185prt1504<text:tab/>Missing 'e' in exponent</text:p>
      <text:p text:style-name="P55">iso7185prt1505<text:tab/>Missing digits in exponent</text:p>
      <text:p text:style-name="P55">iso7185prt1506<text:tab/>Missing digits in exponent after '+'</text:p>
      <text:p text:style-name="P55">iso7185prt1507<text:tab/>Missing digits in exponent after '-'</text:p>
      <text:p text:style-name="P54">iso7185prt1508<text:tab/>Missing number before exponent</text:p>
      <text:p text:style-name="P175">Character String</text:p>
      <text:p text:style-name="P54">iso7185prt1600<text:tab/>String extends beyond eol (no end quote)</text:p>
      <text:h text:style-name="Heading_20_4" text:outline-level="4"><text:bookmark-start text:name="__RefHeading___Toc15972_2478585429"/><text:bookmark-start text:name="_Toc528309222"/>Class 2: Semantic errors<text:bookmark-end text:name="__RefHeading___Toc15972_2478585429"/><text:bookmark-end text:name="_Toc528309222"/></text:h>
      <text:p text:style-name="P54">iso7185prt1701<text:tab/>For an indexed-variable closest-containing a single index-expression, it is an error if the value of the index-expression is not assignment-compatible with the index-type of the array-type.</text:p>
      <text:p text:style-name="P54"><text:soft-page-break/>iso7185prt1702<text:tab/>It is an error unless a variant is active for the entirety of each reference and access to each component of the variant.</text:p>
      <text:p text:style-name="P54">iso7185prt1703<text:tab/>It is an error if the pointer-variable of an identified-variable denotes a nil-value.</text:p>
      <text:p text:style-name="P54">iso7185prt1704<text:tab/>It is an error if the pointer-variable of an identified-variable is undefined.</text:p>
      <text:p text:style-name="P54">iso7185prt1705<text:tab/>It is an error to remove from its pointer-type the identifying-value of an identified-variable when a reference to the identified-variable exists.</text:p>
      <text:p text:style-name="P54">iso7185prt1706<text:tab/>It is an error to alter the value of a file-variable f when a reference to the buffer-variable f^ exists.</text:p>
      <text:p text:style-name="P54">iso7185prt1707<text:tab/>It is an error if the value of each corresponding actual value parameter is not assignment compatible with the type possessed by the formal-parameter.</text:p>
      <text:p text:style-name="P54">iso7185prt1708<text:tab/>For a value parameter, it is an error if the actual-parameter is an expression of a set-type whose value is not assignment-compatible with the type possessed by the formal-parameter.</text:p>
      <text:p text:style-name="P54">iso7185prt1709<text:tab/>It is an error if the file mode is not Generation immediately prior to any use of put, write, writeln or page.</text:p>
      <text:p text:style-name="P54">iso7185prt1710<text:tab/>It is an error if the file is undefined immediately prior to any use of put, write, writeln or page.</text:p>
      <text:p text:style-name="P54">iso7185prt1711<text:tab/>It is an error if end-of-file is not true immediately prior to any use of put, write, writeln or page.</text:p>
      <text:p text:style-name="P54">iso7185prt1712<text:tab/>It is an error if the buffer-variable is undefined immediately prior to any use of put.</text:p>
      <text:p text:style-name="P54">iso7185prt1713<text:tab/>It is an error if the file is undefined immediately prior to any use of reset.</text:p>
      <text:p text:style-name="P54">iso7185prt1714<text:tab/>It is an error if the file mode is not Inspection immediately prior to any use of get or read.</text:p>
      <text:p text:style-name="P54">iso7185prt1715<text:tab/>It is an error if the file is undefined immediately prior to any use of get or read.</text:p>
      <text:p text:style-name="P54">iso7185prt1716 <text:tab/>It is an error if end-of-file is true immediately prior to any use of get or read.</text:p>
      <text:p text:style-name="P54">iso7185prt1717<text:tab/>For read, it is an error if the value possessed by the buffer-variable is not assignmentcompatible with the variable-access.</text:p>
      <text:p text:style-name="P54">iso7185prt1718<text:tab/>For write, it is an error if the value possessed by the expression is not assignment-compatible with the buffer-variable.</text:p>
      <text:p text:style-name="P54">iso7185prt1719<text:tab/>For new(p,c l ,...,c n,), it is an error if a variant of a variant-part within the new variable becomes active and a different variant of the variant-part is one of the specified variants.</text:p>
      <text:p text:style-name="P54">iso7185prt1720<text:tab/>For dispose(p), it is an error if the identifying-value had been created using the form new(p,c l ,...,c n ).</text:p>
      <text:p text:style-name="P54">iso7185prt1721<text:tab/>For dispose(p,k l ,...,k, ), it is an error unless the variable had been created using the form new(p,c l ,...,c,,,) and m is equal to n.</text:p>
      <text:p text:style-name="P54"><text:soft-page-break/>iso7185prt1722<text:tab/>For dispose(p,k l ,...,k, ), it is an error if the variants in the variable identified by the pointer value of p are different from those specified by the case-constants k l ,...,k,,,,.</text:p>
      <text:p text:style-name="P54">iso7185prt1723<text:tab/>For dispose, it is an error if the parameter of a pointer-type has a nil-value.</text:p>
      <text:p text:style-name="P54">iso7185prt1724<text:tab/>For dispose, it is an error if the parameter of a pointer-type is undefined.</text:p>
      <text:p text:style-name="P54">iso7185prt1725<text:tab/>It is an error if a variable created using the second form of new is accessed by the identified variable of the variable-access of a factor, of an assignment-statement, or of an actual-parameter.</text:p>
      <text:p text:style-name="P54">iso7185prt1726<text:tab/>For pack, it is an error if the parameter of ordinal-type is not assignment-compatible with the index-type of the unpacked array parameter.</text:p>
      <text:p text:style-name="P54">iso7185prt1727<text:tab/>For pack, it is an error if any of the components of the unpacked array are both undefined and accessed.</text:p>
      <text:p text:style-name="P54">iso7185prt1728<text:tab/>For pack, it is an error if the index-type of the unpacked array is exceeded.</text:p>
      <text:p text:style-name="P54">iso7185prt1729<text:tab/>For unpack, it is an error if the parameter of ordinal-type is not assignment-compatible with the index-type of the unpacked array parameter.</text:p>
      <text:p text:style-name="P54">iso7185prt1730<text:tab/>For unpack, it is an error if any of the components of the packed array are undefined.</text:p>
      <text:p text:style-name="P54">iso7185prt1731<text:tab/>For unpack, it is an error if the index-type of the unpacked array is exceeded.</text:p>
      <text:p text:style-name="P54">iso7185prt1732<text:tab/>Sqr(x) computes the square of x. It is an error if such a value does not exist.</text:p>
      <text:p text:style-name="P54">iso7185prt1733<text:tab/>For ln(x), it is an error if x is not greater than zero.</text:p>
      <text:p text:style-name="P54">iso7185prt1734<text:tab/>For sqrt(x), it is an error if x is negative.</text:p>
      <text:p text:style-name="P54">iso7185prt1735<text:tab/>For trunc(x), the value of trunc(x) is such that if x is positive or zero then 0 &lt; x-trunc(x) &lt; 1; otherwise 1 &lt;x-trunc(x) &lt; 0. It is an error if such a value does not exist.</text:p>
      <text:p text:style-name="P54">iso7185prt1736<text:tab/>For round(x), if x is positive or zero then round(x) is equivalent to trunc(x+0.5), otherwise round(x) is equivalent to trunc(x- 0.5). It is an error if such a value does not exist. </text:p>
      <text:p text:style-name="P54">iso7185prt1737<text:tab/>For chr(x), the function returns a result of char-type that is the value whose ordinal number is equal to the value of the expression x if such a character value exists. It is an error if such a character value does not exist.</text:p>
      <text:p text:style-name="P54">iso7185prt1738<text:tab/>For succ(x), the function yields a value whose ordinal number is one greater than that of x, if such a value exists. It is an error if such a value does not exist.</text:p>
      <text:p text:style-name="P54">iso7185prt1739<text:tab/>For pred(x), the function yields a value whose ordinal number is one less than that of x, if such a value exists. It is an error if such a value does not exist.</text:p>
      <text:p text:style-name="P54">iso7185prt1740<text:tab/>When eof(f) is activated, it is an error if f is undefined.</text:p>
      <text:p text:style-name="P54">iso7185prt1741<text:tab/>When eoln(f) is activated, it is an error if f is undefined.</text:p>
      <text:p text:style-name="P54">iso7185prt1742<text:tab/>When eoln(f) is activated, it is an error if eof(f) is true.</text:p>
      <text:p text:style-name="P54"><text:soft-page-break/>iso7185prt1743<text:tab/>An expression denotes a value unless a variable denoted by a variable-access contained by the expression is undefined at the time of its use, in which case that use is an error.</text:p>
      <text:p text:style-name="P54">iso7185prt1744<text:tab/>A term of the form x/y is an error if y is zero.</text:p>
      <text:p text:style-name="P54">iso7185prt1745<text:tab/>A term of the form i div j is an error if j is zero.</text:p>
      <text:p text:style-name="P54">iso7185prt1746<text:tab/>A term of the form i mod j is an error if j is zero or negative.</text:p>
      <text:p text:style-name="P54">iso7185prt1747<text:tab/>It is an error if an integer operation or function is not performed according to the mathematical rules for integer arithmetic.</text:p>
      <text:p text:style-name="P54">iso7185prt1748<text:tab/>It is an error if the result of an activation of a function is undefined upon completion of the algorithm of the activation.</text:p>
      <text:p text:style-name="P54">iso7185prt1749<text:tab/>For an assignment-statement, it is an error if the expression is of an ordinal-type whose value is not assignment-compatible with the type possessed by the variable or function-identifier.</text:p>
      <text:p text:style-name="P54">iso7185prt1750<text:tab/>For an assignment-statement, it is an error if the expression is of a set-type whose value is not assignment-compatible with the type possessed by the variable.</text:p>
      <text:p text:style-name="P54">iso7185prt1751<text:tab/>For a case-statement, it is an error if none of the case-constants is equal to the value of the case-index upon entry to the case-statement.</text:p>
      <text:p text:style-name="P54">iso7185prt1752<text:tab/>For a for-statement, it is an error if the value of the initial-value is not assignment-compatible with the type possessed by the control-variable if the statement of the for-statement is executed.</text:p>
      <text:p text:style-name="P54">iso7185prt1753<text:tab/>For a for-statement, it is an error if the value of the final-value is not assignment-compatible with the type possessed by the control-variable if the statement of the for-statement is executed.</text:p>
      <text:p text:style-name="P54">iso7185prt1754<text:tab/>On reading an integer from a textfile, after skipping preceding spaces and end-of-lines, it is an error if the rest of the sequence does not form a signed-integer.</text:p>
      <text:p text:style-name="P54">iso7185prt1755<text:tab/>On reading an integer from a textfile, it is an error if the value of the signed-integer read is not assignment-compatible with the type possessed by variable-access.</text:p>
      <text:p text:style-name="P54">iso7185prt1756<text:tab/>On reading a number from a textfile, after skipping preceding spaces and end-of-lines, it is an error if the rest of the sequence does not form a signed-number.</text:p>
      <text:p text:style-name="P54">iso7185prt1757<text:tab/>It is an error if the buffer-variable is undefined immediately prior to any use of read.</text:p>
      <text:p text:style-name="P54">iso7185prt1758<text:tab/>On writing to a textfile, the values of TotalWidth and FracDigits are greater than or equal to one ; it is an error if either value is less than one.</text:p>
      <text:p text:style-name="P54">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_RefHeading___Toc15974_2478585429"/><text:bookmark-start text:name="_Toc528309223"/>Class 3: Advanced error checking<text:bookmark-end text:name="__RefHeading___Toc15974_2478585429"/><text:bookmark-end text:name="_Toc528309223"/></text:h>
      <text:p text:style-name="Standard">These are advanced error checks that the compiler may or may not check for.</text:p>
      <text:p text:style-name="P54"><text:soft-page-break/>iso7185prt1800<text:tab/>Access to dynamic variable after dispose.</text:p>
      <text:h text:style-name="Heading_20_4" text:outline-level="4"><text:bookmark-start text:name="__RefHeading___Toc15976_2478585429"/><text:bookmark-start text:name="_Toc528309224"/>Class 4: Field checks<text:bookmark-end text:name="__RefHeading___Toc15976_2478585429"/><text:bookmark-end text:name="_Toc528309224"/></text:h>
      <text:p text:style-name="Standard">These tests are a collection of issues found while running the compiler.</text:p>
      <text:p text:style-name="P54">iso7185prt1900<text:tab/>Access to dynamic variable after dispose.</text:p>
      <text:h text:style-name="Heading_20_3" text:outline-level="3"><text:bookmark-start text:name="__RefHeading___Toc15978_2478585429"/><text:bookmark-start text:name="_Toc528309225"/>Running the PRT and interpreting the results<text:bookmark-end text:name="__RefHeading___Toc15978_2478585429"/><text:bookmark-end text:name="_Toc528309225"/></text:h>
      <text:p text:style-name="P54">There is a single script that runs the prt:</text:p>
      <text:p text:style-name="P54">$ runprt</text:p>
      <text:p text:style-name="P54">The results of all of the tests are gathered and formatted into the file:</text:p>
      <text:p text:style-name="P54">iso7185prt.lst</text:p>
      <text:p text:style-name="P54">This file has several sections:</text:p>
      <text:list text:style-name="WWNum7">
        <text:list-item>
          <text:p text:style-name="P225">List of tests with no compile or runtime error.</text:p>
        </text:list-item>
        <text:list-item>
          <text:p text:style-name="P225">List of differences between compiler output and “gold” standard outputs.</text:p>
        </text:list-item>
        <text:list-item>
          <text:p text:style-name="P225">List of differences between runtime output and “gold” standard outputs.</text:p>
        </text:list-item>
        <text:list-item>
          <text:p text:style-name="P226">Collected compiler listings and runtime output of all tests.</text:p>
        </text:list-item>
      </text:list>
      <text:p text:style-name="P42">Each of these will be examined in turn.</text:p>
      <text:h text:style-name="Heading_20_4" text:outline-level="4"><text:bookmark-start text:name="__RefHeading___Toc15980_2478585429"/><text:bookmark-start text:name="_Toc528309226"/>List of tests with no compile or runtime error.<text:bookmark-end text:name="__RefHeading___Toc15980_2478585429"/><text:bookmark-end text:name="_Toc528309226"/></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_RefHeading___Toc15982_2478585429"/><text:bookmark-start text:name="_Toc528309227"/>List of differences between compiler output and “gold” standard outputs.<text:bookmark-end text:name="__RefHeading___Toc15982_2478585429"/><text:bookmark-end text:name="_Toc528309227"/></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_RefHeading___Toc15984_2478585429"/><text:bookmark-start text:name="_Toc528309228"/>List of differences between runtime output and “gold” standard outputs.<text:bookmark-end text:name="__RefHeading___Toc15984_2478585429"/><text:bookmark-end text:name="_Toc528309228"/></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text:soft-page-break/>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_RefHeading___Toc15986_2478585429"/><text:bookmark-start text:name="_Toc528309229"/>Collected compiler listings and runtime output of all tests.<text:bookmark-end text:name="__RefHeading___Toc15986_2478585429"/><text:bookmark-end text:name="_Toc5283092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_RefHeading___Toc15988_2478585429"/><text:bookmark-start text:name="_Toc528309230"/>Overall interpretation of PRT results<text:bookmark-end text:name="__RefHeading___Toc15988_2478585429"/><text:bookmark-end text:name="_Toc528309230"/></text:h>
      <text:p text:style-name="Standard">The rejection test is a “quality” test. There is no absolute right and wrong. The clearest indication of failure is failure to find any error. Past that are issues that indicate the quality of the error handling in the compiler:</text:p>
      <text:list text:style-name="WWNum8">
        <text:list-item>
          <text:p text:style-name="P227">If the error is indicative of what the failure was.</text:p>
        </text:list-item>
        <text:list-item>
          <text:p text:style-name="P227">No or few further errors resulted after the failure.</text:p>
        </text:list-item>
        <text:list-item>
          <text:p text:style-name="P227">The compiler was able to resyncronise with the source.</text:p>
        </text:list-item>
        <text:list-item>
          <text:p text:style-name="P227">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320481289_Copy_1"/><text:bookmark text:name="_Toc528309231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he Pascaline Rejection Test<text:bookmark-end text:name="__RefHeading___Toc15990_2478585429_Copy1"/><text:bookmark text:name="_Toc320481289_Copy_2"/><text:bookmark text:name="_Toc528309231_Copy_2"/></text:h>
      <text:p text:style-name="Standard">There is no Pascaline rejection test defined at this time.</text:p>
      <text:h text:style-name="Heading_20_2" text:outline-level="2"><text:bookmark-start text:name="__RefHeading___Toc15990_2478585429"/><text:bookmark-start text:name="_Toc320481289"/><text:bookmark-start text:name="_Toc528309231"/>Sample program tests<text:bookmark-end text:name="__RefHeading___Toc15990_2478585429"/><text:bookmark-end text:name="_Toc320481289"/><text:bookmark-end text:name="_Toc528309231"/></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text:soft-page-break/>new version of the compiler has serious problems, it is better to find out with simple tests rather than have it fail on a more complex, and difficult to debug, test.</text:p>
      <text:p text:style-name="P53">Hello<text:tab/>Gives the standard “hello, world” minimum test.</text:p>
      <text:p text:style-name="P53">Roman<text:tab/>Prints a series of roman numerals. From Jensen and Wirth’s “User Manual and report”.</text:p>
      <text:p text:style-name="P53">Match<text:tab/>A number match game, this version from Conway, Gries and Zimmerman “A primer on Pascal”.</text:p>
      <text:p text:style-name="P53">Startrek<text:tab/>Plays text mode startrek. From the internet.</text:p>
      <text:p text:style-name="P53">Basics<text:tab/>Runs a subset Basic interpreter. It is tested by running a recoded version of “match” above.</text:p>
      <text:p text:style-name="P53">Pascal-S<text:tab/>Runs a subset of ISO 7185 Pascal. From Niklaus Wirth’s work at ETH. It is tested by running the “Roman” program above.</text:p>
      <text:p text:style-name="P53">All of these except for Pascal-S are run using testprog. Pascal-s is run via the script testpascals.</text:p>
      <text:h text:style-name="Heading_20_2" text:outline-level="2"><text:bookmark-start text:name="__RefHeading___Toc15992_2478585429"/><text:bookmark-start text:name="_Toc528309232"/>Previous Pascal-P versions test<text:bookmark-end text:name="__RefHeading___Toc15992_2478585429"/><text:bookmark-end text:name="_Toc528309232"/></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_RefHeading___Toc15994_2478585429"/><text:bookmark-start text:name="_Toc528309233"/>Compile and run Pascal-P2<text:bookmark-end text:name="__RefHeading___Toc15994_2478585429"/><text:bookmark-end text:name="_Toc528309233"/></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text:style-name="WWNum6">
        <text:list-item>
          <text:p text:style-name="P228">Pascal-P2 only supports upper case.</text:p>
        </text:list-item>
        <text:list-item>
          <text:p text:style-name="P228">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30">http://www.standardpascal.org</text:span></text:span></text:a>.</text:p>
      <text:p text:style-name="Standard">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_RefHeading___Toc15996_2478585429"/><text:bookmark-start text:name="_Toc528309234"/>Compile and run Pascal-P4<text:bookmark-end text:name="__RefHeading___Toc15996_2478585429"/><text:bookmark-end text:name="_Toc528309234"/></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text:soft-page-break/>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320481290_Copy_1"/><text:bookmark text:name="_Toc528309235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P213" text:outline-level="2"><text:bookmark-start text:name="__RefHeading___Toc15998_2478585429_Copy_ Copy 1"/>Compile and Run Pascal-P<text:bookmark text:name="_Toc320481290_Copy_1 Copy 1"/><text:bookmark text:name="_Toc528309235_Copy_1 Copy 1"/><text:span text:style-name="T94">6</text:span><text:bookmark-end text:name="__RefHeading___Toc15998_2478585429_Copy_ Copy 1"/></text:h>
      <text:p text:style-name="P163">Compiling Pascal-P6 on Pascal-P6 is a self compilation test. The source used for this comes from the Pascal-P6 source directory itself.</text:p>
      <text:p text:style-name="P145">Pascal-P<text:span text:style-name="T94">6</text:span> is run via the script file testp<text:span text:style-name="T94">6</text:span>.</text:p>
      <text:h text:style-name="Heading_20_2" text:outline-level="2"><text:bookmark-start text:name="__RefHeading___Toc15998_2478585429"/><text:bookmark-start text:name="_Toc320481290"/><text:bookmark-start text:name="_Toc528309235"/>Self compile<text:bookmark-end text:name="__RefHeading___Toc15998_2478585429"/><text:bookmark-end text:name="_Toc320481290"/><text:bookmark-end text:name="_Toc528309235"/></text:h>
      <text:p text:style-name="Standard">One of the more difficult tests for Pascal-P6 (and the most time consuming) is to have Pascal-P6 compile and run itself <text:span text:style-name="T94">in interpretive mode</text:span>. Actually the entire idea of Pascal-P was to compile and run itself in order to accomplish a bootstrap of the compiler. Pascal-P was never provided in a form able to 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ext:soft-page-break/>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31">The changes required to get pcom and pint to self compile are implemented by the macro switch SELF_COMPILE. What this does for each program will be listed below. The changes are implemented as part of the macro processor, pascpp. See “</text:span><text:span text:style-name="T31"><text:bookmark-ref text:reference-format="number-no-superior" text:ref-name="__RefHeading___Toc15710_2478585429">Error: Reference source not found</text:bookmark-ref></text:span><text:span text:style-name="T31"> </text:span><text:span text:style-name="T31"><text:bookmark-ref text:reference-format="text" text:ref-name="__RefHeading___Toc15710_2478585429">Error: Reference source not found</text:bookmark-ref></text:span><text:span text:style-name="T31">”.</text:span></text:p>
      <text:h text:style-name="Heading_20_3" text:outline-level="3"><text:bookmark-start text:name="__RefHeading___Toc16000_2478585429"/><text:bookmark-start text:name="_Toc320481291"/><text:bookmark-start text:name="_Toc528309236"/>pcom<text:bookmark-end text:name="__RefHeading___Toc16000_2478585429"/><text:bookmark-end text:name="_Toc320481291"/><text:bookmark-end text:name="_Toc528309236"/></text:h>
      <text:p text:style-name="P172">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p>
      <text:p text:style-name="P172">The batch file to control a self compile and check is:</text:p>
      <text:p text:style-name="P172">cpcoms</text:p>
      <text:p text:style-name="P172">What does it mean to self compile? For pcom, not much. Since it does not execute itself (pint does that), it is simply operating on the interpreter, and happens to be compiling a copy of itself.</text:p>
      <text:h text:style-name="Heading_20_4" text:outline-level="4"><text:bookmark-start text:name="__RefHeading___Toc16002_2478585429"/><text:bookmark-start text:name="_Toc528309237"/>Changes required<text:bookmark-end text:name="__RefHeading___Toc16002_2478585429"/><text:bookmark-end text:name="_Toc528309237"/></text:h>
      <text:p text:style-name="P172">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p>
      <text:p text:style-name="P172">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p>
      <text:h text:style-name="Heading_20_3" text:outline-level="3"><text:bookmark-start text:name="__RefHeading___Toc16004_2478585429"/><text:bookmark-start text:name="_Toc320481292"/><text:bookmark-start text:name="_Toc528309238"/>pint<text:bookmark-end text:name="__RefHeading___Toc16004_2478585429"/><text:bookmark-end text:name="_Toc320481292"/><text:bookmark-end text:name="_Toc528309238"/></text:h>
      <text:p text:style-name="P172">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p>
      <text:p text:style-name="P172">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p>
      <text:p text:style-name="P172">The SELF_COMPILE macro switch removes the prr and prd definitions, and the reset() and rewrite() calls for same, as in pcom. It also changes the size of the program storage array to be smaller so that it will fit into the enclosing pint machine.</text:p>
      <text:p text:style-name="P172"><text:soft-page-break/>The batch file required to self compile pint is:</text:p>
      <text:p text:style-name="P172">cpints</text:p>
      <text:p text:style-name="P172">Pint also has to change the way it takes in input files. It cannot read the intermediate from the input file, because that is reserved for the program to be run. Instead, it reads the intermediate from the "prd" 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p>
      <text:p text:style-name="P172">Self compiled files and sizes</text:p>
      <text:p text:style-name="P172">The resulting sizes of the self compiled files are:</text:p>
      <text:p text:style-name="P172">pcomm.P6</text:p>
      <text:p text:style-name="P172">Storage areas occupied</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26">Contents</text:p>
          </table:table-cell>
          <table:table-cell table:style-name="Table31.A1" office:value-type="string">
            <text:p text:style-name="P26">Range of storage</text:p>
          </table:table-cell>
          <table:table-cell table:style-name="Table31.A1" office:value-type="string">
            <text:p text:style-name="P26">Net size</text:p>
          </table:table-cell>
        </table:table-row>
        <table:table-row table:style-name="Table31.1">
          <table:table-cell table:style-name="Table31.A2" office:value-type="string">
            <text:p text:style-name="P26">Program</text:p>
          </table:table-cell>
          <table:table-cell table:style-name="Table31.B2" office:value-type="string">
            <text:p text:style-name="P151">0-114657</text:p>
          </table:table-cell>
          <table:table-cell table:style-name="Table31.B2" office:value-type="string">
            <text:p text:style-name="P151">(114658)</text:p>
          </table:table-cell>
        </table:table-row>
        <table:table-row table:style-name="Table31.1">
          <table:table-cell table:style-name="Table31.A3" office:value-type="string">
            <text:p text:style-name="P26">Stack/Heap</text:p>
          </table:table-cell>
          <table:table-cell table:style-name="Table31.B3" office:value-type="string">
            <text:p text:style-name="P151">114658-1987994</text:p>
          </table:table-cell>
          <table:table-cell table:style-name="Table31.C3" office:value-type="string">
            <text:p text:style-name="P151">(1873337)</text:p>
          </table:table-cell>
        </table:table-row>
        <table:table-row table:style-name="Table31.1">
          <table:table-cell table:style-name="Table31.A2" office:value-type="string">
            <text:p text:style-name="P26">Constants</text:p>
          </table:table-cell>
          <table:table-cell table:style-name="Table31.B2" office:value-type="string">
            <text:p text:style-name="P151">1987995-2000000</text:p>
          </table:table-cell>
          <table:table-cell table:style-name="Table31.B2" office:value-type="string">
            <text:p text:style-name="P151">(  12005)</text:p>
          </table:table-cell>
        </table:table-row>
      </table:table>
      <text:p text:style-name="P172"/>
      <text:p text:style-name="P172">pintm.P6</text:p>
      <text:p text:style-name="P172">Storage areas occupied</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26">Contents</text:p>
          </table:table-cell>
          <table:table-cell table:style-name="Table32.A1" office:value-type="string">
            <text:p text:style-name="P26">Range of storage</text:p>
          </table:table-cell>
          <table:table-cell table:style-name="Table32.A1" office:value-type="string">
            <text:p text:style-name="P26">Net size</text:p>
          </table:table-cell>
        </table:table-row>
        <table:table-row table:style-name="Table32.1">
          <table:table-cell table:style-name="Table32.A2" office:value-type="string">
            <text:p text:style-name="P26">Program</text:p>
          </table:table-cell>
          <table:table-cell table:style-name="Table32.B2" office:value-type="string">
            <text:p text:style-name="P151">0- 56194</text:p>
          </table:table-cell>
          <table:table-cell table:style-name="Table32.B2" office:value-type="string">
            <text:p text:style-name="P151">(56195)</text:p>
          </table:table-cell>
        </table:table-row>
        <table:table-row table:style-name="Table32.1">
          <table:table-cell table:style-name="Table32.A3" office:value-type="string">
            <text:p text:style-name="P26">Stack/Heap</text:p>
          </table:table-cell>
          <table:table-cell table:style-name="Table32.B3" office:value-type="string">
            <text:p text:style-name="P151">56195-1993985</text:p>
          </table:table-cell>
          <table:table-cell table:style-name="Table32.C3" office:value-type="string">
            <text:p text:style-name="P151">(1937791)</text:p>
          </table:table-cell>
        </table:table-row>
        <table:table-row table:style-name="Table32.1">
          <table:table-cell table:style-name="Table32.A2" office:value-type="string">
            <text:p text:style-name="P26">Constants</text:p>
          </table:table-cell>
          <table:table-cell table:style-name="Table32.B2" office:value-type="string">
            <text:p text:style-name="P151">1993986-2000000</text:p>
          </table:table-cell>
          <table:table-cell table:style-name="Table32.B2" office:value-type="string">
            <text:p text:style-name="P151">(6014)</text:p>
          </table:table-cell>
        </table:table-row>
      </table:table>
      <text:h text:style-name="Heading_20_2" text:outline-level="2"><text:bookmark-start text:name="__RefHeading___Toc15990_2478585429_Copy2"/>The Debug Mode Test<text:bookmark-end text:name="__RefHeading___Toc15990_2478585429_Copy2"/><text:bookmark text:name="_Toc320481289_Copy_3"/><text:bookmark text:name="_Toc528309231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debug_test1.pas<text:tab/><text:tab/>Joined routines for testing.</text:p>
      <text:p text:style-name="Standard">An important part of the debug mode test is the commands that are input. These are contained in:</text:p>
      <text:p text:style-name="Standard">debug_test.inp</text:p>
      <text:p text:style-name="Standard">Normally the debug test is run via the testdebug script.</text:p>
      <text:p text:style-name="P163">Note: the debug mode test outputs a lot information such as assembly listings and dumps that change when the underlying compiler changes. Thus it will often need to be recompared by hand.</text:p>
      <text:p text:style-name="Standard"><text:soft-page-break/></text:p>
      <text:p text:style-name="Standard"/>
      <text:h text:style-name="P209" text:outline-level="1"><text:bookmark-start text:name="__RefHeading___Toc30960_3822401252"/>Preparing a Pascal-P6 release<text:bookmark-end text:name="__RefHeading___Toc30960_3822401252"/></text:h>
      <text:p text:style-name="P126">A release, defined as any set of Pascal-P6 file containing a version number, is a promise to users that the code and files contained within meet quality standards. Nothing is worse than a version that must have follow on versions to correct bugs that could have been found by simple testing.</text:p>
      <text:p text:style-name="P125">Several items must be accomplished to create a Pascal-P6 Release:</text:p>
      <text:list text:style-name="L3">
        <text:list-item>
          <text:p text:style-name="P236">The version <text:span text:style-name="T60">must</text:span> run a full regression. No exceptions.</text:p>
        </text:list-item>
        <text:list-item>
          <text:p text:style-name="P236">Advance the version number(s) on all applicable sources.</text:p>
        </text:list-item>
        <text:list-item>
          <text:p text:style-name="P236">Create a news file for the release, containing new features added and bugs/problems existing in it. Follow the format of previous releases. <text:span text:style-name="T62">It should contain all of the issues from Github that are marked as bugs. If there are bugs that are not properly marked as bugs, this is the time to fix them. The closed issues list is a good place to find new features, as well as the commit log after the date of the last release. </text:span><text:span text:style-name="T61">Commit this to the archive.</text:span></text:p>
        </text:list-item>
        <text:list-item>
          <text:p text:style-name="P236">Create a candidate release. This can be done on <text:a xlink:type="simple" xlink:href="https://github.com/samiam95124/Pascal-P6/releases" text:style-name="Internet_20_link" text:visited-style-name="Visited_20_Internet_20_Link">https://github.com/samiam95124/Pascal-P6/releases</text:a> “Draft a new release”. Github will create .zip and .gz files for you. Enter in the discription “Candidate release, DO NOT USE”. This will be changed after verification.</text:p>
        </text:list-item>
        <text:list-item>
          <text:p text:style-name="P236">Download the release to a scratch directory.</text:p>
        </text:list-item>
        <text:list-item>
          <text:p text:style-name="P236">Enter the directory with a newly created shell.</text:p>
        </text:list-item>
        <text:list-item>
          <text:p text:style-name="P236">Follow the steps to build Pascal-P6, . setpath, ./configure, make.</text:p>
        </text:list-item>
        <text:list-item>
          <text:p text:style-name="P236">Rerun regression in that directory.</text:p>
        </text:list-item>
        <text:list-item>
          <text:p text:style-name="P236">On Git<text:span text:style-name="T62">h</text:span>ub change the release description to active.</text:p>
        </text:list-item>
        <text:list-item>
          <text:p text:style-name="P237">Put announcement for the release in the discussions area. The contents are the same as NEWS.</text:p>
        </text:list-item>
      </text:list>
      <text:p text:style-name="P90"/>
      <text:h text:style-name="P210" text:outline-level="1"><text:bookmark-start text:name="__RefHeading___Toc30962_3822401252"/>Filing bugs against Pascal-P6<text:bookmark-end text:name="__RefHeading___Toc30962_3822401252"/></text:h>
      <text:p text:style-name="P122">To file bugs against Pascal-P6, please use the “issues” section of the online Pascal-P6 repo:</text:p>
      <text:p text:style-name="P122"><text:a xlink:type="simple" xlink:href="https://github.com/samiam95124/Pascal-P6/issues" text:style-name="Internet_20_link" text:visited-style-name="Visited_20_Internet_20_Link">https://github.com/samiam95124/Pascal-P6/issues</text:a></text:p>
      <text:p text:style-name="P122">To properly fix a bug, the following information is needed:</text:p>
      <text:list text:style-name="L4">
        <text:list-item>
          <text:p text:style-name="P238">A description of the bug or problem at hand.</text:p>
        </text:list-item>
        <text:list-item>
          <text:p text:style-name="P238">The system it was encountered on (Linux, Windows, etc.).</text:p>
        </text:list-item>
        <text:list-item>
          <text:p text:style-name="P238">The version number of that system, complete, like “Ubuntu 22.04 LTS”).</text:p>
        </text:list-item>
        <text:list-item>
          <text:p text:style-name="P238">The version number of Pascal-P6 where the bug or problem was found. This is printed out when Pascal-P6 programs run, <text:span text:style-name="T70">as</text:span><text:span text:style-name="T58"> “P6 Pascal compiler vs. 0.2”. If the version number ends with an x (“.x”), it means it is not an official release, and was taken from the archive. If that is so, please include the complete commit number of </text:span><text:span text:style-name="T59">the version. This can be obtained with the “git log” command in the repo. Note that it is not possible to file bugs against a repo that has custom changes on it, </text:span><text:span text:style-name="T70">IE, your own copy of the repo</text:span><text:span text:style-name="T59">.</text:span></text:p>
        </text:list-item>
        <text:list-item>
          <text:p text:style-name="P239">A <text:span text:style-name="T60">short</text:span> example program that causes the issue, including the steps used to compile it.</text:p>
        </text:list-item>
      </text:list>
      <text:p text:style-name="P123">An example of a problem submission is:</text:p>
      <text:p text:style-name="Code"/>
      <text:p text:style-name="P91">samiam@samiam-h-pc-2:~/projects/pascal/pascal-p6$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hello(output); </text:p>
      <text:p text:style-name="Code"><text:s text:c="5"/>2 <text:s text:c="6"/>-8 <text:s/></text:p>
      <text:p text:style-name="Code"><text:s text:c="5"/>3 <text:s text:c="6"/>-8 begin </text:p>
      <text:p text:style-name="Code"><text:s text:c="5"/>4 <text:s text:c="7"/>5 <text:s/></text:p>
      <text:p text:style-name="Code"><text:s text:c="5"/>5 <text:s text:c="7"/>5 <text:s text:c="4"/>writeln('Hello, world') </text:p>
      <text:p text:style-name="Code"><text:s text:c="5"/>6 <text:s text:c="6"/>13 <text:s/></text:p>
      <text:p text:style-name="Code"><text:s text:c="5"/>7 <text:s text:c="6"/>13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kCUvhi.o: in function `resetfn':</text:p>
      <text:p text:style-name="Code">/home/samiam/projects/pascal/pascal-p6/source/AMD64/gcc/psystem.c:1846: warning: the use of `tmpnam' is dangerous, better use `mkstemp'</text:p>
      <text:p text:style-name="Code">Hello, world</text:p>
      <text:p text:style-name="Code"/>
      <text:p text:style-name="P124">(obviously this is a working program).</text:p>
      <text:p text:style-name="P124">Please cut the program down as much as possible, but still reveals the error. Typically this can be done by removing parts of the program that are not needed to demonstrate the issue.</text:p>
      <text:h text:style-name="P205" text:outline-level="1"><text:bookmark-start text:name="__RefHeading___Toc15534_2478585429"/><text:bookmark-start text:name="_Toc528309083"/>Licensing information<text:bookmark-end text:name="__RefHeading___Toc15534_2478585429"/><text:bookmark-end text:name="_Toc528309083"/></text:h>
      <text:p text:style-name="Standard">Pascal-P6 is covered by the BSD license:</text:p>
      <text:p text:style-name="P64">Copyright (c) 1996, 2018, Scott A. Franco</text:p>
      <text:p text:style-name="P64">All rights reserved.</text:p>
      <text:p text:style-name="Standard"><text:span text:style-name="T12">Redistribution </text:span><text:span text:style-name="T32">and</text:span><text:span text:style-name="T12"> use in source </text:span><text:span text:style-name="T32">and</text:span><text:span text:style-name="T12"> binary forms, with </text:span><text:span text:style-name="T32">or</text:span><text:span text:style-name="T12"> without</text:span><text:span text:style-name="T25"> </text:span><text:span text:style-name="T12">modification, are permitted provided that the following conditions are met:</text:span></text:p>
      <text:p text:style-name="Standard"><text:span text:style-name="T12">1. Redistributions of source code must retain the above copyright notice, </text:span><text:span text:style-name="T32">this</text:span><text:span text:style-name="T12"> list of conditions </text:span><text:span text:style-name="T32">and</text:span><text:span text:style-name="T12"> the following disclaimer. </text:span></text:p>
      <text:p text:style-name="Standard"><text:span text:style-name="T12">2. Redistributions in binary form must reproduce the above copyright notice, </text:span><text:span text:style-name="T32">this</text:span><text:span text:style-name="T12"> list of conditions </text:span><text:span text:style-name="T32">and</text:span><text:span text:style-name="T12"> the following disclaimer in the documentation </text:span><text:span text:style-name="T32">and</text:span><text:span text:style-name="T12">/</text:span><text:span text:style-name="T32">or</text:span><text:span text:style-name="T12"> other materials provided with the distribution.</text:span></text:p>
      <text:p text:style-name="Standard"><text:span text:style-name="T12">THIS SOFTWARE IS PROVIDED BY THE COPYRIGHT HOLDERS AND CONTRIBUTORS </text:span><text:span text:style-name="T33">"AS IS" </text:span><text:span text:style-name="T12">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P64">INTERRUPTION) HOWEVER CAUSED AND ON ANY THEORY OF LIABILITY, WHETHER IN CONTRACT, STRICT LIABILITY, OR TORT (INCLUDING NEGLIGENCE OR OTHERWISE) ARISING IN ANY WAY OUT OF THE USE OF THIS SOFTWARE, EVEN IF ADVISED OF THE POSSIBILITY OF SUCH DAMAGE.</text:p>
      <text:p text:style-name="Standard"><text:span text:style-name="T12">The views </text:span><text:span text:style-name="T32">and</text:span><text:span text:style-name="T12"> conclusions contained in the software </text:span><text:span text:style-name="T32">and</text:span><text:span text:style-name="T12"> documentation are those of the authors </text:span><text:span text:style-name="T32">and</text:span><text:span text:style-name="T12"> should </text:span><text:span text:style-name="T32">not</text:span><text:span text:style-name="T12"> be interpreted as representing official policies, either expressed </text:span><text:span text:style-name="T32">or</text:span><text:span text:style-name="T12"> implied, of the Pascal-P6 project.</text:span></text:p>
      <text:p text:style-name="P64">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p>
      <text:p text:style-name="P65">The easiest way to obtain the public domain portion of Pascal-P6 is to simply obtain the Pascal-P4 source code, which is freely available online.</text:p>
      <text:p text:style-name="P65"/>
      <text:p text:style-name="P50"/>
      <text:h text:style-name="P208" text:outline-level="1"><text:bookmark-start text:name="__RefHeading___Toc26216_1866145677"/>Using, copying, <text:span text:style-name="T95">and obtaining</text:span> and distributing this manual<text:bookmark-end text:name="__RefHeading___Toc26216_1866145677"/></text:h>
      <text:p text:style-name="P164">This manual is covered by the same license as the software Pascal-P6. It may be freely distributed or printed. You may print and distribute the manual, whether for free or for profit.</text:p>
      <text:h text:style-name="Heading_20_2" text:outline-level="2"><text:bookmark-start text:name="__RefHeading___Toc24067_634662700"/>Obtaining a printed version<text:bookmark-end text:name="__RefHeading___Toc24067_634662700"/></text:h>
      <text:p text:style-name="P164">A set of perfect bound manuals is available for $32.50. Please contact the author at <text:a xlink:type="simple" xlink:href="mailto:samiam@moorecad.com" text:style-name="Internet_20_link" text:visited-style-name="Visited_20_Internet_20_Link">samiam@moorecad.com</text:a> for where to send the check and provide your shipping addr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handas" svg:font-family="Chandas"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pitch="variable"/>
    <style:font-face style:name="Corbel1" svg:font-family="Corbel" style:font-family-generic="roman" style:font-pitch="variable"/>
    <style:font-face style:name="Corbel2"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orbel1" fo:font-size="11pt" fo:language="en" fo:country="US" style:letter-kerning="false" style:font-name-asian="Corbel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1" fo:font-size="11pt" fo:language="en" fo:country="US" style:letter-kerning="false" style:font-name-asian="Corbel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2"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2"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2" style:font-family-asian="Corbe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2"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right="0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2"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right="0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right="0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2"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2"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right="0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right="0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right="0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right="0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2"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2"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Standard">
      <style:text-properties officeooo:rsid="001ca0b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2"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2" style:font-family-asian="Corbel"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2"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2"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2"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2"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eference" style:family="text" style:parent-style-name="ListLabel_20_157">
      <style:text-properties style:use-window-font-color="true" loext:opacity="0%" style:font-name="Loma" fo:font-family="Loma" style:font-pitch="variable" fo:font-size="11pt" fo:language="en" fo:country="US" fo:font-weight="bold" officeooo:rsid="00418729" style:letter-kerning="false" style:font-name-asian="Corbel2" style:font-family-asian="Corbel" style:font-family-generic-asian="system" style:font-pitch-asian="variable" style:font-size-asian="11pt" style:language-asian="en" style:country-asian="US" style:font-weight-asian="bold" style:font-name-complex="DejaVu Sans" style:font-family-complex="'DejaVu Sans'" style:font-family-generic-complex="system" style:font-pitch-complex="variable" style:font-size-complex="11pt" style:language-complex="ar" style:country-complex="SA" style:font-weight-complex="bold"/>
    </style:style>
    <style:style style:name="Caption_20_characters" style:display-name="Caption characters"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text-properties fo:text-transform="uppercase" fo:color="#ffffff" loext:opacity="100%" style:font-name="Arial" style:font-name-complex="Arial1"/>
    </style:style>
    <style:style style:name="MP2" style:family="paragraph" style:parent-style-name="Header">
      <style:paragraph-properties fo:text-align="end" style:justify-single-word="false" fo:orphans="0" fo:widows="0"/>
      <style:text-properties fo:color="#ffffff" loext:opacity="100%"/>
    </style:style>
    <style:style style:name="MP3" style:family="paragraph" style:parent-style-name="Header">
      <style:paragraph-properties fo:orphans="0" fo:widows="0"/>
      <style:text-properties fo:color="#ffffff" loext:opacity="100%"/>
    </style:style>
    <style:style style:name="MP4" style:family="paragraph" style:parent-style-name="Header">
      <style:paragraph-properties fo:orphans="0" fo:widows="0"/>
      <style:text-properties fo:text-transform="uppercase" fo:color="#ffffff" loext:opacity="100%" style:font-name="Arial" style:font-name-complex="Arial1"/>
    </style:style>
    <style:style style:name="MP5" style:family="paragraph" style:parent-style-name="Footer">
      <style:paragraph-properties fo:text-align="end" style:justify-single-word="false" fo:orphans="0" fo:widows="0"/>
    </style:style>
    <style:style style:name="MP6" style:family="paragraph" style:parent-style-name="Footer">
      <style:paragraph-properties fo:text-align="end" style:justify-single-word="false" fo:orphans="0" fo:widows="0"/>
      <style:text-properties fo:color="#ffffff" loext:opacity="100%"/>
    </style:style>
    <style:style style:name="MP7" style:family="paragraph" style:parent-style-name="Footer">
      <style:paragraph-properties fo:orphans="0" fo:widows="0"/>
      <style:text-properties fo:color="#ffffff" loext:opacity="100%"/>
    </style:style>
    <style:style style:name="MP8" style:family="paragraph" style:parent-style-name="Footer">
      <style:paragraph-properties fo:orphans="0" fo:widows="0"/>
    </style:style>
    <style:style style:name="MP9" style:family="paragraph" style:parent-style-name="Header">
      <style:paragraph-properties fo:text-align="end" style:justify-single-word="false" fo:orphans="0" fo:widows="0"/>
      <style:text-properties fo:color="#ffffff" loext:opacity="100%" officeooo:rsid="008894f9"/>
    </style:style>
    <style:style style:name="MP10" style:family="paragraph" style:parent-style-name="Header">
      <style:paragraph-properties fo:orphans="0" fo:widows="0"/>
      <style:text-properties fo:color="#ffffff" loext:opacity="100%" officeooo:rsid="00875750"/>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Pascal implementation: the Pascal-P6 compiler</text:p>
            </table:table-cell>
            <table:table-cell table:style-name="Table2.B1" office:value-type="string">
              <text:p text:style-name="MP2">October 1, 2023</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3">August 29, 2014</text:p>
            </table:table-cell>
            <table:table-cell table:style-name="Table1.B1" office:value-type="string">
              <text:p text:style-name="MP4">the P6 compiler</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5"/>
            </table:table-cell>
            <table:table-cell table:style-name="Table4.B1" office:value-type="string">
              <text:p text:style-name="MP6"><text:page-number text:select-page="current">0</text:page-number></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7"><text:page-number text:select-page="current">2</text:page-number></text:p>
            </table:table-cell>
            <table:table-cell table:style-name="Table3.B1" office:value-type="string">
              <text:p text:style-name="MP8"/>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the Pascal-P6 compiler</text:p>
            </table:table-cell>
            <table:table-cell table:style-name="Table5.B1" office:value-type="string">
              <text:p text:style-name="MP2">October 1, 2023</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3">August 29, 2014</text:p>
            </table:table-cell>
            <table:table-cell table:style-name="Table6.B1" office:value-type="string">
              <text:p text:style-name="MP4">Pascal implementation: the P6 compiler</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5"/>
            </table:table-cell>
            <table:table-cell table:style-name="Table7.B1" office:value-type="string">
              <text:p text:style-name="MP6"><text:page-number text:select-page="current">1</text:page-number></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8"><text:page-number text:select-page="current">0</text:page-number></text:p>
            </table:table-cell>
            <table:table-cell table:style-name="Table8.B1" office:value-type="string">
              <text:p text:style-name="MP8"/>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the Pascal-P6 compiler</text:p>
            </table:table-cell>
            <table:table-cell table:style-name="Table34.B1" office:value-type="string">
              <text:p text:style-name="MP9">Sept 8, 2024</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10">September 8, 2024</text:p>
            </table:table-cell>
            <table:table-cell table:style-name="Table33.B1" office:value-type="string">
              <text:p text:style-name="MP4">the Pascal-P6 compiler</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5"/>
            </table:table-cell>
            <table:table-cell table:style-name="Table36.B1" office:value-type="string">
              <text:p text:style-name="MP6"><text:page-number text:select-page="current">9</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7"><text:page-number text:select-page="current">170</text:page-number></text:p>
            </table:table-cell>
            <table:table-cell table:style-name="Table35.B1" office:value-type="string">
              <text:p text:style-name="MP8"/>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5"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4-09-09T23:42:29.196074750</meta:print-date>
    <dc:date>2026-06-18T22:28:16.428752265</dc:date>
    <meta:editing-cycles>515</meta:editing-cycles>
    <dc:title>IP Pascal User Manual</dc:title>
    <meta:editing-duration>P42DT11H26M47S</meta:editing-duration>
    <meta:generator>LibreOffice/7.6.7.2$Linux_X86_64 LibreOffice_project/60$Build-2</meta:generator>
    <meta:printed-by>PDF files</meta:printed-by>
    <meta:document-statistic meta:table-count="35" meta:image-count="1" meta:object-count="0" meta:page-count="215" meta:paragraph-count="5948" meta:word-count="57942" meta:character-count="357126" meta:non-whitespace-character-count="288597"/>
    <meta:user-defined meta:name="AppVersion">15.0000</meta:user-defined>
    <meta:template xlink:type="simple" xlink:actuate="onRequest" xlink:title="Normal.dotm" xlink:href=""/>
  </office:meta>
</office:document-meta>
</file>